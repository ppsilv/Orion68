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9B000003A3016C542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style:font-face style:name="Ubuntu Sans" svg:font-family="'Ubuntu Sans'" style:font-family-generic="swiss"/>
    <style:font-face style:name="Ubuntu Sans1" svg:font-family="'Ubuntu Sans'" style:font-family-generic="swiss" style:font-pitch="variable"/>
  </office:font-face-decls>
  <office:automatic-styles>
    <style:style style:name="Table1" style:family="table">
      <style:table-properties style:width="19.156cm" fo:margin-left="0.212cm" table:align="left"/>
    </style:style>
    <style:style style:name="Table1.A" style:family="table-column">
      <style:table-column-properties style:column-width="6.35cm"/>
    </style:style>
    <style:style style:name="Table1.B" style:family="table-column">
      <style:table-column-properties style:column-width="3.422cm"/>
    </style:style>
    <style:style style:name="Table1.C" style:family="table-column">
      <style:table-column-properties style:column-width="3.598cm"/>
    </style:style>
    <style:style style:name="Table1.D" style:family="table-column">
      <style:table-column-properties style:column-width="5.786cm"/>
    </style:style>
    <style:style style:name="Table1.A1" style:family="table-cell">
      <style:table-cell-properties style:vertical-align="middle" fo:padding-left="0.318cm" fo:padding-right="0.318cm" fo:padding-top="0.212cm" fo:padding-bottom="0.212cm" fo:border="0.05pt solid #c4c7c5"/>
    </style:style>
    <style:style style:name="Table1.2" style:family="table-row">
      <style:table-row-properties style:min-row-height="1.695cm"/>
    </style:style>
    <style:style style:name="Table2" style:family="table">
      <style:table-properties style:width="19.33cm" fo:break-before="auto" fo:break-after="auto" table:align="left" fo:keep-with-next="auto"/>
    </style:style>
    <style:style style:name="Table2.A" style:family="table-column">
      <style:table-column-properties style:column-width="6.285cm"/>
    </style:style>
    <style:style style:name="Table2.B" style:family="table-column">
      <style:table-column-properties style:column-width="3.173cm"/>
    </style:style>
    <style:style style:name="Table2.C" style:family="table-column">
      <style:table-column-properties style:column-width="3.067cm"/>
    </style:style>
    <style:style style:name="Table2.D" style:family="table-column">
      <style:table-column-properties style:column-width="2.108cm"/>
    </style:style>
    <style:style style:name="Table2.E" style:family="table-column">
      <style:table-column-properties style:column-width="4.697cm"/>
    </style:style>
    <style:style style:name="Table2.A1" style:family="table-cell">
      <style:table-cell-properties style:vertical-align="middle" fo:padding-left="0.318cm" fo:padding-right="0.318cm" fo:padding-top="0.212cm" fo:padding-bottom="0.212cm" fo:border="0.05pt solid #c4c7c5"/>
    </style:style>
    <style:style style:name="Table3" style:family="table">
      <style:table-properties style:width="19.403cm" table:align="left"/>
    </style:style>
    <style:style style:name="Table3.A" style:family="table-column">
      <style:table-column-properties style:column-width="3.582cm"/>
    </style:style>
    <style:style style:name="Table3.B" style:family="table-column">
      <style:table-column-properties style:column-width="4.521cm"/>
    </style:style>
    <style:style style:name="Table3.C" style:family="table-column">
      <style:table-column-properties style:column-width="11.299cm"/>
    </style:style>
    <style:style style:name="Table3.A1" style:family="table-cell">
      <style:table-cell-properties style:vertical-align="middle" fo:padding-left="0.318cm" fo:padding-right="0.318cm" fo:padding-top="0.212cm" fo:padding-bottom="0.212cm" fo:border="0.05pt solid #c4c7c5"/>
    </style:style>
    <style:style style:name="Table4" style:family="table">
      <style:table-properties style:width="19.403cm" fo:break-before="auto" fo:break-after="auto" table:align="left" fo:keep-with-next="auto"/>
    </style:style>
    <style:style style:name="Table4.A" style:family="table-column">
      <style:table-column-properties style:column-width="0.972cm"/>
    </style:style>
    <style:style style:name="Table4.B" style:family="table-column">
      <style:table-column-properties style:column-width="1.316cm"/>
    </style:style>
    <style:style style:name="Table4.C" style:family="table-column">
      <style:table-column-properties style:column-width="1.228cm"/>
    </style:style>
    <style:style style:name="Table4.D" style:family="table-column">
      <style:table-column-properties style:column-width="5.847cm"/>
    </style:style>
    <style:style style:name="Table4.E" style:family="table-column">
      <style:table-column-properties style:column-width="4.858cm"/>
    </style:style>
    <style:style style:name="Table4.F" style:family="table-column">
      <style:table-column-properties style:column-width="5.182cm"/>
    </style:style>
    <style:style style:name="Table4.A1" style:family="table-cell">
      <style:table-cell-properties style:vertical-align="middle" fo:padding-left="0.318cm" fo:padding-right="0.318cm" fo:padding-top="0.212cm" fo:padding-bottom="0.212cm" fo:border="0.05pt solid #c4c7c5"/>
    </style:style>
    <style:style style:name="Table13" style:family="table">
      <style:table-properties style:width="19.403cm" table:align="left"/>
    </style:style>
    <style:style style:name="Table13.A" style:family="table-column">
      <style:table-column-properties style:column-width="1.256cm"/>
    </style:style>
    <style:style style:name="Table13.B" style:family="table-column">
      <style:table-column-properties style:column-width="6.74cm"/>
    </style:style>
    <style:style style:name="Table13.C" style:family="table-column">
      <style:table-column-properties style:column-width="5.791cm"/>
    </style:style>
    <style:style style:name="Table13.D" style:family="table-column">
      <style:table-column-properties style:column-width="5.616cm"/>
    </style:style>
    <style:style style:name="Table13.A1" style:family="table-cell">
      <style:table-cell-properties style:vertical-align="middle" fo:padding="0.049cm" fo:border="none"/>
    </style:style>
    <style:style style:name="Table13.3" style:family="table-row">
      <style:table-row-properties style:min-row-height="0.797cm"/>
    </style:style>
    <style:style style:name="Table13.4" style:family="table-row">
      <style:table-row-properties style:min-row-height="0.776cm"/>
    </style:style>
    <style:style style:name="Table13.24" style:family="table-row">
      <style:table-row-properties style:min-row-height="0.522cm"/>
    </style:style>
    <style:style style:name="Table13.26" style:family="table-row">
      <style:table-row-properties style:min-row-height="0.579cm"/>
    </style:style>
    <style:style style:name="Table13.27" style:family="table-row">
      <style:table-row-properties style:min-row-height="0.818cm"/>
    </style:style>
    <style:style style:name="Table13.28" style:family="table-row">
      <style:table-row-properties style:min-row-height="0.593cm"/>
    </style:style>
    <style:style style:name="Table5" style:family="table">
      <style:table-properties style:width="11.324cm" table:align="left"/>
    </style:style>
    <style:style style:name="Table5.A" style:family="table-column">
      <style:table-column-properties style:column-width="1.986cm"/>
    </style:style>
    <style:style style:name="Table5.B" style:family="table-column">
      <style:table-column-properties style:column-width="9.338cm"/>
    </style:style>
    <style:style style:name="Table5.A1" style:family="table-cell">
      <style:table-cell-properties style:vertical-align="middle" fo:background-color="#ffff00" fo:padding="0.049cm" fo:border="none">
        <style:background-image/>
      </style:table-cell-properties>
    </style:style>
    <style:style style:name="Table5.3" style:family="table-row">
      <style:table-row-properties style:min-row-height="0.508cm"/>
    </style:style>
    <style:style style:name="Table6" style:family="table">
      <style:table-properties style:width="10.005cm" table:align="left"/>
    </style:style>
    <style:style style:name="Table6.A" style:family="table-column">
      <style:table-column-properties style:column-width="1.907cm"/>
    </style:style>
    <style:style style:name="Table6.B" style:family="table-column">
      <style:table-column-properties style:column-width="8.098cm"/>
    </style:style>
    <style:style style:name="Table6.A1" style:family="table-cell">
      <style:table-cell-properties style:vertical-align="middle" fo:background-color="#ffff00" fo:padding="0.049cm" fo:border="none">
        <style:background-image/>
      </style:table-cell-properties>
    </style:style>
    <style:style style:name="Table7" style:family="table">
      <style:table-properties style:width="11.201cm" table:align="left"/>
    </style:style>
    <style:style style:name="Table7.A" style:family="table-column">
      <style:table-column-properties style:column-width="1.986cm"/>
    </style:style>
    <style:style style:name="Table7.B" style:family="table-column">
      <style:table-column-properties style:column-width="9.215cm"/>
    </style:style>
    <style:style style:name="Table7.A1" style:family="table-cell">
      <style:table-cell-properties style:vertical-align="middle" fo:background-color="#ffff00" fo:padding="0.049cm" fo:border="none">
        <style:background-image/>
      </style:table-cell-properties>
    </style:style>
    <style:style style:name="Table7.3" style:family="table-row">
      <style:table-row-properties style:min-row-height="0.399cm"/>
    </style:style>
    <style:style style:name="Table8" style:family="table">
      <style:table-properties style:width="6.618cm" table:align="left"/>
    </style:style>
    <style:style style:name="Table8.A" style:family="table-column">
      <style:table-column-properties style:column-width="1.907cm"/>
    </style:style>
    <style:style style:name="Table8.B" style:family="table-column">
      <style:table-column-properties style:column-width="4.711cm"/>
    </style:style>
    <style:style style:name="Table8.A1" style:family="table-cell">
      <style:table-cell-properties style:vertical-align="middle" fo:background-color="#ffff00" fo:padding="0.049cm" fo:border="none">
        <style:background-image/>
      </style:table-cell-properties>
    </style:style>
    <style:style style:name="Table9" style:family="table">
      <style:table-properties style:width="8.772cm" table:align="left"/>
    </style:style>
    <style:style style:name="Table9.A" style:family="table-column">
      <style:table-column-properties style:column-width="1.843cm"/>
    </style:style>
    <style:style style:name="Table9.B" style:family="table-column">
      <style:table-column-properties style:column-width="2.955cm"/>
    </style:style>
    <style:style style:name="Table9.C" style:family="table-column">
      <style:table-column-properties style:column-width="3.974cm"/>
    </style:style>
    <style:style style:name="Table9.A1" style:family="table-cell">
      <style:table-cell-properties style:vertical-align="middle" fo:padding="0.049cm" fo:border="none"/>
    </style:style>
    <style:style style:name="Table10" style:family="table">
      <style:table-properties style:width="5.96cm" table:align="left"/>
    </style:style>
    <style:style style:name="Table10.A" style:family="table-column">
      <style:table-column-properties style:column-width="1.986cm"/>
    </style:style>
    <style:style style:name="Table10.B" style:family="table-column">
      <style:table-column-properties style:column-width="3.974cm"/>
    </style:style>
    <style:style style:name="Table10.A1" style:family="table-cell">
      <style:table-cell-properties style:vertical-align="middle" fo:padding="0.049cm" fo:border="none"/>
    </style:style>
    <style:style style:name="Table11" style:family="table">
      <style:table-properties style:width="6.567cm" table:align="left"/>
    </style:style>
    <style:style style:name="Table11.A" style:family="table-column">
      <style:table-column-properties style:column-width="1.986cm"/>
    </style:style>
    <style:style style:name="Table11.B" style:family="table-column">
      <style:table-column-properties style:column-width="4.581cm"/>
    </style:style>
    <style:style style:name="Table11.A1" style:family="table-cell">
      <style:table-cell-properties style:vertical-align="middle" fo:padding="0.049cm" fo:border="none"/>
    </style:style>
    <style:style style:name="Table12" style:family="table">
      <style:table-properties style:width="6.567cm" table:align="left"/>
    </style:style>
    <style:style style:name="Table12.A" style:family="table-column">
      <style:table-column-properties style:column-width="1.986cm"/>
    </style:style>
    <style:style style:name="Table12.B" style:family="table-column">
      <style:table-column-properties style:column-width="4.581cm"/>
    </style:style>
    <style:style style:name="Table12.A1" style:family="table-cell">
      <style:table-cell-properties style:vertical-align="middle" fo:padding="0.049cm" fo:border="none"/>
    </style:style>
    <style:style style:name="Tabela1" style:family="table">
      <style:table-properties style:width="19.403cm" table:align="margins"/>
    </style:style>
    <style:style style:name="Tabela1.A" style:family="table-column">
      <style:table-column-properties style:column-width="4.851cm" style:rel-column-width="16383*"/>
    </style:style>
    <style:style style:name="Tabela1.B" style:family="table-column">
      <style:table-column-properties style:column-width="4.851cm" style:rel-column-width="16384*"/>
    </style:style>
    <style:style style:name="Tabela1.1" style:family="table-row">
      <style:table-row-properties style:min-row-height="0.601cm"/>
    </style:style>
    <style:style style:name="Tabela1.A1" style:family="table-cell">
      <style:table-cell-properties fo:padding="0cm" fo:border="none" style:writing-mode="page"/>
    </style:style>
    <style:style style:name="P1" style:family="paragraph" style:parent-style-name="Header">
      <style:text-properties officeooo:paragraph-rsid="000e78bf"/>
    </style:style>
    <style:style style:name="P2" style:family="paragraph" style:parent-style-name="Header">
      <style:paragraph-properties fo:text-align="end" style:justify-single-word="false"/>
      <style:text-properties officeooo:paragraph-rsid="000e78bf"/>
    </style:style>
    <style:style style:name="P3" style:family="paragraph" style:parent-style-name="Footer">
      <style:paragraph-properties fo:text-align="end" style:justify-single-word="false"/>
      <style:text-properties officeooo:rsid="00127bdc" officeooo:paragraph-rsid="00155e02"/>
    </style:style>
    <style:style style:name="P4" style:family="paragraph" style:parent-style-name="Footer">
      <style:text-properties officeooo:rsid="001560d0" officeooo:paragraph-rsid="001560d0"/>
    </style:style>
    <style:style style:name="P5" style:family="paragraph" style:parent-style-name="Standard">
      <style:text-properties officeooo:rsid="000e78bf" officeooo:paragraph-rsid="000e78bf"/>
    </style:style>
    <style:style style:name="P6" style:family="paragraph" style:parent-style-name="Standard">
      <style:paragraph-properties fo:text-align="center" style:justify-single-word="false"/>
      <style:text-properties officeooo:rsid="000e78bf" officeooo:paragraph-rsid="000e78bf"/>
    </style:style>
    <style:style style:name="P7" style:family="paragraph" style:parent-style-name="Standard">
      <style:paragraph-properties fo:text-align="center" style:justify-single-word="false"/>
      <style:text-properties officeooo:rsid="000e78bf" officeooo:paragraph-rsid="002ba4e8"/>
    </style:style>
    <style:style style:name="P8" style:family="paragraph" style:parent-style-name="Standard">
      <style:paragraph-properties fo:text-align="center" style:justify-single-word="false"/>
      <style:text-properties fo:color="#0000ff" loext:opacity="100%" fo:font-weight="bold" officeooo:rsid="000e78bf" officeooo:paragraph-rsid="000e78bf" style:font-weight-asian="bold" style:font-weight-complex="bold"/>
    </style:style>
    <style:style style:name="P9" style:family="paragraph" style:parent-style-name="Table_20_Contents">
      <style:text-properties fo:font-style="italic" officeooo:rsid="0027ec49" officeooo:paragraph-rsid="0027ec49"/>
    </style:style>
    <style:style style:name="P10" style:family="paragraph" style:parent-style-name="Table_20_Contents">
      <style:paragraph-properties fo:margin-left="0cm" fo:margin-right="0cm" fo:text-indent="0cm" style:auto-text-indent="false"/>
      <style:text-properties fo:font-style="italic" officeooo:rsid="0027ec49" officeooo:paragraph-rsid="0027ec49"/>
    </style:style>
    <style:style style:name="P11" style:family="paragraph" style:parent-style-name="Table_20_Contents">
      <style:text-properties fo:font-style="italic" officeooo:rsid="0028a833" officeooo:paragraph-rsid="0028a833"/>
    </style:style>
    <style:style style:name="P12" style:family="paragraph" style:parent-style-name="Preformatted_20_Text">
      <style:paragraph-properties fo:margin-top="0cm" fo:margin-bottom="0.499cm" style:contextual-spacing="false"/>
    </style:style>
    <style:style style:name="P13" style:family="paragraph" style:parent-style-name="Text_20_body">
      <style:paragraph-properties fo:margin-left="0cm" fo:margin-right="0cm" fo:text-indent="0cm" style:auto-text-indent="false"/>
    </style:style>
    <style:style style:name="P14" style:family="paragraph" style:parent-style-name="Heading_20_2">
      <style:paragraph-properties fo:margin-left="0cm" fo:margin-right="0cm" fo:text-indent="0cm" style:auto-text-indent="false"/>
    </style:style>
    <style:style style:name="P15" style:family="paragraph" style:parent-style-name="Table_20_Contents">
      <style:paragraph-properties fo:margin-left="0cm" fo:margin-right="0cm" fo:text-indent="0cm" style:auto-text-indent="false"/>
    </style:style>
    <style:style style:name="P16" style:family="paragraph" style:parent-style-name="Heading_20_3" style:master-page-name="">
      <loext:graphic-properties draw:fill="none"/>
      <style:paragraph-properties fo:margin-left="-1.199cm" fo:margin-right="-0.9cm" fo:margin-top="0.247cm" fo:margin-bottom="0.212cm" style:contextual-spacing="false" fo:text-indent="0cm" style:auto-text-indent="false" style:page-number="auto" fo:background-color="transparent" fo:keep-with-next="always"/>
    </style:style>
    <style:style style:name="P17" style:family="paragraph" style:parent-style-name="Heading_20_2">
      <style:paragraph-properties fo:margin-left="0cm" fo:margin-right="0cm" fo:margin-top="0cm" fo:margin-bottom="0.247cm" style:contextual-spacing="false" fo:line-height="114%" fo:text-indent="0cm" style:auto-text-indent="false"/>
      <style:text-properties style:font-name="Google Sans"/>
    </style:style>
    <style:style style:name="P18"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19" style:family="paragraph" style:parent-style-name="Heading_20_4">
      <style:paragraph-properties fo:margin-left="0cm" fo:margin-right="0cm" fo:margin-top="0cm" fo:margin-bottom="0.247cm" style:contextual-spacing="false" fo:line-height="114%" fo:text-indent="0cm" style:auto-text-indent="false"/>
      <style:text-properties style:font-name="Google Sans"/>
    </style:style>
    <style:style style:name="P20"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text-properties fo:color="#1f1f1f" loext:opacity="100%" style:font-name="Google Sans Text" fo:font-weight="bold" loext:padding="0cm" loext:border="none"/>
    </style:style>
    <style:style style:name="P21"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text-properties fo:color="#1f1f1f" loext:opacity="100%" style:font-name="Google Sans Text" loext:padding="0cm" loext:border="none"/>
    </style:style>
    <style:style style:name="P22"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3"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text-properties fo:color="#1f1f1f" loext:opacity="100%" loext:padding="0cm" loext:border="none"/>
    </style:style>
    <style:style style:name="P24"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5" style:family="paragraph" style:parent-style-name="Heading_20_3">
      <style:paragraph-properties fo:margin-left="0cm" fo:margin-right="0cm" fo:margin-top="0cm" fo:margin-bottom="0cm" style:contextual-spacing="false" fo:line-height="114%" fo:orphans="2" fo:widows="2" fo:text-indent="0cm" style:auto-text-indent="false" fo:padding="0cm" fo:border="none"/>
    </style:style>
    <style:style style:name="P26" style:family="paragraph" style:parent-style-name="Text_20_body">
      <style:paragraph-properties fo:margin-left="0cm" fo:margin-right="0cm" fo:margin-top="0cm" fo:margin-bottom="0cm" style:contextual-spacing="false" fo:line-height="114%" fo:orphans="2" fo:widows="2" fo:text-indent="0cm" style:auto-text-indent="false" fo:padding="0cm" fo:border="none"/>
    </style:style>
    <style:style style:name="P27"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style>
    <style:style style:name="P28" style:family="paragraph" style:parent-style-name="Heading_20_3">
      <style:paragraph-properties fo:margin-left="1cm" fo:margin-right="1cm" fo:margin-top="0cm" fo:margin-bottom="0.499cm" style:contextual-spacing="false" fo:line-height="114%" fo:text-indent="0cm" style:auto-text-indent="false"/>
    </style:style>
    <style:style style:name="P29" style:family="paragraph" style:parent-style-name="Quotations">
      <style:paragraph-properties fo:margin-left="1cm" fo:margin-right="1cm" fo:margin-top="0cm" fo:margin-bottom="0.499cm" style:contextual-spacing="false" fo:line-height="114%" fo:text-indent="0cm" style:auto-text-indent="false"/>
    </style:style>
    <style:style style:name="P30" style:family="paragraph" style:parent-style-name="Heading_20_4">
      <style:paragraph-properties fo:margin-left="0cm" fo:margin-right="0cm" fo:margin-top="0cm" fo:margin-bottom="0.212cm" style:contextual-spacing="false" fo:line-height="114%" fo:text-indent="0cm" style:auto-text-indent="false"/>
    </style:style>
    <style:style style:name="P31" style:family="paragraph" style:parent-style-name="Table_20_Contents">
      <style:paragraph-properties fo:margin-left="0cm" fo:margin-right="0cm" fo:margin-top="0cm" fo:margin-bottom="0.247cm" style:contextual-spacing="false" fo:line-height="114%" fo:text-indent="0cm" style:auto-text-indent="false"/>
    </style:style>
    <style:style style:name="P32" style:family="paragraph" style:parent-style-name="Text_20_body">
      <style:paragraph-properties fo:margin-left="0cm" fo:margin-right="0cm" fo:margin-top="0cm" fo:margin-bottom="0.247cm" style:contextual-spacing="false" fo:line-height="114%" fo:text-indent="0cm" style:auto-text-indent="false"/>
    </style:style>
    <style:style style:name="P33" style:family="paragraph" style:parent-style-name="Table_20_Contents">
      <style:paragraph-properties fo:margin-left="0cm" fo:margin-right="0cm" fo:margin-top="0cm" fo:margin-bottom="0cm" style:contextual-spacing="false" fo:line-height="114%" fo:text-indent="0cm" style:auto-text-indent="false"/>
    </style:style>
    <style:style style:name="P34" style:family="paragraph" style:parent-style-name="Heading_20_3">
      <style:paragraph-properties fo:margin-left="1cm" fo:margin-right="1cm" fo:margin-top="0cm" fo:margin-bottom="0.499cm" style:contextual-spacing="false" fo:line-height="114%" fo:text-indent="0cm" style:auto-text-indent="false"/>
      <style:text-properties officeooo:paragraph-rsid="002636ef"/>
    </style:style>
    <style:style style:name="P35" style:family="paragraph" style:parent-style-name="Table_20_Contents">
      <loext:graphic-properties draw:fill="none"/>
      <style:paragraph-properties fo:margin-left="0.199cm" fo:margin-right="0cm" fo:margin-top="0cm" fo:margin-bottom="0cm" style:contextual-spacing="false" fo:line-height="114%" fo:orphans="0" fo:widows="0" fo:text-indent="0cm" style:auto-text-indent="false" fo:background-color="transparent" text:number-lines="false" text:line-number="0"/>
    </style:style>
    <style:style style:name="P36" style:family="paragraph" style:parent-style-name="Table_20_Contents">
      <loext:graphic-properties draw:fill="none"/>
      <style:paragraph-properties fo:margin-left="0.101cm" fo:margin-right="0cm" fo:margin-top="0cm" fo:margin-bottom="0.247cm" style:contextual-spacing="false" fo:line-height="114%" fo:orphans="0" fo:widows="0" fo:text-indent="0cm" style:auto-text-indent="false" fo:background-color="transparent" text:number-lines="false" text:line-number="0"/>
    </style:style>
    <style:style style:name="P37" style:family="paragraph" style:parent-style-name="Heading_20_3">
      <style:text-properties style:font-name="FreeMono" fo:font-size="10pt" fo:background-color="transparent" style:font-size-asian="10pt" style:font-size-complex="10pt"/>
    </style:style>
    <style:style style:name="P38" style:family="paragraph" style:parent-style-name="Heading_20_4">
      <style:text-properties style:font-name="FreeMono" fo:font-size="10pt" fo:background-color="transparent" style:font-size-asian="10pt" style:font-size-complex="10pt"/>
    </style:style>
    <style:style style:name="P39" style:family="paragraph" style:parent-style-name="Table_20_Contents">
      <style:text-properties style:font-name="FreeMono" fo:font-size="10pt" fo:background-color="transparent" style:font-size-asian="10pt" style:font-size-complex="10pt"/>
    </style:style>
    <style:style style:name="P40" style:family="paragraph" style:parent-style-name="Table_20_Heading">
      <style:text-properties style:font-name="FreeMono" fo:font-size="10pt" fo:background-color="transparent" style:font-size-asian="10pt" style:font-size-complex="10pt"/>
    </style:style>
    <style:style style:name="P41" style:family="paragraph" style:parent-style-name="Table_20_Contents">
      <style:text-properties style:font-name="FreeMono" fo:font-size="10pt" fo:font-weight="bold" fo:background-color="transparent" style:font-size-asian="10pt" style:font-size-complex="10pt"/>
    </style:style>
    <style:style style:name="P42" style:family="paragraph" style:parent-style-name="Heading_20_3">
      <style:text-properties officeooo:paragraph-rsid="002ba4e8"/>
    </style:style>
    <style:style style:name="P43" style:family="paragraph" style:parent-style-name="Quotations">
      <style:paragraph-properties fo:margin-left="1cm" fo:margin-right="1cm" fo:margin-top="0cm" fo:margin-bottom="0.499cm" style:contextual-spacing="false" fo:line-height="114%" fo:text-indent="0cm" style:auto-text-indent="false"/>
      <style:text-properties style:font-name="Google Sans Text" officeooo:paragraph-rsid="002636ef"/>
    </style:style>
    <style:style style:name="P44"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45"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46" style:family="paragraph" style:parent-style-name="Text_20_body" style:master-page-name="">
      <loext:graphic-properties draw:fill="none"/>
      <style:paragraph-properties fo:margin-left="0cm" fo:margin-right="0cm" fo:margin-top="0cm" fo:margin-bottom="0.247cm" style:contextual-spacing="false" fo:line-height="114%" fo:text-indent="0cm" style:auto-text-indent="false" style:page-number="auto" fo:background-color="transparent"/>
      <style:text-properties style:font-name="Google Sans Text"/>
    </style:style>
    <style:style style:name="P47"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48" style:family="paragraph" style:parent-style-name="Table_20_Contents">
      <style:text-properties fo:font-weight="bold"/>
    </style:style>
    <style:style style:name="P49" style:family="paragraph" style:parent-style-name="Table_20_Contents">
      <style:text-properties fo:font-weight="bold" officeooo:rsid="0028a833" officeooo:paragraph-rsid="0028a833"/>
    </style:style>
    <style:style style:name="P50" style:family="paragraph" style:parent-style-name="Text_20_body">
      <style:paragraph-properties fo:margin-left="0cm" fo:margin-right="0cm" fo:margin-top="0cm" fo:margin-bottom="0cm" style:contextual-spacing="false" fo:line-height="114%" fo:orphans="2" fo:widows="2" fo:text-indent="0cm" style:auto-text-indent="false" fo:padding="0cm" fo:border="none"/>
      <style:text-properties fo:font-weight="bold"/>
    </style:style>
    <style:style style:name="P51" style:family="paragraph" style:parent-style-name="Text_20_body">
      <style:paragraph-properties fo:margin-left="0cm" fo:margin-right="0cm" fo:margin-top="0cm" fo:margin-bottom="0cm" style:contextual-spacing="false" fo:line-height="114%" fo:orphans="2" fo:widows="2" fo:text-indent="0cm" style:auto-text-indent="false" fo:padding="0cm" fo:border="none"/>
      <style:text-properties fo:font-weight="bold" style:font-weight-asian="bold" style:font-weight-complex="bold"/>
    </style:style>
    <style:style style:name="P52" style:family="paragraph" style:parent-style-name="Table_20_Contents">
      <style:paragraph-properties fo:margin-left="0cm" fo:margin-right="0cm" fo:text-indent="0cm" style:auto-text-indent="false"/>
      <style:text-properties officeooo:rsid="0027ec49" officeooo:paragraph-rsid="0027ec49"/>
    </style:style>
    <style:style style:name="P53" style:family="paragraph" style:parent-style-name="Table_20_Contents">
      <style:text-properties fo:font-weight="normal" officeooo:rsid="0027ec49" officeooo:paragraph-rsid="0027ec49" style:font-weight-asian="normal" style:font-weight-complex="normal"/>
    </style:style>
    <style:style style:name="P54" style:family="paragraph" style:parent-style-name="Table_20_Contents">
      <style:text-properties fo:font-weight="normal" style:font-weight-asian="normal" style:font-weight-complex="normal"/>
    </style:style>
    <style:style style:name="P55" style:family="paragraph" style:parent-style-name="Table_20_Contents">
      <style:text-properties fo:font-weight="normal" officeooo:rsid="0028a833" officeooo:paragraph-rsid="0028a833" style:font-weight-asian="normal" style:font-weight-complex="normal"/>
    </style:style>
    <style:style style:name="P56" style:family="paragraph" style:parent-style-name="Table_20_Contents">
      <style:paragraph-properties fo:margin-left="0cm" fo:margin-right="0cm" fo:text-indent="0cm" style:auto-text-indent="false"/>
      <style:text-properties officeooo:paragraph-rsid="0027ec49"/>
    </style:style>
    <style:style style:name="P57" style:family="paragraph" style:parent-style-name="Table_20_Contents">
      <style:paragraph-properties fo:margin-left="0cm" fo:margin-right="0cm" fo:text-indent="0cm" style:auto-text-indent="false"/>
      <style:text-properties officeooo:rsid="0028a833" officeooo:paragraph-rsid="0028a833"/>
    </style:style>
    <style:style style:name="P58" style:family="paragraph" style:parent-style-name="Table_20_Contents">
      <style:paragraph-properties fo:margin-left="0cm" fo:margin-right="0cm" fo:text-indent="0cm" style:auto-text-indent="false"/>
      <style:text-properties officeooo:paragraph-rsid="0028a833"/>
    </style:style>
    <style:style style:name="P59" style:family="paragraph" style:parent-style-name="Text_20_body">
      <style:text-properties officeooo:paragraph-rsid="002a7513"/>
    </style:style>
    <style:style style:name="P60" style:family="paragraph" style:parent-style-name="Footer">
      <style:paragraph-properties fo:text-align="start" style:justify-single-word="false"/>
      <style:text-properties officeooo:rsid="00127bdc" officeooo:paragraph-rsid="001301e0"/>
    </style:style>
    <style:style style:name="P61" style:family="paragraph" style:parent-style-name="Footer">
      <style:paragraph-properties fo:text-align="start" style:justify-single-word="false"/>
      <style:text-properties officeooo:rsid="00127bdc" officeooo:paragraph-rsid="00127bdc"/>
    </style:style>
    <style:style style:name="P62" style:family="paragraph" style:parent-style-name="Header">
      <style:text-properties officeooo:paragraph-rsid="000e78bf"/>
    </style:style>
    <style:style style:name="P63" style:family="paragraph" style:parent-style-name="Heading_20_1">
      <style:text-properties officeooo:rsid="000e78bf"/>
    </style:style>
    <style:style style:name="P64" style:family="paragraph" style:parent-style-name="Heading_20_1">
      <style:text-properties officeooo:paragraph-rsid="0039233e"/>
    </style:style>
    <style:style style:name="P65" style:family="paragraph" style:parent-style-name="Heading_20_2">
      <style:paragraph-properties>
        <style:tab-stops>
          <style:tab-stop style:position="18.209cm"/>
          <style:tab-stop style:position="18.304cm"/>
          <style:tab-stop style:position="18.905cm"/>
        </style:tab-stops>
      </style:paragraph-properties>
      <style:text-properties style:font-name="Ubuntu Sans1" fo:font-size="13pt" officeooo:paragraph-rsid="0039233e" style:font-size-asian="13pt" style:font-size-complex="13pt"/>
    </style:style>
    <style:style style:name="P66" style:family="paragraph" style:parent-style-name="Heading_20_2">
      <style:paragraph-properties>
        <style:tab-stops>
          <style:tab-stop style:position="17.992cm"/>
        </style:tab-stops>
      </style:paragraph-properties>
      <style:text-properties style:font-name="Ubuntu Sans1" fo:font-size="13pt" officeooo:paragraph-rsid="0039233e" style:font-size-asian="13pt" style:font-size-complex="13pt"/>
    </style:style>
    <style:style style:name="P67" style:family="paragraph" style:parent-style-name="Heading_20_2">
      <style:paragraph-properties>
        <style:tab-stops>
          <style:tab-stop style:position="18.039cm"/>
        </style:tab-stops>
      </style:paragraph-properties>
      <style:text-properties style:font-name="Ubuntu Sans1" fo:font-size="13pt" officeooo:paragraph-rsid="0039233e" style:font-size-asian="13pt" style:font-size-complex="13pt"/>
    </style:style>
    <style:style style:name="P68" style:family="paragraph" style:parent-style-name="Heading_20_2">
      <style:paragraph-properties>
        <style:tab-stops>
          <style:tab-stop style:position="18.016cm"/>
        </style:tab-stops>
      </style:paragraph-properties>
      <style:text-properties style:font-name="Ubuntu Sans1" fo:font-size="13pt" officeooo:paragraph-rsid="0039233e" style:font-size-asian="13pt" style:font-size-complex="13pt"/>
    </style:style>
    <style:style style:name="P69" style:family="paragraph" style:parent-style-name="Heading_20_2" style:list-style-name="List_20_1" style:master-page-name="">
      <style:paragraph-properties fo:margin-top="0cm" fo:margin-bottom="0cm" style:contextual-spacing="false" fo:line-height="114%" fo:orphans="2" fo:widows="2" style:page-number="auto" fo:break-before="auto" fo:break-after="auto" fo:padding="0cm" fo:border="none" fo:keep-with-next="auto"/>
    </style:style>
    <style:style style:name="P70" style:family="paragraph" style:parent-style-name="Heading_20_2" style:list-style-name="List_20_1" style:master-page-name="">
      <style:paragraph-properties fo:margin-top="0cm" fo:margin-bottom="0cm" style:contextual-spacing="false" fo:line-height="114%" fo:orphans="2" fo:widows="2" style:page-number="auto" fo:break-before="auto" fo:break-after="auto" fo:padding="0cm" fo:border="none" fo:keep-with-next="auto"/>
    </style:style>
    <style:style style:name="P71" style:family="paragraph" style:parent-style-name="Heading_20_2" style:list-style-name="List_20_1" style:master-page-name="">
      <style:paragraph-properties fo:margin-top="0cm" fo:margin-bottom="0cm" style:contextual-spacing="false" fo:line-height="114%" fo:orphans="2" fo:widows="2" style:page-number="auto" fo:break-before="auto" fo:break-after="auto" fo:padding="0cm" fo:border="none" fo:keep-with-next="auto"/>
    </style:style>
    <style:style style:name="P72" style:family="paragraph" style:parent-style-name="Heading_20_3">
      <style:text-properties officeooo:paragraph-rsid="002fad0d"/>
    </style:style>
    <style:style style:name="P73"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74" style:family="paragraph" style:parent-style-name="Heading_20_3" style:list-style-name="List_20_1" style:master-page-name="">
      <style:paragraph-properties fo:margin-top="0cm" fo:margin-bottom="0cm" style:contextual-spacing="false" fo:line-height="114%" fo:orphans="2" fo:widows="2" style:page-number="auto" fo:break-before="auto" fo:break-after="auto" fo:padding="0cm" fo:border="none" fo:keep-with-next="auto"/>
    </style:style>
    <style:style style:name="P75" style:family="paragraph" style:parent-style-name="Heading_20_3" style:list-style-name="List_20_1"/>
    <style:style style:name="P76" style:family="paragraph" style:parent-style-name="Heading_20_4" style:list-style-name="List_20_1"/>
    <style:style style:name="P77" style:family="paragraph" style:parent-style-name="Heading_20_4" style:list-style-name="List_20_1">
      <style:paragraph-properties fo:margin-top="0cm" fo:margin-bottom="0.247cm" style:contextual-spacing="false" fo:line-height="114%"/>
    </style:style>
    <style:style style:name="P78" style:family="paragraph" style:parent-style-name="Preformatted_20_Text">
      <style:paragraph-properties>
        <style:tab-stops>
          <style:tab-stop style:position="18.209cm"/>
          <style:tab-stop style:position="18.304cm"/>
          <style:tab-stop style:position="18.905cm"/>
        </style:tab-stops>
      </style:paragraph-properties>
      <style:text-properties style:font-name="Ubuntu Sans1" fo:font-size="13pt" style:font-size-asian="13pt" style:font-size-complex="13pt"/>
    </style:style>
    <style:style style:name="P79" style:family="paragraph" style:parent-style-name="Preformatted_20_Text">
      <style:paragraph-properties>
        <style:tab-stops>
          <style:tab-stop style:position="18.209cm"/>
          <style:tab-stop style:position="18.761cm"/>
        </style:tab-stops>
      </style:paragraph-properties>
      <style:text-properties style:font-name="Ubuntu Sans1" fo:font-size="13pt" style:font-size-asian="13pt" style:font-size-complex="13pt"/>
    </style:style>
    <style:style style:name="P80"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ab-stops>
          <style:tab-stop style:position="18.209cm"/>
        </style:tab-stops>
      </style:paragraph-properties>
      <style:text-properties style:font-name="Ubuntu Sans1" fo:font-size="13pt" style:font-size-asian="13pt" style:font-size-complex="13pt"/>
    </style:style>
    <style:style style:name="P81" style:family="paragraph" style:parent-style-name="Preformatted_20_Text">
      <style:paragraph-properties>
        <style:tab-stops>
          <style:tab-stop style:position="18.209cm"/>
        </style:tab-stops>
      </style:paragraph-properties>
      <style:text-properties style:font-name="Ubuntu Sans1" fo:font-size="13pt" style:font-size-asian="13pt" style:font-size-complex="13pt"/>
    </style:style>
    <style:style style:name="P82" style:family="paragraph" style:parent-style-name="Preformatted_20_Text">
      <style:paragraph-properties>
        <style:tab-stops>
          <style:tab-stop style:position="17.992cm"/>
        </style:tab-stops>
      </style:paragraph-properties>
      <style:text-properties style:font-name="Ubuntu Sans1" fo:font-size="13pt" style:font-size-asian="13pt" style:font-size-complex="13pt"/>
    </style:style>
    <style:style style:name="P83" style:family="paragraph" style:parent-style-name="Preformatted_20_Text">
      <style:paragraph-properties>
        <style:tab-stops>
          <style:tab-stop style:position="18.039cm"/>
        </style:tab-stops>
      </style:paragraph-properties>
      <style:text-properties style:font-name="Ubuntu Sans1" fo:font-size="13pt" style:font-size-asian="13pt" style:font-size-complex="13pt"/>
    </style:style>
    <style:style style:name="P84" style:family="paragraph" style:parent-style-name="Preformatted_20_Text">
      <style:paragraph-properties>
        <style:tab-stops>
          <style:tab-stop style:position="18.016cm"/>
        </style:tab-stops>
      </style:paragraph-properties>
      <style:text-properties style:font-name="Ubuntu Sans1" fo:font-size="13pt" style:font-size-asian="13pt" style:font-size-complex="13pt"/>
    </style:style>
    <style:style style:name="P85" style:family="paragraph" style:parent-style-name="Preformatted_20_Text">
      <style:paragraph-properties>
        <style:tab-stops>
          <style:tab-stop style:position="18.039cm"/>
        </style:tab-stops>
      </style:paragraph-properties>
      <style:text-properties style:font-name="Ubuntu Sans1" fo:font-size="13pt" style:font-size-asian="13pt" style:font-size-complex="13pt"/>
    </style:style>
    <style:style style:name="P86" style:family="paragraph" style:parent-style-name="Preformatted_20_Text">
      <style:paragraph-properties>
        <style:tab-stops>
          <style:tab-stop style:position="17.992cm"/>
        </style:tab-stops>
      </style:paragraph-properties>
      <style:text-properties style:font-name="Ubuntu Sans1" fo:font-size="13pt" style:font-size-asian="13pt" style:font-size-complex="13pt"/>
    </style:style>
    <style:style style:name="P87" style:family="paragraph" style:parent-style-name="Preformatted_20_Text">
      <style:paragraph-properties>
        <style:tab-stops>
          <style:tab-stop style:position="18.016cm"/>
        </style:tab-stops>
      </style:paragraph-properties>
      <style:text-properties style:font-name="Ubuntu Sans1" fo:font-size="13pt" style:font-size-asian="13pt" style:font-size-complex="13pt"/>
    </style:style>
    <style:style style:name="P88" style:family="paragraph" style:parent-style-name="Preformatted_20_Text">
      <style:text-properties style:font-name="Ubuntu Sans1" officeooo:rsid="000e78bf"/>
    </style:style>
    <style:style style:name="P89" style:family="paragraph" style:parent-style-name="Preformatted_20_Text">
      <style:paragraph-properties>
        <style:tab-stops>
          <style:tab-stop style:position="18.159cm"/>
        </style:tab-stops>
      </style:paragraph-properties>
      <style:text-properties officeooo:paragraph-rsid="0039233e"/>
    </style:style>
    <style:style style:name="P90" style:family="paragraph" style:parent-style-name="Preformatted_20_Text">
      <style:text-properties officeooo:rsid="000e78bf"/>
    </style:style>
    <style:style style:name="P91" style:family="paragraph" style:parent-style-name="Standard">
      <style:paragraph-properties fo:text-align="center" style:justify-single-word="false"/>
      <style:text-properties officeooo:rsid="000e78bf" officeooo:paragraph-rsid="000e78bf"/>
    </style:style>
    <style:style style:name="P92" style:family="paragraph" style:parent-style-name="Standard">
      <style:text-properties officeooo:rsid="000e78bf" officeooo:paragraph-rsid="000e78bf"/>
    </style:style>
    <style:style style:name="P93" style:family="paragraph" style:parent-style-name="Standard">
      <style:paragraph-properties fo:break-before="page"/>
      <style:text-properties style:font-name="Ubuntu Sans1" officeooo:rsid="000e78bf" officeooo:paragraph-rsid="002e71e3"/>
    </style:style>
    <style:style style:name="P94" style:family="paragraph" style:parent-style-name="Standard">
      <style:text-properties style:font-name="Ubuntu Sans1" fo:font-size="13pt" officeooo:rsid="000e78bf" officeooo:paragraph-rsid="002e71e3" style:font-size-asian="13pt" style:font-size-complex="13pt"/>
    </style:style>
    <style:style style:name="P95" style:family="paragraph" style:parent-style-name="Standard">
      <style:paragraph-properties fo:text-align="center" style:justify-single-word="false"/>
      <style:text-properties officeooo:rsid="003cb103" officeooo:paragraph-rsid="003cb103"/>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text-properties officeooo:rsid="00398275" officeooo:paragraph-rsid="00398275"/>
    </style:style>
    <style:style style:name="P98" style:family="paragraph" style:parent-style-name="Table_20_Contents">
      <style:paragraph-properties fo:text-align="center" style:justify-single-word="false"/>
      <style:text-properties officeooo:rsid="00399d9e" officeooo:paragraph-rsid="00399d9e"/>
    </style:style>
    <style:style style:name="P99" style:family="paragraph" style:parent-style-name="Text_20_body" style:list-style-name="L1"/>
    <style:style style:name="P100" style:family="paragraph" style:parent-style-name="Text_20_body" style:list-style-name="L2"/>
    <style:style style:name="P101"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102"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103"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04"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05"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06" style:family="paragraph" style:parent-style-name="Text_20_body" style:list-style-name="L1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07"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style>
    <style:style style:name="P108"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style>
    <style:style style:name="P109" style:family="paragraph" style:parent-style-name="Text_20_body" style:list-style-name="L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10" style:family="paragraph" style:parent-style-name="Text_20_body" style:list-style-name="L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11"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officeooo:paragraph-rsid="0036fb3a"/>
    </style:style>
    <style:style style:name="P112" style:family="paragraph" style:parent-style-name="Text_20_body" style:list-style-name="List_20_1">
      <style:paragraph-properties fo:margin-top="0cm" fo:margin-bottom="0cm" style:contextual-spacing="false" fo:line-height="114%" fo:orphans="2" fo:widows="2" fo:padding="0cm" fo:border="none"/>
      <style:text-properties officeooo:paragraph-rsid="0036fb3a"/>
    </style:style>
    <style:style style:name="P113" style:family="paragraph" style:parent-style-name="Text_20_body" style:list-style-name="L13">
      <style:paragraph-properties fo:margin-left="0cm" fo:margin-right="0cm" fo:margin-top="0cm" fo:margin-bottom="0.247cm" style:contextual-spacing="false" fo:line-height="114%" fo:text-indent="0cm" style:auto-text-indent="false" fo:padding="0cm" fo:border="none"/>
    </style:style>
    <style:style style:name="P114"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style>
    <style:style style:name="P115"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style>
    <style:style style:name="P116" style:family="paragraph" style:parent-style-name="Text_20_body" style:list-style-name="L16">
      <style:paragraph-properties fo:margin-left="0cm" fo:margin-right="0cm" fo:margin-top="0cm" fo:margin-bottom="0.247cm" style:contextual-spacing="false" fo:line-height="114%" fo:text-indent="0cm" style:auto-text-indent="false" fo:padding="0cm" fo:border="none"/>
    </style:style>
    <style:style style:name="P117" style:family="paragraph" style:parent-style-name="Text_20_body" style:list-style-name="L17">
      <style:paragraph-properties fo:margin-left="0cm" fo:margin-right="0cm" fo:margin-top="0cm" fo:margin-bottom="0.247cm" style:contextual-spacing="false" fo:line-height="114%" fo:text-indent="0cm" style:auto-text-indent="false" fo:padding="0cm" fo:border="none"/>
    </style:style>
    <style:style style:name="P118" style:family="paragraph" style:parent-style-name="Text_20_body" style:list-style-name="L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19" style:family="paragraph" style:parent-style-name="Text_20_body" style:list-style-name="L9"/>
    <style:style style:name="P120" style:family="paragraph" style:parent-style-name="Text_20_body" style:list-style-name="L10">
      <style:paragraph-properties fo:margin-left="0cm" fo:margin-right="0cm" fo:text-indent="0cm" style:auto-text-indent="false"/>
    </style:style>
    <style:style style:name="P121" style:family="paragraph" style:parent-style-name="Text_20_body" style:list-style-name="List_20_1"/>
    <style:style style:name="P122" style:family="paragraph" style:parent-style-name="Text_20_body" style:list-style-name="List_20_1">
      <style:text-properties officeooo:paragraph-rsid="002a7513"/>
    </style:style>
    <style:style style:name="T1" style:family="text">
      <style:text-properties fo:font-weight="bold"/>
    </style:style>
    <style:style style:name="T2" style:family="text">
      <style:text-properties fo:font-weight="bold" officeooo:rsid="000e78bf" style:font-weight-asian="bold" style:font-weight-complex="bold"/>
    </style:style>
    <style:style style:name="T3" style:family="text">
      <style:text-properties fo:font-weight="bold" officeooo:rsid="001e8afd"/>
    </style:style>
    <style:style style:name="T4" style:family="text">
      <style:text-properties fo:font-weight="bold" loext:padding="0cm" loext:border="none"/>
    </style:style>
    <style:style style:name="T5" style:family="text">
      <style:text-properties fo:font-weight="normal" officeooo:rsid="000e78bf" style:font-weight-asian="normal" style:font-weight-complex="normal"/>
    </style:style>
    <style:style style:name="T6" style:family="text">
      <style:text-properties fo:font-weight="normal" officeooo:rsid="003f35f7" style:font-weight-asian="normal" style:font-weight-complex="normal"/>
    </style:style>
    <style:style style:name="T7" style:family="text">
      <style:text-properties officeooo:rsid="00155e02"/>
    </style:style>
    <style:style style:name="T8" style:family="text">
      <style:text-properties fo:color="#0000ff" loext:opacity="100%"/>
    </style:style>
    <style:style style:name="T9" style:family="text">
      <style:text-properties fo:color="#0000ff" loext:opacity="100%" fo:font-weight="bold" style:font-weight-asian="bold" style:font-weight-complex="bold"/>
    </style:style>
    <style:style style:name="T10" style:family="text">
      <style:text-properties officeooo:rsid="001147d7"/>
    </style:style>
    <style:style style:name="T11" style:family="text">
      <style:text-properties officeooo:rsid="001e8afd"/>
    </style:style>
    <style:style style:name="T12" style:family="text">
      <style:text-properties style:font-name="Google Sans Text"/>
    </style:style>
    <style:style style:name="T13" style:family="text">
      <style:text-properties style:font-name="Google Sans Text" fo:font-weight="bold"/>
    </style:style>
    <style:style style:name="T14" style:family="text">
      <style:text-properties fo:color="#1f1f1f" loext:opacity="100%"/>
    </style:style>
    <style:style style:name="T15" style:family="text">
      <style:text-properties fo:color="#1f1f1f" loext:opacity="100%" style:font-name="Google Sans Text"/>
    </style:style>
    <style:style style:name="T16" style:family="text">
      <style:text-properties fo:color="#1f1f1f" loext:opacity="100%" style:font-name="Google Sans Text" loext:padding="0cm" loext:border="none"/>
    </style:style>
    <style:style style:name="T17" style:family="text">
      <style:text-properties fo:color="#1f1f1f" loext:opacity="100%" style:font-name="Google Sans Text" fo:font-weight="bold" loext:padding="0cm" loext:border="none"/>
    </style:style>
    <style:style style:name="T18" style:family="text">
      <style:text-properties fo:color="#1f1f1f" loext:opacity="100%" style:font-name="Google Sans Text" fo:font-style="italic" loext:padding="0cm" loext:border="none"/>
    </style:style>
    <style:style style:name="T19" style:family="text">
      <style:text-properties fo:color="#1f1f1f" loext:opacity="100%" style:font-name="Google Sans"/>
    </style:style>
    <style:style style:name="T20" style:family="text">
      <style:text-properties style:font-name="Google Sans"/>
    </style:style>
    <style:style style:name="T21" style:family="text">
      <style:text-properties fo:font-variant="normal" fo:text-transform="none" fo:color="#000000" loext:opacity="55%" style:font-name="Google Sans Text" fo:font-size="11.25pt" fo:font-style="normal" fo:font-weight="normal" loext:padding="0cm" loext:border="none"/>
    </style:style>
    <style:style style:name="T22" style:family="text">
      <style:text-properties officeooo:rsid="0028a833"/>
    </style:style>
    <style:style style:name="T23" style:family="text">
      <style:text-properties style:font-name="FreeMono" fo:font-size="10pt" fo:font-weight="bold" fo:background-color="transparent" loext:char-shading-value="0" style:font-size-asian="10pt" style:font-weight-asian="bold" style:font-size-complex="10pt" style:font-weight-complex="bold"/>
    </style:style>
    <style:style style:name="T24" style:family="text">
      <style:text-properties fo:background-color="transparent" loext:char-shading-value="0"/>
    </style:style>
    <style:style style:name="T25" style:family="text">
      <style:text-properties officeooo:rsid="002e71e3"/>
    </style:style>
    <style:style style:name="T26" style:family="text">
      <style:text-properties officeooo:rsid="002fad0d"/>
    </style:style>
    <style:style style:name="T27" style:family="text">
      <style:text-properties style:font-name="Ubuntu Sans1" fo:font-size="13pt" style:font-size-asian="13pt" style:font-size-complex="13pt"/>
    </style:style>
    <style:style style:name="T28" style:family="text">
      <style:text-properties style:font-name="Ubuntu Sans1" fo:font-size="13pt" officeooo:rsid="002e71e3" style:font-size-asian="13pt" style:font-size-complex="13pt"/>
    </style:style>
    <style:style style:name="T29" style:family="text">
      <style:text-properties style:font-name="Ubuntu Sans1" fo:font-size="13pt" fo:font-weight="normal" style:font-size-asian="13pt" style:font-weight-asian="normal" style:font-size-complex="13pt" style:font-weight-complex="normal"/>
    </style:style>
    <style:style style:name="T30" style:family="text">
      <style:text-properties style:font-name="Ubuntu Sans1" fo:font-size="13pt" fo:font-weight="normal" officeooo:rsid="002fad0d" style:font-size-asian="13pt" style:font-weight-asian="normal" style:font-size-complex="13pt" style:font-weight-complex="normal"/>
    </style:style>
    <style:style style:name="T31" style:family="text">
      <style:text-properties style:font-name="Ubuntu Sans1" fo:font-size="13pt" fo:font-weight="normal" officeooo:rsid="003252f3" style:font-size-asian="13pt" style:font-weight-asian="normal" style:font-size-complex="13pt" style:font-weight-complex="normal"/>
    </style:style>
    <style:style style:name="T32" style:family="text">
      <style:text-properties officeooo:rsid="003252f3"/>
    </style:style>
    <style:style style:name="T33" style:family="text">
      <style:text-properties officeooo:rsid="0033e753"/>
    </style:style>
    <style:style style:name="T34" style:family="text">
      <style:text-properties officeooo:rsid="00350b9d"/>
    </style:style>
    <style:style style:name="T35" style:family="text">
      <style:text-properties officeooo:rsid="0036fb3a"/>
    </style:style>
    <style:style style:name="T36" style:family="text">
      <style:text-properties officeooo:rsid="0037d385"/>
    </style:style>
    <style:style style:name="T37" style:family="text">
      <style:text-properties officeooo:rsid="0037d798"/>
    </style:style>
    <style:style style:name="T38" style:family="text">
      <style:text-properties officeooo:rsid="003829cf"/>
    </style:style>
    <style:style style:name="T39" style:family="text">
      <style:text-properties officeooo:rsid="00387ecd"/>
    </style:style>
    <style:style style:name="T40" style:family="text">
      <style:text-properties officeooo:rsid="0039233e"/>
    </style:style>
    <style:style style:name="T41" style:family="text">
      <style:text-properties officeooo:rsid="003b50a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8">==================================================</text:p>
      <text:p text:style-name="P7">SISTEM PDS317</text:p>
      <text:p text:style-name="P7">Technical Module Manual</text:p>
      <text:p text:style-name="P7"><text:s/><text:span text:style-name="T9">==================================================</text:span> </text:p>
      <text:p text:style-name="P6"/>
      <text:p text:style-name="P6"/>
      <text:p text:style-name="P6"/>
      <text:p text:style-name="P6"/>
      <text:p text:style-name="P5"/>
      <text:p text:style-name="P6"><draw:frame draw:style-name="fr1" draw:name="Figura1" text:anchor-type="char" svg:width="15.397cm" svg:height="9.989cm" draw:z-index="0"><draw:image xlink:href="Pictures/100000010000059B000003A3016C542F.png" xlink:type="simple" xlink:show="embed" xlink:actuate="onLoad" draw:mime-type="image/png"/></draw:frame></text:p>
      <text:p text:style-name="P5"/>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Aut<text:span text:style-name="T41">h</text:span>or: pdsilva<text:span text:style-name="T10">(aka pgordao)</text:span></text:p>
      <text:p text:style-name="P5">Dat<text:span text:style-name="T41">e</text:span>: J<text:span text:style-name="T41">uly</text:span> 2026 </text:p>
      <text:p text:style-name="P5">Vers<text:span text:style-name="T41">i</text:span>o<text:span text:style-name="T41">n</text:span>: 1.0</text:p>
      <text:p text:style-name="P93"><text:alphabetical-index-mark text:string-value="teste"/>Í<text:span text:style-name="T25">ndice</text:span></text:p>
      <text:p text:style-name="P94"><text:alphabetical-index-mark text:string-value="teste"/></text:p>
      <text:h text:style-name="P64" text:outline-level="1"><text:span text:style-name="T27">1. General Module Specifications</text:span></text:h>
      <text:p text:style-name="P89"><text:span text:style-name="T27">1.1 Total Capacity and Bus Organization (16-bit)<text:tab/></text:span><text:span text:style-name="T28">3</text:span></text:p>
      <text:p text:style-name="P89"><text:span text:style-name="T31">1.2 </text:span><text:span text:style-name="T29">Operating Voltages and Estimated Current Consumption<text:tab/></text:span><text:span text:style-name="T30">4</text:span></text:p>
      <text:p text:style-name="P78"/>
      <text:h text:style-name="P65" text:outline-level="2">2. Electrical Architecture and Bus Distribution</text:h>
      <text:p text:style-name="P78">2.1 Memory Bank Organization: LOW Bank and HIGH Bank<text:tab/><text:span text:style-name="T32">5</text:span></text:p>
      <text:p text:style-name="P79"><text:span text:style-name="T32">2.2</text:span> 16-Bit Bus Alignment (Interleaved Organization)<text:tab/><text:span text:style-name="T32">6</text:span></text:p>
      <text:p text:style-name="P80">2.<text:span text:style-name="T33">3</text:span> Segmented / Paged Memory Organization (8-Bit Systems)<text:tab/><text:span text:style-name="T33">7</text:span></text:p>
      <text:p text:style-name="P81">2.<text:span text:style-name="T34">4</text:span> MC68000 Control Signals: /LDS, /UDS, and /AS<text:tab/><text:span text:style-name="T34">8</text:span></text:p>
      <text:p text:style-name="P82"/>
      <text:h text:style-name="P66" text:outline-level="2">3. Layout Engineering and Signal Integrity</text:h>
      <text:p text:style-name="P82">3.1. Power Rail Dimensioning (<text:span text:style-name="T11">1</text:span> mm VCC and GND Traces)<text:tab/><text:span text:style-name="T35">10</text:span></text:p>
      <text:p text:style-name="P83"/>
      <text:h text:style-name="P67" text:outline-level="2">4. Backplane Interface and Configurations</text:h>
      <text:p text:style-name="P83">4.1. DIN 41612 Connector Pinout (Memory Slot)<text:tab/><text:span text:style-name="T36">11</text:span></text:p>
      <text:p text:style-name="P84">4.2. Configuration Jumper Map (ROM/RAM Selection)<text:tab/><text:span text:style-name="T37">14</text:span></text:p>
      <text:p text:style-name="P83"/>
      <text:h text:style-name="P67" text:outline-level="2">5. Address Decoding Logic and Chip Select (/CS)</text:h>
      <text:p text:style-name="P83">5.1. Address Decoding Subsystem (74HC138)<text:tab/><text:span text:style-name="T38">16</text:span></text:p>
      <text:p text:style-name="P84"/>
      <text:h text:style-name="P68" text:outline-level="2">6. Diagnostics and Bench Testing</text:h>
      <text:p text:style-name="P84">6.1. Essential On-Board Test Points (TP)<text:tab/><text:span text:style-name="T39">18</text:span></text:p>
      <text:p text:style-name="P84">6.2. 68k Assembly Routine for Memory March Test (RAM Test)<text:tab/><text:span text:style-name="T40">18</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0"/>
      <text:h text:style-name="Heading_20_1" text:outline-level="1">1. General Module Specifications</text:h>
      <text:h text:style-name="Heading_20_2" text:outline-level="2">1.1. Total Capacity and Bus Organization (16-bit)</text:h>
      <text:p text:style-name="P45">The <text:span text:style-name="T1">PDS317</text:span> system architecture supports a maximum addressable workspace of <text:span text:style-name="T1">8 MBytes (4 MWords)</text:span> of Static RAM. In the current <text:span text:style-name="T1">Revision 1.0</text:span> hardware release, the memory board is partially populated with <text:span text:style-name="T1">1 MByte</text:span> of active RAM.</text:p>
      <text:p text:style-name="P46">For non-volatile firmware storage, the system decodes a dedicated <text:span text:style-name="T1">1 MByte</text:span> address space for ROM. The initial <text:span text:style-name="T1">Revision 1.0</text:span> assembly utilizes a <text:span text:style-name="T1">64 KByte (32 KWords)</text:span> ROM chip, mapped appropriately for system initialization and boot vectors.</text:p>
      <text:h text:style-name="P18" text:outline-level="3">Orion68K Memory Map (Initial Release)</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5"><text:span text:style-name="Strong_20_Emphasis"><text:span text:style-name="T12">Address Range (Hex)</text:span></text:span></text:p>
            </table:table-cell>
            <table:table-cell table:style-name="Table1.A1" office:value-type="string">
              <text:p text:style-name="P33"><text:span text:style-name="Strong_20_Emphasis"><text:span text:style-name="T12">Size (Words)</text:span></text:span></text:p>
            </table:table-cell>
            <table:table-cell table:style-name="Table1.A1" office:value-type="string">
              <text:p text:style-name="P33"><text:span text:style-name="Strong_20_Emphasis"><text:span text:style-name="T12">Resource Type</text:span></text:span></text:p>
            </table:table-cell>
            <table:table-cell table:style-name="Table1.A1" office:value-type="string">
              <text:p text:style-name="P33"><text:span text:style-name="Strong_20_Emphasis"><text:span text:style-name="T12">Population Status</text:span></text:span></text:p>
            </table:table-cell>
          </table:table-row>
        </table:table-header-rows>
        <table:table-row table:style-name="Table1.2">
          <table:table-cell table:style-name="Table1.A1" office:value-type="string">
            <text:p text:style-name="P36"><text:span text:style-name="Source_20_Text"><text:span text:style-name="T12">$000000</text:span></text:span><text:span text:style-name="T12"> – </text:span><text:span text:style-name="Source_20_Text"><text:span text:style-name="T12">$07FFFF</text:span></text:span></text:p>
          </table:table-cell>
          <table:table-cell table:style-name="Table1.A1" office:value-type="string">
            <text:p text:style-name="P44">512 KW</text:p>
          </table:table-cell>
          <table:table-cell table:style-name="Table1.A1" office:value-type="string">
            <text:p text:style-name="P44">ROM Space</text:p>
          </table:table-cell>
          <table:table-cell table:style-name="Table1.A1" office:value-type="string">
            <text:p text:style-name="P47">Populated (64 KB <text:soft-page-break/>Active)</text:p>
          </table:table-cell>
        </table:table-row>
        <table:table-row>
          <table:table-cell table:style-name="Table1.A1" office:value-type="string">
            <text:p text:style-name="P31"><text:span text:style-name="Source_20_Text"><text:span text:style-name="T12">$080000</text:span></text:span><text:span text:style-name="T12"> – </text:span><text:span text:style-name="Source_20_Text"><text:span text:style-name="T12">$0FFFFF</text:span></text:span></text:p>
          </table:table-cell>
          <table:table-cell table:style-name="Table1.A1" office:value-type="string">
            <text:p text:style-name="P44">512 KW</text:p>
          </table:table-cell>
          <table:table-cell table:style-name="Table1.A1" office:value-type="string">
            <text:p text:style-name="P44">RAM Bank 0</text:p>
          </table:table-cell>
          <table:table-cell table:style-name="Table1.A1" office:value-type="string">
            <text:p text:style-name="P47">Populated (1 MB Active)</text:p>
          </table:table-cell>
        </table:table-row>
        <table:table-row>
          <table:table-cell table:style-name="Table1.A1" office:value-type="string">
            <text:p text:style-name="P31"><text:span text:style-name="Source_20_Text"><text:span text:style-name="T12">$100000</text:span></text:span><text:span text:style-name="T12"> – </text:span><text:span text:style-name="Source_20_Text"><text:span text:style-name="T12">$17FFFF</text:span></text:span></text:p>
          </table:table-cell>
          <table:table-cell table:style-name="Table1.A1" office:value-type="string">
            <text:p text:style-name="P44">512 KW</text:p>
          </table:table-cell>
          <table:table-cell table:style-name="Table1.A1" office:value-type="string">
            <text:p text:style-name="P44">RAM Bank 1</text:p>
          </table:table-cell>
          <table:table-cell table:style-name="Table1.A1" office:value-type="string">
            <text:p text:style-name="P44">Unpopulated</text:p>
          </table:table-cell>
        </table:table-row>
        <table:table-row>
          <table:table-cell table:style-name="Table1.A1" office:value-type="string">
            <text:p text:style-name="P31"><text:span text:style-name="Source_20_Text"><text:span text:style-name="T12">$180000</text:span></text:span><text:span text:style-name="T12"> – </text:span><text:span text:style-name="Source_20_Text"><text:span text:style-name="T12">$1FFFFF</text:span></text:span></text:p>
          </table:table-cell>
          <table:table-cell table:style-name="Table1.A1" office:value-type="string">
            <text:p text:style-name="P44">512 KW</text:p>
          </table:table-cell>
          <table:table-cell table:style-name="Table1.A1" office:value-type="string">
            <text:p text:style-name="P44">RAM Bank 2</text:p>
          </table:table-cell>
          <table:table-cell table:style-name="Table1.A1" office:value-type="string">
            <text:p text:style-name="P44">Unpopulated</text:p>
          </table:table-cell>
        </table:table-row>
        <table:table-row>
          <table:table-cell table:style-name="Table1.A1" office:value-type="string">
            <text:p text:style-name="P31"><text:span text:style-name="Source_20_Text"><text:span text:style-name="T12">$200000</text:span></text:span><text:span text:style-name="T12"> – </text:span><text:span text:style-name="Source_20_Text"><text:span text:style-name="T12">$27FFFF</text:span></text:span></text:p>
          </table:table-cell>
          <table:table-cell table:style-name="Table1.A1" office:value-type="string">
            <text:p text:style-name="P44">512 KW</text:p>
          </table:table-cell>
          <table:table-cell table:style-name="Table1.A1" office:value-type="string">
            <text:p text:style-name="P44">RAM Bank 3</text:p>
          </table:table-cell>
          <table:table-cell table:style-name="Table1.A1" office:value-type="string">
            <text:p text:style-name="P44">Unpopulated</text:p>
          </table:table-cell>
        </table:table-row>
        <table:table-row>
          <table:table-cell table:style-name="Table1.A1" office:value-type="string">
            <text:p text:style-name="P31"><text:span text:style-name="Source_20_Text"><text:span text:style-name="T12">$280000</text:span></text:span><text:span text:style-name="T12"> – </text:span><text:span text:style-name="Source_20_Text"><text:span text:style-name="T12">$2FFFFF</text:span></text:span></text:p>
          </table:table-cell>
          <table:table-cell table:style-name="Table1.A1" office:value-type="string">
            <text:p text:style-name="P44">512 KW</text:p>
          </table:table-cell>
          <table:table-cell table:style-name="Table1.A1" office:value-type="string">
            <text:p text:style-name="P44">RAM Bank 4</text:p>
          </table:table-cell>
          <table:table-cell table:style-name="Table1.A1" office:value-type="string">
            <text:p text:style-name="P44">Unpopulated</text:p>
          </table:table-cell>
        </table:table-row>
        <table:table-row>
          <table:table-cell table:style-name="Table1.A1" office:value-type="string">
            <text:p text:style-name="P31"><text:span text:style-name="Source_20_Text"><text:span text:style-name="T12">$300000</text:span></text:span><text:span text:style-name="T12"> – </text:span><text:span text:style-name="Source_20_Text"><text:span text:style-name="T12">$37FFFF</text:span></text:span></text:p>
          </table:table-cell>
          <table:table-cell table:style-name="Table1.A1" office:value-type="string">
            <text:p text:style-name="P44">512 KW</text:p>
          </table:table-cell>
          <table:table-cell table:style-name="Table1.A1" office:value-type="string">
            <text:p text:style-name="P44">RAM Bank 5</text:p>
          </table:table-cell>
          <table:table-cell table:style-name="Table1.A1" office:value-type="string">
            <text:p text:style-name="P44">Unpopulated</text:p>
          </table:table-cell>
        </table:table-row>
        <table:table-row>
          <table:table-cell table:style-name="Table1.A1" office:value-type="string">
            <text:p text:style-name="P31"><text:span text:style-name="Source_20_Text"><text:span text:style-name="T12">$380000</text:span></text:span><text:span text:style-name="T12"> – </text:span><text:span text:style-name="Source_20_Text"><text:span text:style-name="T12">$3FFFFF</text:span></text:span></text:p>
          </table:table-cell>
          <table:table-cell table:style-name="Table1.A1" office:value-type="string">
            <text:p text:style-name="P44">512 KW</text:p>
          </table:table-cell>
          <table:table-cell table:style-name="Table1.A1" office:value-type="string">
            <text:p text:style-name="P44">RAM Bank 6</text:p>
          </table:table-cell>
          <table:table-cell table:style-name="Table1.A1" office:value-type="string">
            <text:p text:style-name="P44">Unpopulated</text:p>
          </table:table-cell>
        </table:table-row>
        <table:table-row>
          <table:table-cell table:style-name="Table1.A1" office:value-type="string">
            <text:p text:style-name="P31"><text:span text:style-name="Source_20_Text"><text:span text:style-name="T12">$400000</text:span></text:span><text:span text:style-name="T12"> – </text:span><text:span text:style-name="Source_20_Text"><text:span text:style-name="T12">$47FFFF</text:span></text:span></text:p>
          </table:table-cell>
          <table:table-cell table:style-name="Table1.A1" office:value-type="string">
            <text:p text:style-name="P44">512 KW</text:p>
          </table:table-cell>
          <table:table-cell table:style-name="Table1.A1" office:value-type="string">
            <text:p text:style-name="P44">RAM Bank 7</text:p>
          </table:table-cell>
          <table:table-cell table:style-name="Table1.A1" office:value-type="string">
            <text:p text:style-name="P44">Unpopulated</text:p>
          </table:table-cell>
        </table:table-row>
        <table:table-row>
          <table:table-cell table:style-name="Table1.A1" office:value-type="string">
            <text:p text:style-name="P31"><text:span text:style-name="Source_20_Text"><text:span text:style-name="T12">$480000</text:span></text:span><text:span text:style-name="T12"> – </text:span><text:span text:style-name="Source_20_Text"><text:span text:style-name="T12">$4FFFFF</text:span></text:span></text:p>
          </table:table-cell>
          <table:table-cell table:style-name="Table1.A1" office:value-type="string">
            <text:p text:style-name="P44">512 KW</text:p>
          </table:table-cell>
          <table:table-cell table:style-name="Table1.A1" office:value-type="string">
            <text:p text:style-name="P44">RAM Bank 8</text:p>
          </table:table-cell>
          <table:table-cell table:style-name="Table1.A1" office:value-type="string">
            <text:p text:style-name="P44">Unpopulated</text:p>
          </table:table-cell>
        </table:table-row>
        <table:table-row>
          <table:table-cell table:style-name="Table1.A1" office:value-type="string">
            <text:p text:style-name="P31"><text:span text:style-name="Source_20_Text"><text:span text:style-name="T12">$500000</text:span></text:span><text:span text:style-name="T12"> – </text:span><text:span text:style-name="Source_20_Text"><text:span text:style-name="T12">$57FFFF</text:span></text:span></text:p>
          </table:table-cell>
          <table:table-cell table:style-name="Table1.A1" office:value-type="string">
            <text:p text:style-name="P44">512 KW</text:p>
          </table:table-cell>
          <table:table-cell table:style-name="Table1.A1" office:value-type="string">
            <text:p text:style-name="P44">RAM Bank 9</text:p>
          </table:table-cell>
          <table:table-cell table:style-name="Table1.A1" office:value-type="string">
            <text:p text:style-name="P44">Unpopulated</text:p>
          </table:table-cell>
        </table:table-row>
        <table:table-row>
          <table:table-cell table:style-name="Table1.A1" office:value-type="string">
            <text:p text:style-name="P31"><text:span text:style-name="Source_20_Text"><text:span text:style-name="T12">$580000</text:span></text:span><text:span text:style-name="T12"> – </text:span><text:span text:style-name="Source_20_Text"><text:span text:style-name="T12">$5FFFFF</text:span></text:span></text:p>
          </table:table-cell>
          <table:table-cell table:style-name="Table1.A1" office:value-type="string">
            <text:p text:style-name="P44">512 KW</text:p>
          </table:table-cell>
          <table:table-cell table:style-name="Table1.A1" office:value-type="string">
            <text:p text:style-name="P44">RAM Bank 10</text:p>
          </table:table-cell>
          <table:table-cell table:style-name="Table1.A1" office:value-type="string">
            <text:p text:style-name="P44">Unpopulated</text:p>
          </table:table-cell>
        </table:table-row>
      </table:table>
      <text:h text:style-name="Heading_20_3" text:outline-level="3"/>
      <text:h text:style-name="P16" text:outline-level="3">1. <text:s text:c="5"/><text:span text:style-name="T26">1.</text:span>2 Operating Voltages and Estimated Current Consumption</text:h>
      <text:p text:style-name="P24"/>
      <text:p text:style-name="P51"><text:soft-page-break/>Component Specifications</text:p>
      <text:p text:style-name="P26"/>
      <text:p text:style-name="P50">SRAM (Static RAM)</text:p>
      <text:list text:style-name="L1">
        <text:list-item>
          <text:p text:style-name="P99"><text:span text:style-name="T1">Component:</text:span> AS6C4008 (Maximum of 8 units)</text:p>
        </text:list-item>
        <text:list-item>
          <text:p text:style-name="P99"><text:span text:style-name="T1">Voltage Range:</text:span> 2.7V to 5.5V (Nominal: 5V)</text:p>
        </text:list-item>
        <text:list-item>
          <text:p text:style-name="P99"><text:span text:style-name="T1">Speed:</text:span> 55 ns</text:p>
        </text:list-item>
        <text:list-item>
          <text:p text:style-name="P99"><text:span text:style-name="T1">Operating Temperature:</text:span> -40°C to +85°C</text:p>
        </text:list-item>
        <text:list-item>
          <text:p text:style-name="P99"><text:span text:style-name="T1">Current Consumption (per unit):</text:span> 30 mA (Max)</text:p>
        </text:list-item>
      </text:list>
      <text:p text:style-name="P50">EEPROM (ROM)</text:p>
      <text:list text:style-name="L2">
        <text:list-item>
          <text:p text:style-name="P100"><text:span text:style-name="T1">Component:</text:span> AT28C256 (Maximum of 2 units)</text:p>
        </text:list-item>
        <text:list-item>
          <text:p text:style-name="P100"><text:span text:style-name="T1">Voltage Range:</text:span> 5V ± 10%</text:p>
        </text:list-item>
        <text:list-item>
          <text:p text:style-name="P100"><text:span text:style-name="T1">Speed:</text:span> 150 ns</text:p>
        </text:list-item>
        <text:list-item>
          <text:p text:style-name="P100"><text:span text:style-name="T1">Operating Temperature:</text:span> -55°C to +125°C</text:p>
        </text:list-item>
        <text:list-item>
          <text:p text:style-name="P100"><text:span text:style-name="T1">Current Consumption (per unit):</text:span> 50 mA (Max)</text:p>
        </text:list-item>
      </text:list>
      <text:p text:style-name="P26"/>
      <text:h text:style-name="P25" text:outline-level="3">Estimated Maximum Power Consumption</text:h>
      <text:p text:style-name="Text_20_body">A tabela abaixo apresenta o cálculo do consumo estimado da placa populada em sua capacidade máxima de memória.</text:p>
      <text:p text:style-name="P26"/>
      <text:p text:style-name="P26"/>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7"><text:span text:style-name="Strong_20_Emphasis"><text:span text:style-name="T16">Component Type</text:span></text:span></text:p>
            </table:table-cell>
            <table:table-cell table:style-name="Table2.A1" office:value-type="string">
              <text:p text:style-name="P27"><text:span text:style-name="Strong_20_Emphasis"><text:span text:style-name="T16">Part Number</text:span></text:span></text:p>
            </table:table-cell>
            <table:table-cell table:style-name="Table2.A1" office:value-type="string">
              <text:p text:style-name="P27"><text:span text:style-name="Strong_20_Emphasis"><text:span text:style-name="T16">Unit Current</text:span></text:span></text:p>
            </table:table-cell>
            <table:table-cell table:style-name="Table2.A1" office:value-type="string">
              <text:p text:style-name="P27"><text:span text:style-name="Strong_20_Emphasis"><text:span text:style-name="T16">Max Qty</text:span></text:span></text:p>
            </table:table-cell>
            <table:table-cell table:style-name="Table2.A1" office:value-type="string">
              <text:p text:style-name="P27"><text:span text:style-name="Strong_20_Emphasis"><text:span text:style-name="T16">Total Current (Max)</text:span></text:span></text:p>
            </table:table-cell>
          </table:table-row>
        </table:table-header-rows>
        <table:table-row>
          <table:table-cell table:style-name="Table2.A1" office:value-type="string">
            <text:p text:style-name="P20">SRAM</text:p>
          </table:table-cell>
          <table:table-cell table:style-name="Table2.A1" office:value-type="string">
            <text:p text:style-name="P21">AS6C4008</text:p>
          </table:table-cell>
          <table:table-cell table:style-name="Table2.A1" office:value-type="string">
            <text:p text:style-name="P21">30 mA</text:p>
          </table:table-cell>
          <table:table-cell table:style-name="Table2.A1" office:value-type="string">
            <text:p text:style-name="P21">8</text:p>
          </table:table-cell>
          <table:table-cell table:style-name="Table2.A1" office:value-type="string">
            <text:p text:style-name="P21">240 mA</text:p>
          </table:table-cell>
        </table:table-row>
        <table:table-row>
          <table:table-cell table:style-name="Table2.A1" office:value-type="string">
            <text:p text:style-name="P20">EEPROM</text:p>
          </table:table-cell>
          <table:table-cell table:style-name="Table2.A1" office:value-type="string">
            <text:p text:style-name="P21">AT28C256</text:p>
          </table:table-cell>
          <table:table-cell table:style-name="Table2.A1" office:value-type="string">
            <text:p text:style-name="P21">50 mA</text:p>
          </table:table-cell>
          <table:table-cell table:style-name="Table2.A1" office:value-type="string">
            <text:p text:style-name="P21">2</text:p>
          </table:table-cell>
          <table:table-cell table:style-name="Table2.A1" office:value-type="string">
            <text:p text:style-name="P21">100 mA</text:p>
          </table:table-cell>
        </table:table-row>
        <table:table-row>
          <table:table-cell table:style-name="Table2.A1" office:value-type="string">
            <text:p text:style-name="P20">Total (Memory Subsystem)</text:p>
          </table:table-cell>
          <table:table-cell table:style-name="Table2.A1" office:value-type="string">
            <text:p text:style-name="P23">—</text:p>
          </table:table-cell>
          <table:table-cell table:style-name="Table2.A1" office:value-type="string">
            <text:p text:style-name="P23">—</text:p>
          </table:table-cell>
          <table:table-cell table:style-name="Table2.A1" office:value-type="string">
            <text:p text:style-name="P23">—</text:p>
          </table:table-cell>
          <table:table-cell table:style-name="Table2.A1" office:value-type="string">
            <text:p text:style-name="P20">340 mA</text:p>
          </table:table-cell>
        </table:table-row>
      </table:table>
      <text:p text:style-name="P26"/>
      <text:p text:style-name="P26"><text:span text:style-name="T1">Note:</text:span> O consumo total acima reflete apenas o subsistema de memória operando em capacidade máxima. Certifique-se de que a linha de +5V da fonte de alimentação do sistema <text:soft-page-break/>possui uma margem de segurança de pelo menos 20% acima do consumo total da placa somado aos demais periféricos (como CPU e controladores de I/O).</text:p>
      <text:p text:style-name="P26"/>
      <text:p text:style-name="P26"/>
      <text:p text:style-name="P26"/>
      <text:p text:style-name="P26"/>
      <text:p text:style-name="P26"/>
      <text:h text:style-name="Heading_20_2" text:outline-level="2">2. Electrical Architecture and Bus Distribution</text:h>
      <text:h text:style-name="P72" text:outline-level="3">2.1. Memory Bank Organization: LOW Bank and HIGH Bank</text:h>
      <text:p text:style-name="P45">Organizing memory into <text:span text:style-name="T1">LOW Bank</text:span> and <text:span text:style-name="T1">HIGH Bank</text:span> is a classic and elegant engineering solution. It is most commonly used in <text:span text:style-name="T1">16-bit architectures</text:span> (such as the Motorola 68000 or Intel 8086) to allow a 16-bit CPU to talk to 8-bit memory chips efficiently, or in <text:span text:style-name="T1">banking/paging systems</text:span> to overcome address space limitations.</text:p>
      <text:p text:style-name="P45">Since the PDS317 uses 8-bit chips (the AS6C4008 is a 512K x 8 SRAM and the AT28C256 is a 32K x 8 EEPROM), dividing them into <text:span text:style-name="T1">LOW</text:span> and <text:span text:style-name="T1">HIGH</text:span> banks is the standard way to achieve a wider data path or structural memory segmentation.</text:p>
      <text:p text:style-name="P45">Here is a professional, technical breakdown of this topic in English, tailored for your hardware manual:</text:p>
      <text:h text:style-name="P17" text:outline-level="2">Memory Bank Organization: LOW Bank and HIGH Bank</text:h>
      <text:p text:style-name="P45">In computer architecture, organizing memory into <text:span text:style-name="T1">LOW Bank</text:span> and <text:span text:style-name="T1">HIGH Bank</text:span> is a <text:s/>technique used to align physical memory chips with the data bus width of the processor, or to segment memory spaces for specific architectural requirements.</text:p>
      <text:p text:style-name="P45">For a system utilizing 8-bit memory chips (such as the AS6C4008 SRAM and AT28C256 EEPROM), this organization typically serves one of two primary purposes: <text:span text:style-name="T1">16-Bit Interleaved Access</text:span> or <text:span text:style-name="T1">Address Space Paging</text:span>.</text:p>
      <text:h text:style-name="P18" text:outline-level="3"><text:soft-page-break/><text:span text:style-name="T32">2.2</text:span> 16-Bit Bus Alignment (Interleaved Organization)</text:h>
      <text:p text:style-name="P45">If the system CPU features a <text:span text:style-name="T1">16-bit data bus</text:span> but utilizes <text:span text:style-name="T1">8-bit wide memory chips</text:span>, the memory must be split into two parallel banks to allow the CPU to read or write a full 16-bit word in a single clock cycle.</text:p>
      <text:list text:style-name="L3">
        <text:list-item>
          <text:p text:style-name="P101">LOW Bank (Even Bank):</text:p>
          <text:list>
            <text:list-item>
              <text:p text:style-name="P103">Connects directly to the lower half of the data bus (<text:span text:style-name="T1">$D_0 - D_7$</text:span>).</text:p>
            </text:list-item>
            <text:list-item>
              <text:p text:style-name="P103">Contains all data located at <text:span text:style-name="T1">even memory addresses</text:span> ($0x00000$, $0x00002$, $0x00004$, etc.).</text:p>
            </text:list-item>
            <text:list-item>
              <text:p text:style-name="P107"><text:span text:style-name="T12">Activated when the CPU asserts the </text:span><text:span text:style-name="T13">Lower Data Strobe (LDS)</text:span><text:span text:style-name="T12"> or when the lowest address line ($A_0$) is </text:span><text:span text:style-name="Source_20_Text"><text:span text:style-name="T12">0</text:span></text:span><text:span text:style-name="T12">.</text:span></text:p>
            </text:list-item>
          </text:list>
        </text:list-item>
        <text:list-item>
          <text:p text:style-name="P101">HIGH Bank (Odd Bank):</text:p>
          <text:list>
            <text:list-item>
              <text:p text:style-name="P103">Connects directly to the upper half of the data bus (<text:span text:style-name="T1">$D_8 - D_{15}$</text:span>).</text:p>
            </text:list-item>
            <text:list-item>
              <text:p text:style-name="P103">Contains all data located at <text:span text:style-name="T1">odd memory addresses</text:span> ($0x00001$, $0x00003$, $0x00005$, etc.).</text:p>
            </text:list-item>
            <text:list-item>
              <text:p text:style-name="P103">Activated when the CPU asserts the <text:span text:style-name="T1">Upper Data Strobe (UDS)</text:span> or when a specific control line dictates an odd-byte access.</text:p>
            </text:list-item>
          </text:list>
        </text:list-item>
      </text:list>
      <text:h text:style-name="P19" text:outline-level="4">How It Works in Practice:</text:h>
      <text:list text:style-name="L4">
        <text:list-item>
          <text:p text:style-name="P104"><text:span text:style-name="T1">Byte Access (8-bit):</text:span> If the CPU only needs 1 byte, it activates either the LOW bank or the HIGH bank depending on whether the address is even or odd.</text:p>
        </text:list-item>
        <text:list-item>
          <text:p text:style-name="P104"><text:span text:style-name="T1">Word Access (16-bit):</text:span> If the CPU needs a full 16-bit word, it activates <text:span text:style-name="T1">both banks simultaneously</text:span>. The LOW bank provides the lower byte, and the HIGH bank provides the upper byte, merging into a single 16-bit transfer.</text:p>
        </text:list-item>
      </text:list>
      <text:h text:style-name="P18" text:outline-level="3">2.<text:span text:style-name="T33">3</text:span> Segmented / Paged Memory Organization (8-Bit Systems)</text:h>
      <text:p text:style-name="P45">If the PDS317 is a pure <text:span text:style-name="T1">8-bit system</text:span> (where both the CPU and the chips are 8-bit), "LOW Bank" and "HIGH Bank" refer to <text:span text:style-name="T1">address space segmentation</text:span>—often used to separate different types of data or to implement Bank Switching to bypass CPU addressing limits.</text:p>
      <text:list text:style-name="L5">
        <text:list-item>
          <text:p text:style-name="P102">LOW Bank (Base / System Memory):</text:p>
          <text:list>
            <text:list-item>
              <text:p text:style-name="P108"><text:soft-page-break/><text:span text:style-name="T12">Usually mapped to the lower part of the CPU’s address space (e.g., </text:span><text:span text:style-name="Source_20_Text"><text:span text:style-name="T12">$0000_h</text:span></text:span><text:span text:style-name="T12"> to </text:span><text:span text:style-name="Source_20_Text"><text:span text:style-name="T12">$7FFF_h$</text:span></text:span><text:span text:style-name="T12">).</text:span></text:p>
            </text:list-item>
            <text:list-item>
              <text:p text:style-name="P105">Typically holds critical, non-volatile code such as the system ROM/BIOS, vector tables, or primary system RAM that must always be accessible.</text:p>
            </text:list-item>
          </text:list>
        </text:list-item>
        <text:list-item>
          <text:p text:style-name="P102">HIGH Bank (Swappable / Extended Memory):</text:p>
          <text:list>
            <text:list-item>
              <text:p text:style-name="P108"><text:span text:style-name="T12">Mapped to the upper part of the address space (e.g., </text:span><text:span text:style-name="Source_20_Text"><text:span text:style-name="T12">$8000_h</text:span></text:span><text:span text:style-name="T12"> to </text:span><text:span text:style-name="Source_20_Text"><text:span text:style-name="T12">$FFFF_h$</text:span></text:span><text:span text:style-name="T12">).</text:span></text:p>
            </text:list-item>
            <text:list-item>
              <text:p text:style-name="P105">Often controlled by logic gates or a latch (Bank Switching). By toggling a control register, the CPU can "swap" different physical chips into this single logical space, allowing a CPU with a 64KB limit to access megabytes of RAM.</text:p>
            </text:list-item>
          </text:list>
        </text:list-item>
      </text:list>
      <text:h text:style-name="P18" text:outline-level="3">Application to the PDS317</text:h>
      <text:p text:style-name="P45">Given that your board supports a maximum of <text:span text:style-name="T1">8 RAM chips</text:span> and <text:span text:style-name="T1">2 ROM chips</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3"><text:span text:style-name="Strong_20_Emphasis"><text:span text:style-name="T12">Bank Designation</text:span></text:span></text:p>
            </table:table-cell>
            <table:table-cell table:style-name="Table3.A1" office:value-type="string">
              <text:p text:style-name="P33"><text:span text:style-name="Strong_20_Emphasis"><text:span text:style-name="T12">Hardware Mapping</text:span></text:span></text:p>
            </table:table-cell>
            <table:table-cell table:style-name="Table3.A1" office:value-type="string">
              <text:p text:style-name="P33"><text:span text:style-name="Strong_20_Emphasis"><text:span text:style-name="T12">Typical Function</text:span></text:span></text:p>
            </table:table-cell>
          </table:table-row>
        </table:table-header-rows>
        <table:table-row>
          <table:table-cell table:style-name="Table3.A1" office:value-type="string">
            <text:p text:style-name="P47">LOW Bank</text:p>
          </table:table-cell>
          <table:table-cell table:style-name="Table3.A1" office:value-type="string">
            <text:p text:style-name="P44">First set of SRAM/ROM chips</text:p>
          </table:table-cell>
          <table:table-cell table:style-name="Table3.A1" office:value-type="string">
            <text:p text:style-name="P44">Handles Even Bytes (16-bit mode) <text:span text:style-name="T1">OR</text:span> maps to Lower Address Space (8-bit mode).</text:p>
          </table:table-cell>
        </table:table-row>
        <table:table-row>
          <table:table-cell table:style-name="Table3.A1" office:value-type="string">
            <text:p text:style-name="P47">HIGH Bank</text:p>
          </table:table-cell>
          <table:table-cell table:style-name="Table3.A1" office:value-type="string">
            <text:p text:style-name="P44">Second set of SRAM/ROM chips</text:p>
          </table:table-cell>
          <table:table-cell table:style-name="Table3.A1" office:value-type="string">
            <text:p text:style-name="P44">Handles Odd Bytes (16-bit mode) <text:span text:style-name="T1">OR</text:span> maps to Upper Address Space/Paged Expansion (8-bit mode).</text:p>
          </table:table-cell>
        </table:table-row>
      </table:table>
      <text:h text:style-name="P28" text:outline-level="3"><text:soft-page-break/></text:h>
      <text:h text:style-name="P34" text:outline-level="3">⚠️ <text:span text:style-name="T20">Engineering Note</text:span></text:h>
      <text:p text:style-name="P43">When designing the PCB layout for LOW and HIGH banks, trace length matching for the data lines ($D_0-D_7$ vs $D_8-D_{15}$) and control signals (Chip Select $\overline{CS}$, Output Enable $\overline{OE}$) is critical to prevent propagation delays, ensuring both banks respond within the tight 55ns window of the AS6C4008 SRAM.</text:p>
      <text:p text:style-name="Text_20_body"/>
      <text:h text:style-name="Heading_20_3" text:outline-level="3">2.<text:span text:style-name="T34">4</text:span> MC68000 Control Signals: /LDS, /UDS, and /AS</text:h>
      <text:p text:style-name="P24"><text:span text:style-name="T15">To handle the 16-bit architecture we just discussed (dividing memory into </text:span><text:span text:style-name="T17">LOW/Even</text:span><text:span text:style-name="T15"> and </text:span><text:span text:style-name="T17">HIGH/Odd</text:span><text:span text:style-name="T15"> banks), the Motorola 68000 uses three critical control signals: Address Strobe (</text:span><text:span text:style-name="Source_20_Text"><text:span text:style-name="T21">/AS</text:span></text:span><text:span text:style-name="T15">), Upper Data Strobe (</text:span><text:span text:style-name="Source_20_Text"><text:span text:style-name="T21">/UDS</text:span></text:span><text:span text:style-name="T15">), and Lower Data Strobe (</text:span><text:span text:style-name="Source_20_Text"><text:span text:style-name="T21">/LDS</text:span></text:span><text:span text:style-name="T15">).</text:span></text:p>
      <text:section text:style-name="Sect1" text:name="model-response-message-contentr_ac499cf84c1ebf44">
        <text:p text:style-name="P24"><text:span text:style-name="T15">In the 68k world, the forward slash (</text:span><text:span text:style-name="Source_20_Text"><text:span text:style-name="T21">/</text:span></text:span><text:span text:style-name="T15">) or an overbar indicates an </text:span><text:span text:style-name="T17">active-low</text:span><text:span text:style-name="T15"> signal, meaning the line is considered "true" or "asserted" when its voltage drops to 0V (GND).</text:span></text:p>
        <text:p text:style-name="P22">Here is how these three signals work together to manage the bus and select your memory banks:</text:p>
        <text:list xml:id="list974853524" text:style-name="List_20_1">
          <text:list-item>
            <text:h text:style-name="P69" text:outline-level="2"><text:span text:style-name="T19"><text:s/>Address Strobe (</text:span><text:span text:style-name="Source_20_Text"><text:span text:style-name="T21">/AS</text:span></text:span><text:span text:style-name="T19">)</text:span></text:h>
          </text:list-item>
        </text:list>
        <text:p text:style-name="P24"><text:span text:style-name="T15">The </text:span><text:span text:style-name="Source_20_Text"><text:span text:style-name="T21">/AS</text:span></text:span><text:span text:style-name="T15"> signal is the CPU's way of saying: </text:span><text:span text:style-name="T18">"The address currently on the address bus ($A_1 - A_{23}$) is stable and valid. Go ahead and decode it."</text:span></text:p>
        <text:list text:style-name="L6">
          <text:list-item>
            <text:p text:style-name="P118"><text:span text:style-name="T4">Why it matters:</text:span> Because address lines don't all change state at the exact same picosecond, they "glitch" briefly when changing from one address to another.</text:p>
          </text:list-item>
          <text:list-item>
            <text:p text:style-name="P109"><text:span text:style-name="T17">The Fix:</text:span><text:span text:style-name="T15"> The 68000 waits until all address lines settle, then drops </text:span><text:span text:style-name="Source_20_Text"><text:span text:style-name="T21">/AS</text:span></text:span><text:span text:style-name="T15"> to low. Your memory decoding logic (like a GAL or discrete gates) should </text:span><text:span text:style-name="T17">always</text:span><text:span text:style-name="T15"> use </text:span><text:span text:style-name="Source_20_Text"><text:span text:style-name="T21">/AS</text:span></text:span><text:span text:style-name="T15"> as an enabling input to prevent the memory chips from accidentally reacting to those brief address glitches.</text:span></text:p>
          </text:list-item>
        </text:list>
        <text:list xml:id="list150112290373517" text:continue-list="list974853524" text:style-name="List_20_1">
          <text:list-item>
            <text:h text:style-name="P69" text:outline-level="2"><text:span text:style-name="T19"><text:s/>Upper Data Strobe (</text:span><text:span text:style-name="Source_20_Text"><text:span text:style-name="T21">/UDS</text:span></text:span><text:span text:style-name="T19">) and Lower Data Strobe (</text:span><text:span text:style-name="Source_20_Text"><text:span text:style-name="T21">/LDS</text:span></text:span><text:span text:style-name="T19">)</text:span></text:h>
          </text:list-item>
        </text:list>
        <text:p text:style-name="P22">These two signals are the magic sauce that allows a 16-bit CPU to talk to 8-bit memory banks. Because the 68000 can read or write either a single 8-bit byte or a full 16-bit word, it needs a way to tell the memory chips exactly which byte(s) it wants.</text:p>
        <text:p text:style-name="P24"><text:soft-page-break/><text:span text:style-name="T15">Notice that the MC68000 does not have an </text:span><text:span text:style-name="T16">$A_0$</text:span><text:span text:style-name="T15"> (bit 0) address pin! Instead, </text:span><text:span text:style-name="Source_20_Text"><text:span text:style-name="T21">/UDS</text:span></text:span><text:span text:style-name="T15"> and </text:span><text:span text:style-name="Source_20_Text"><text:span text:style-name="T21">/LDS</text:span></text:span><text:span text:style-name="T15"> replace </text:span><text:span text:style-name="T16">$A_0$</text:span><text:span text:style-name="T15"> to select between even and odd bytes.</text:span></text:p>
        <text:list text:style-name="L7">
          <text:list-item>
            <text:p text:style-name="P110"><text:span text:style-name="Source_20_Text"><text:span text:style-name="T21">/UDS</text:span></text:span><text:span text:style-name="T17"> (Upper Data Strobe):</text:span><text:span text:style-name="T15"> Automatically managed by the CPU to control the </text:span><text:span text:style-name="T17">HIGH Bank</text:span><text:span text:style-name="T15"> (Data lines </text:span><text:span text:style-name="T16">$D_8 - D_{15}$</text:span><text:span text:style-name="T15">). It targets </text:span><text:span text:style-name="T17">even addresses</text:span><text:span text:style-name="T15">.</text:span></text:p>
          </text:list-item>
          <text:list-item>
            <text:p text:style-name="P110"><text:span text:style-name="Source_20_Text"><text:span text:style-name="T21">/LDS</text:span></text:span><text:span text:style-name="T17"> (Lower Data Strobe):</text:span><text:span text:style-name="T15"> Automatically managed by the CPU to control the </text:span><text:span text:style-name="T17">LOW Bank</text:span><text:span text:style-name="T15"> (Data lines </text:span><text:span text:style-name="T16">$D_0 - D_7$</text:span><text:span text:style-name="T15">). It targets </text:span><text:span text:style-name="T17">odd addresses</text:span><text:span text:style-name="T15">.</text:span></text:p>
          </text:list-item>
        </text:list>
        <text:list text:continue-list="list150112290373517" text:style-name="List_20_1">
          <text:list-item>
            <text:h text:style-name="P69" text:outline-level="2"><text:span text:style-name="T19">How They Route to Your PDS317 Memory Banks</text:span></text:h>
          </text:list-item>
        </text:list>
        <text:p text:style-name="P24"><text:span text:style-name="T15">When connecting these to your 8-bit AS6C4008 SRAM or AT28C256 ROM chips, you use </text:span><text:span text:style-name="Source_20_Text"><text:span text:style-name="T21">/UDS</text:span></text:span><text:span text:style-name="T15"> and </text:span><text:span text:style-name="Source_20_Text"><text:span text:style-name="T21">/LDS</text:span></text:span><text:span text:style-name="T15"> to drive the Chip Select (</text:span><text:span text:style-name="Source_20_Text"><text:span text:style-name="T21">/CS</text:span></text:span><text:span text:style-name="T15">) or Output/Write Enable (</text:span><text:span text:style-name="Source_20_Text"><text:span text:style-name="T21">/OE</text:span></text:span><text:span text:style-name="T15">, </text:span><text:span text:style-name="Source_20_Text"><text:span text:style-name="T21">/WE</text:span></text:span><text:span text:style-name="T15">) lines of the respective banks.</text:span></text:p>
        <text:p text:style-name="P22">Here is the truth table of how the 68000 uses these signals during a bus cyc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7"><text:span text:style-name="Strong_20_Emphasis"><text:span text:style-name="T16">/AS</text:span></text:span></text:p>
              </table:table-cell>
              <table:table-cell table:style-name="Table4.A1" office:value-type="string">
                <text:p text:style-name="P27"><text:span text:style-name="Strong_20_Emphasis"><text:span text:style-name="T16">/UDS</text:span></text:span></text:p>
              </table:table-cell>
              <table:table-cell table:style-name="Table4.A1" office:value-type="string">
                <text:p text:style-name="P27"><text:span text:style-name="Strong_20_Emphasis"><text:span text:style-name="T16">/LDS</text:span></text:span></text:p>
              </table:table-cell>
              <table:table-cell table:style-name="Table4.A1" office:value-type="string">
                <text:p text:style-name="P27"><text:span text:style-name="Strong_20_Emphasis"><text:span text:style-name="T16">Bus Operation Type</text:span></text:span></text:p>
              </table:table-cell>
              <table:table-cell table:style-name="Table4.A1" office:value-type="string">
                <text:p text:style-name="P27"><text:span text:style-name="Strong_20_Emphasis"><text:span text:style-name="T16">Active Memory Bank</text:span></text:span></text:p>
              </table:table-cell>
              <table:table-cell table:style-name="Table4.A1" office:value-type="string">
                <text:p text:style-name="P27"><text:span text:style-name="Strong_20_Emphasis"><text:span text:style-name="T16">Active Data Bus Lines</text:span></text:span></text:p>
              </table:table-cell>
            </table:table-row>
          </table:table-header-rows>
          <table:table-row>
            <table:table-cell table:style-name="Table4.A1" office:value-type="string">
              <text:p text:style-name="P27"><text:span text:style-name="Source_20_Text"><text:span text:style-name="T21">1</text:span></text:span></text:p>
            </table:table-cell>
            <table:table-cell table:style-name="Table4.A1" office:value-type="string">
              <text:p text:style-name="P27"><text:span text:style-name="Source_20_Text"><text:span text:style-name="T21">X</text:span></text:span></text:p>
            </table:table-cell>
            <table:table-cell table:style-name="Table4.A1" office:value-type="string">
              <text:p text:style-name="P27"><text:span text:style-name="Source_20_Text"><text:span text:style-name="T21">X</text:span></text:span></text:p>
            </table:table-cell>
            <table:table-cell table:style-name="Table4.A1" office:value-type="string">
              <text:p text:style-name="P21"><text:span text:style-name="T1">None</text:span> (Address is invalid)</text:p>
            </table:table-cell>
            <table:table-cell table:style-name="Table4.A1" office:value-type="string">
              <text:p text:style-name="P21">None (Chips disabled)</text:p>
            </table:table-cell>
            <table:table-cell table:style-name="Table4.A1" office:value-type="string">
              <text:p text:style-name="P21">High Impedance (Tri-stated)</text:p>
            </table:table-cell>
          </table:table-row>
          <table:table-row>
            <table:table-cell table:style-name="Table4.A1" office:value-type="string">
              <text:p text:style-name="P27"><text:span text:style-name="Source_20_Text"><text:span text:style-name="T21">0</text:span></text:span></text:p>
            </table:table-cell>
            <table:table-cell table:style-name="Table4.A1" office:value-type="string">
              <text:p text:style-name="P27"><text:span text:style-name="Source_20_Text"><text:span text:style-name="T21">0</text:span></text:span></text:p>
            </table:table-cell>
            <table:table-cell table:style-name="Table4.A1" office:value-type="string">
              <text:p text:style-name="P27"><text:span text:style-name="Source_20_Text"><text:span text:style-name="T21">0</text:span></text:span></text:p>
            </table:table-cell>
            <table:table-cell table:style-name="Table4.A1" office:value-type="string">
              <text:p text:style-name="P20">16-bit Word Access</text:p>
            </table:table-cell>
            <table:table-cell table:style-name="Table4.A1" office:value-type="string">
              <text:p text:style-name="P21"><text:span text:style-name="T1">Both</text:span> HIGH and LOW Banks</text:p>
            </table:table-cell>
            <table:table-cell table:style-name="Table4.A1" office:value-type="string">
              <text:p text:style-name="P21">Full Bus ($D_0 - D_{15}$)</text:p>
            </table:table-cell>
          </table:table-row>
          <table:table-row>
            <table:table-cell table:style-name="Table4.A1" office:value-type="string">
              <text:p text:style-name="P27"><text:span text:style-name="Source_20_Text"><text:span text:style-name="T21">0</text:span></text:span></text:p>
            </table:table-cell>
            <table:table-cell table:style-name="Table4.A1" office:value-type="string">
              <text:p text:style-name="P27"><text:span text:style-name="Source_20_Text"><text:span text:style-name="T21">0</text:span></text:span></text:p>
            </table:table-cell>
            <table:table-cell table:style-name="Table4.A1" office:value-type="string">
              <text:p text:style-name="P27"><text:span text:style-name="Source_20_Text"><text:span text:style-name="T21">1</text:span></text:span></text:p>
            </table:table-cell>
            <table:table-cell table:style-name="Table4.A1" office:value-type="string">
              <text:p text:style-name="P21"><text:span text:style-name="T1">8-bit Byte Access</text:span> (Even Address)</text:p>
            </table:table-cell>
            <table:table-cell table:style-name="Table4.A1" office:value-type="string">
              <text:p text:style-name="P21"><text:span text:style-name="T1">HIGH Bank</text:span> only</text:p>
            </table:table-cell>
            <table:table-cell table:style-name="Table4.A1" office:value-type="string">
              <text:p text:style-name="P21">Upper Bus ($D_8 - D_{15}$)</text:p>
            </table:table-cell>
          </table:table-row>
          <table:table-row>
            <table:table-cell table:style-name="Table4.A1" office:value-type="string">
              <text:p text:style-name="P27"><text:span text:style-name="Source_20_Text"><text:span text:style-name="T21">0</text:span></text:span></text:p>
            </table:table-cell>
            <table:table-cell table:style-name="Table4.A1" office:value-type="string">
              <text:p text:style-name="P27"><text:span text:style-name="Source_20_Text"><text:span text:style-name="T21">1</text:span></text:span></text:p>
            </table:table-cell>
            <table:table-cell table:style-name="Table4.A1" office:value-type="string">
              <text:p text:style-name="P27"><text:span text:style-name="Source_20_Text"><text:span text:style-name="T21">0</text:span></text:span></text:p>
            </table:table-cell>
            <table:table-cell table:style-name="Table4.A1" office:value-type="string">
              <text:p text:style-name="P21"><text:span text:style-name="T1">8-bit Byte Access</text:span> (Odd Address)</text:p>
            </table:table-cell>
            <table:table-cell table:style-name="Table4.A1" office:value-type="string">
              <text:p text:style-name="P21"><text:span text:style-name="T1">LOW Bank</text:span> only</text:p>
            </table:table-cell>
            <table:table-cell table:style-name="Table4.A1" office:value-type="string">
              <text:p text:style-name="P21">Lower Bus ($D_0 - D_{7}$)</text:p>
            </table:table-cell>
          </table:table-row>
        </table:table>
        <text:list text:continue-numbering="true" text:style-name="List_20_1">
          <text:list-item>
            <text:h text:style-name="P74" text:outline-level="3"><text:span text:style-name="T14"><text:s/></text:span><text:span text:style-name="T19">Hardware Design Tip for your GAL Logic</text:span></text:h>
          </text:list-item>
        </text:list>
        <text:p text:style-name="P111"><text:span text:style-name="T15">When writing your equations for memory chip selection, you must combine your address decoding with these strobes. For example:</text:span></text:p>
        <text:list text:continue-numbering="true" text:style-name="List_20_1">
          <text:list-item>
            <text:p text:style-name="P112"><text:span text:style-name="T17">HIGH Bank RAM Select:</text:span><text:span text:style-name="T15"> Should only activate when the address matches your RAM range </text:span><text:span text:style-name="T17">AND</text:span><text:span text:style-name="T15"> </text:span><text:span text:style-name="Source_20_Text"><text:span text:style-name="T21">/AS</text:span></text:span><text:span text:style-name="T15"> is low </text:span><text:span text:style-name="T17">AND</text:span><text:span text:style-name="T15"> </text:span><text:span text:style-name="Source_20_Text"><text:span text:style-name="T21">/UDS</text:span></text:span><text:span text:style-name="T15"> is low.</text:span></text:p>
          </text:list-item>
          <text:list-item>
            <text:p text:style-name="P112"><text:soft-page-break/><text:span text:style-name="T17">LOW Bank RAM Select:</text:span><text:span text:style-name="T15"> Should only activate when the address matches your RAM range </text:span><text:span text:style-name="T17">AND</text:span><text:span text:style-name="T15"> </text:span><text:span text:style-name="Source_20_Text"><text:span text:style-name="T21">/AS</text:span></text:span><text:span text:style-name="T15"> is low </text:span><text:span text:style-name="T17">AND</text:span><text:span text:style-name="T15"> </text:span><text:span text:style-name="Source_20_Text"><text:span text:style-name="T21">/LDS</text:span></text:span><text:span text:style-name="T15"> is low.</text:span></text:p>
          </text:list-item>
        </text:list>
        <text:p text:style-name="P24"><text:span text:style-name="T15">If you don't factor </text:span><text:span text:style-name="Source_20_Text"><text:span text:style-name="T21">/UDS</text:span></text:span><text:span text:style-name="T15"> and </text:span><text:span text:style-name="Source_20_Text"><text:span text:style-name="T21">/LDS</text:span></text:span><text:span text:style-name="T15"> into your chip select logic during a </text:span><text:span text:style-name="T17">Write</text:span><text:span text:style-name="T15"> cycle, writing a single byte to an even address would accidentally overwrite the adjacent odd byte with bus garbage!</text:span></text:p>
      </text:section>
      <text:p text:style-name="Text_20_body"/>
      <text:h text:style-name="Heading_20_2" text:outline-level="2">3. Layout Engineering and Signal Integrity</text:h>
      <text:h text:style-name="Heading_20_3" text:outline-level="3">3.1. Power Rail Dimensioning (<text:span text:style-name="T11">1</text:span> mm VCC and GND Traces)</text:h>
      <text:p text:style-name="Quotations"><text:span text:style-name="T1">Engineering Note:</text:span> Unlike modern multi-layer PC motherboards that utilize dedicated internal power planes to distribute voltage with minimal resistance, the PDS100 RAM board is designed on a 2-layer PCB. In a 5V retrocomputing environment populated with high-density static RAM (SRAM) and logic chips, transient current spikes during simultaneous switching can cause severe ground bounce and VCC sagging if the traces are too narrow.</text:p>
      <text:p text:style-name="Quotations">To mitigate this without the luxury of internal power planes, a deliberate design choice was made to use robust <text:span text:style-name="T1"><text:s/></text:span><text:span text:style-name="T3">1</text:span><text:span text:style-name="T1">mm traces</text:span> for all primary VCC and GND routing. This significantly reduces DC resistance and trace inductance, acting as a low-impedance backbone across the entire 10-chip matrix. Combined with local decoupling, this heavy-duty copper layout guarantees stable voltage delivery, suppresses high-frequency power rail noise, and ensures the system operates like a tank even under heavy bus loads.</text:p>
      <text:h text:style-name="Heading_20_2" text:outline-level="2">4. Backplane Interface and Configurations</text:h>
      <text:h text:style-name="Heading_20_3" text:outline-level="3">4.1. DIN 41612 Connector Pinout (Memory Slot)</text:h>
      <text:h text:style-name="P14" text:outline-level="2">Architectural Advantages</text:h>
      <text:section text:style-name="Sect1" text:name="model-response-message-contentr_13d34e82a9f771e4">
        <text:p text:style-name="Text_20_body">The <text:span text:style-name="T1">DIN 41612 Eurocard connector standard</text:span> is widely recognized as the industry backbone for high-reliability modular systems, such as VMEbus, NuBus, and custom homebrew computer backplanes. For a 16-bit system like the MC68000, using a 3-row, 96-pin <text:span text:style-name="T1">DIN 41612 Type C</text:span> connector for the memory expansion slot provides critical mechanical and electrical advantages over standard pin headers.</text:p>
        <text:h text:style-name="Heading_20_3" text:outline-level="3"><text:soft-page-break/>Key Advantages of the DIN 41612 Design</text:h>
        <text:list xml:id="list150113124856559" text:continue-numbering="true" text:style-name="List_20_1">
          <text:list-item>
            <text:h text:style-name="P76" text:outline-level="4"><text:s/>Structural Robustness and Mechanical Alignment</text:h>
          </text:list-item>
        </text:list>
        <text:p text:style-name="Text_20_body">Unlike standard dual-row pin headers, the DIN 41612 features a robust shroud and explicit keying mechanism.</text:p>
        <text:list text:style-name="L9">
          <text:list-item>
            <text:p text:style-name="P119"><text:span text:style-name="T1">Anti-Warping:</text:span> The high-quality thermoplastic housing prevents the connector pins from bending during insertion or removal.</text:p>
          </text:list-item>
          <text:list-item>
            <text:p text:style-name="P119"><text:span text:style-name="T1">Mating Cycle Longevity:</text:span> Engineered for heavy-duty deployment, these connectors maintain reliable contact resistance over hundreds of insertion/extraction cycles, ensuring the modular cards don't develop intermittent connections over time.</text:p>
          </text:list-item>
        </text:list>
        <text:list xml:id="list150112715220124" text:continue-list="list150113124856559" text:style-name="List_20_1">
          <text:list-item>
            <text:h text:style-name="P76" text:outline-level="4">Superior Signal Integrity and Crosstalk Mitigation</text:h>
          </text:list-item>
        </text:list>
        <text:p text:style-name="Text_20_body">High-speed address and data bus transitions on an MC68000 system can easily induce electromagnetic interference (EMI) and capacitive crosstalk between adjacent pins.</text:p>
        <text:list text:style-name="L10">
          <text:list-item>
            <text:p text:style-name="P120"><text:span text:style-name="T1">Three-Row Shielding Architecture:</text:span> Having three parallel rows (A, B, and C) allows hardware designers to interleave Ground (GND) pins around high-frequency control signals (such as /AS, /UDS, /LDS, and clock lines). Row B can act as a massive structural shield layer between the active traces of Rows A and C.</text:p>
          </text:list-item>
        </text:list>
        <text:list text:continue-list="list150112715220124" text:style-name="List_20_1">
          <text:list-item>
            <text:h text:style-name="P76" text:outline-level="4"><text:s/>Low-Impedance Power Delivery</text:h>
          </text:list-item>
        </text:list>
        <text:p text:style-name="P13">The DIN 41612 contact pins are rated for higher current density compared to dense IDC or edge connectors. By dedicating multiple parallel pins at the outer boundaries of the connector to +5V and GND, the backplane provides a very low-impedance power distribution network, drastically reducing voltage sag and high-frequency supply ripple when multiple SRAM chips enable simultaneously.</text:p>
        <text:list text:continue-numbering="true" text:style-name="List_20_1">
          <text:list-item>
            <text:h text:style-name="P75" text:outline-level="3">Memory Slot Pinout Architecture (16-Bit MC68000 Bus Optimized)</text:h>
          </text:list-item>
        </text:list>
        <text:p text:style-name="Text_20_body">The matrix below details an optimized 96-pin layout tailored specifically for a memory card expansion slot. It balances data bus symmetry, interleaves ground connections to prevent ringing, and establishes a massive power plane entry at the connector edges.</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Pin #</text:p>
              </table:table-cell>
              <table:table-cell table:style-name="Table13.A1" office:value-type="string">
                <text:p text:style-name="Table_20_Heading">Row A Signal</text:p>
              </table:table-cell>
              <table:table-cell table:style-name="Table13.A1" office:value-type="string">
                <text:p text:style-name="Table_20_Heading">Row B Signal (Shielding/Aux)</text:p>
              </table:table-cell>
              <table:table-cell table:style-name="Table13.A1" office:value-type="string">
                <text:p text:style-name="Table_20_Heading">Row C Signal</text:p>
              </table:table-cell>
            </table:table-row>
          </table:table-header-rows>
          <table:table-row>
            <table:table-cell table:style-name="Table13.A1" office:value-type="string">
              <text:p text:style-name="P48">1</text:p>
            </table:table-cell>
            <table:table-cell table:style-name="Table13.A1" office:value-type="string">
              <text:p text:style-name="P48">+5V (Main Power Input)</text:p>
            </table:table-cell>
            <table:table-cell table:style-name="Table13.A1" office:value-type="string">
              <text:p text:style-name="P48">+5V (Main Power Input)</text:p>
            </table:table-cell>
            <table:table-cell table:style-name="Table13.A1" office:value-type="string">
              <text:p text:style-name="P48">+5V (Main Power Input)</text:p>
            </table:table-cell>
          </table:table-row>
          <text:soft-page-break/>
          <table:table-row table:style-name="Table13.3">
            <table:table-cell table:style-name="Table13.A1" office:value-type="string">
              <text:p text:style-name="P48">2</text:p>
            </table:table-cell>
            <table:table-cell table:style-name="Table13.A1" office:value-type="string">
              <text:p text:style-name="P53">DO</text:p>
            </table:table-cell>
            <table:table-cell table:style-name="Table13.A1" office:value-type="string">
              <text:p text:style-name="P15">GND</text:p>
            </table:table-cell>
            <table:table-cell table:style-name="Table13.A1" office:value-type="string">
              <text:p text:style-name="P54">/<text:span text:style-name="T22">RESET</text:span></text:p>
            </table:table-cell>
          </table:table-row>
          <table:table-row table:style-name="Table13.4">
            <table:table-cell table:style-name="Table13.A1" office:value-type="string">
              <text:p text:style-name="P48">3</text:p>
            </table:table-cell>
            <table:table-cell table:style-name="Table13.A1" office:value-type="string">
              <text:p text:style-name="P52">D1</text:p>
            </table:table-cell>
            <table:table-cell table:style-name="Table13.A1" office:value-type="string">
              <text:p text:style-name="P15">GND</text:p>
            </table:table-cell>
            <table:table-cell table:style-name="Table13.A1" office:value-type="string">
              <text:p text:style-name="P55">RESET</text:p>
            </table:table-cell>
          </table:table-row>
          <table:table-row>
            <table:table-cell table:style-name="Table13.A1" office:value-type="string">
              <text:p text:style-name="P48">4</text:p>
            </table:table-cell>
            <table:table-cell table:style-name="Table13.A1" office:value-type="string">
              <text:p text:style-name="P52">D2</text:p>
            </table:table-cell>
            <table:table-cell table:style-name="Table13.A1" office:value-type="string">
              <text:p text:style-name="P56">GND</text:p>
            </table:table-cell>
            <table:table-cell table:style-name="Table13.A1" office:value-type="string">
              <text:p text:style-name="P57">IRQ7</text:p>
            </table:table-cell>
          </table:table-row>
          <table:table-row>
            <table:table-cell table:style-name="Table13.A1" office:value-type="string">
              <text:p text:style-name="P48">5</text:p>
            </table:table-cell>
            <table:table-cell table:style-name="Table13.A1" office:value-type="string">
              <text:p text:style-name="P52">D3</text:p>
            </table:table-cell>
            <table:table-cell table:style-name="Table13.A1" office:value-type="string">
              <text:p text:style-name="P15">GND</text:p>
            </table:table-cell>
            <table:table-cell table:style-name="Table13.A1" office:value-type="string">
              <text:p text:style-name="P15">/<text:span text:style-name="T22">AS</text:span></text:p>
            </table:table-cell>
          </table:table-row>
          <table:table-row>
            <table:table-cell table:style-name="Table13.A1" office:value-type="string">
              <text:p text:style-name="P48">6</text:p>
            </table:table-cell>
            <table:table-cell table:style-name="Table13.A1" office:value-type="string">
              <text:p text:style-name="P52">D4</text:p>
            </table:table-cell>
            <table:table-cell table:style-name="Table13.A1" office:value-type="string">
              <text:p text:style-name="P15">GND</text:p>
            </table:table-cell>
            <table:table-cell table:style-name="Table13.A1" office:value-type="string">
              <text:p text:style-name="P15">/<text:span text:style-name="T22">LDS</text:span></text:p>
            </table:table-cell>
          </table:table-row>
          <table:table-row>
            <table:table-cell table:style-name="Table13.A1" office:value-type="string">
              <text:p text:style-name="P48">7</text:p>
            </table:table-cell>
            <table:table-cell table:style-name="Table13.A1" office:value-type="string">
              <text:p text:style-name="P52">D5</text:p>
            </table:table-cell>
            <table:table-cell table:style-name="Table13.A1" office:value-type="string">
              <text:p text:style-name="P56">GND</text:p>
            </table:table-cell>
            <table:table-cell table:style-name="Table13.A1" office:value-type="string">
              <text:p text:style-name="P57">UDS</text:p>
            </table:table-cell>
          </table:table-row>
          <table:table-row>
            <table:table-cell table:style-name="Table13.A1" office:value-type="string">
              <text:p text:style-name="P48">8</text:p>
            </table:table-cell>
            <table:table-cell table:style-name="Table13.A1" office:value-type="string">
              <text:p text:style-name="P52">D6</text:p>
            </table:table-cell>
            <table:table-cell table:style-name="Table13.A1" office:value-type="string">
              <text:p text:style-name="P56">GND</text:p>
            </table:table-cell>
            <table:table-cell table:style-name="Table13.A1" office:value-type="string">
              <text:p text:style-name="P15">/<text:span text:style-name="T22">IORD</text:span></text:p>
            </table:table-cell>
          </table:table-row>
          <table:table-row>
            <table:table-cell table:style-name="Table13.A1" office:value-type="string">
              <text:p text:style-name="P48">9</text:p>
            </table:table-cell>
            <table:table-cell table:style-name="Table13.A1" office:value-type="string">
              <text:p text:style-name="P52">D7</text:p>
            </table:table-cell>
            <table:table-cell table:style-name="Table13.A1" office:value-type="string">
              <text:p text:style-name="P56">GND</text:p>
            </table:table-cell>
            <table:table-cell table:style-name="Table13.A1" office:value-type="string">
              <text:p text:style-name="P15">/<text:span text:style-name="T22">CPURD</text:span></text:p>
            </table:table-cell>
          </table:table-row>
          <table:table-row>
            <table:table-cell table:style-name="Table13.A1" office:value-type="string">
              <text:p text:style-name="P48">10</text:p>
            </table:table-cell>
            <table:table-cell table:style-name="Table13.A1" office:value-type="string">
              <text:p text:style-name="P52">D8</text:p>
            </table:table-cell>
            <table:table-cell table:style-name="Table13.A1" office:value-type="string">
              <text:p text:style-name="P15">GND</text:p>
            </table:table-cell>
            <table:table-cell table:style-name="Table13.A1" office:value-type="string">
              <text:p text:style-name="P15">/<text:span text:style-name="T22">CPUWR</text:span></text:p>
            </table:table-cell>
          </table:table-row>
          <table:table-row>
            <table:table-cell table:style-name="Table13.A1" office:value-type="string">
              <text:p text:style-name="P48">11</text:p>
            </table:table-cell>
            <table:table-cell table:style-name="Table13.A1" office:value-type="string">
              <text:p text:style-name="P52">D9</text:p>
            </table:table-cell>
            <table:table-cell table:style-name="Table13.A1" office:value-type="string">
              <text:p text:style-name="P56">GND</text:p>
            </table:table-cell>
            <table:table-cell table:style-name="Table13.A1" office:value-type="string">
              <text:p text:style-name="P15">/<text:span text:style-name="T22">IOWR</text:span></text:p>
            </table:table-cell>
          </table:table-row>
          <table:table-row>
            <table:table-cell table:style-name="Table13.A1" office:value-type="string">
              <text:p text:style-name="P48">12</text:p>
            </table:table-cell>
            <table:table-cell table:style-name="Table13.A1" office:value-type="string">
              <text:p text:style-name="P52">D10</text:p>
            </table:table-cell>
            <table:table-cell table:style-name="Table13.A1" office:value-type="string">
              <text:p text:style-name="P56">GND</text:p>
            </table:table-cell>
            <table:table-cell table:style-name="Table13.A1" office:value-type="string">
              <text:p text:style-name="P57">IRQ3</text:p>
            </table:table-cell>
          </table:table-row>
          <table:table-row>
            <table:table-cell table:style-name="Table13.A1" office:value-type="string">
              <text:p text:style-name="P48">13</text:p>
            </table:table-cell>
            <table:table-cell table:style-name="Table13.A1" office:value-type="string">
              <text:p text:style-name="P10">D11</text:p>
            </table:table-cell>
            <table:table-cell table:style-name="Table13.A1" office:value-type="string">
              <text:p text:style-name="P56">GND</text:p>
            </table:table-cell>
            <table:table-cell table:style-name="Table13.A1" office:value-type="string">
              <text:p text:style-name="P57">IRQ4</text:p>
            </table:table-cell>
          </table:table-row>
          <table:table-row>
            <table:table-cell table:style-name="Table13.A1" office:value-type="string">
              <text:p text:style-name="P48">14</text:p>
            </table:table-cell>
            <table:table-cell table:style-name="Table13.A1" office:value-type="string">
              <text:p text:style-name="P52">D12</text:p>
            </table:table-cell>
            <table:table-cell table:style-name="Table13.A1" office:value-type="string">
              <text:p text:style-name="P15">GND</text:p>
            </table:table-cell>
            <table:table-cell table:style-name="Table13.A1" office:value-type="string">
              <text:p text:style-name="P57">A23</text:p>
            </table:table-cell>
          </table:table-row>
          <table:table-row>
            <table:table-cell table:style-name="Table13.A1" office:value-type="string">
              <text:p text:style-name="P48">15</text:p>
            </table:table-cell>
            <table:table-cell table:style-name="Table13.A1" office:value-type="string">
              <text:p text:style-name="P52">D13</text:p>
            </table:table-cell>
            <table:table-cell table:style-name="Table13.A1" office:value-type="string">
              <text:p text:style-name="P15">GND</text:p>
            </table:table-cell>
            <table:table-cell table:style-name="Table13.A1" office:value-type="string">
              <text:p text:style-name="P57">A22</text:p>
            </table:table-cell>
          </table:table-row>
          <table:table-row>
            <table:table-cell table:style-name="Table13.A1" office:value-type="string">
              <text:p text:style-name="P48">16</text:p>
            </table:table-cell>
            <table:table-cell table:style-name="Table13.A1" office:value-type="string">
              <text:p text:style-name="P52">D14</text:p>
            </table:table-cell>
            <table:table-cell table:style-name="Table13.A1" office:value-type="string">
              <text:p text:style-name="P56">GND</text:p>
            </table:table-cell>
            <table:table-cell table:style-name="Table13.A1" office:value-type="string">
              <text:p text:style-name="P57">A21</text:p>
            </table:table-cell>
          </table:table-row>
          <table:table-row>
            <table:table-cell table:style-name="Table13.A1" office:value-type="string">
              <text:p text:style-name="P48">17</text:p>
            </table:table-cell>
            <table:table-cell table:style-name="Table13.A1" office:value-type="string">
              <text:p text:style-name="P52">D15</text:p>
            </table:table-cell>
            <table:table-cell table:style-name="Table13.A1" office:value-type="string">
              <text:p text:style-name="P15">GND</text:p>
            </table:table-cell>
            <table:table-cell table:style-name="Table13.A1" office:value-type="string">
              <text:p text:style-name="P57">A20</text:p>
            </table:table-cell>
          </table:table-row>
          <table:table-row>
            <table:table-cell table:style-name="Table13.A1" office:value-type="string">
              <text:p text:style-name="P48">18</text:p>
            </table:table-cell>
            <table:table-cell table:style-name="Table13.A1" office:value-type="string">
              <text:p text:style-name="P52">A0</text:p>
            </table:table-cell>
            <table:table-cell table:style-name="Table13.A1" office:value-type="string">
              <text:p text:style-name="P15">GND</text:p>
            </table:table-cell>
            <table:table-cell table:style-name="Table13.A1" office:value-type="string">
              <text:p text:style-name="P15">/<text:span text:style-name="T22">IO_CS1</text:span></text:p>
            </table:table-cell>
          </table:table-row>
          <table:table-row>
            <table:table-cell table:style-name="Table13.A1" office:value-type="string">
              <text:p text:style-name="P48">19</text:p>
            </table:table-cell>
            <table:table-cell table:style-name="Table13.A1" office:value-type="string">
              <text:p text:style-name="P52">A1</text:p>
            </table:table-cell>
            <table:table-cell table:style-name="Table13.A1" office:value-type="string">
              <text:p text:style-name="P56">GND</text:p>
            </table:table-cell>
            <table:table-cell table:style-name="Table13.A1" office:value-type="string">
              <text:p text:style-name="P57">IRQ5</text:p>
            </table:table-cell>
          </table:table-row>
          <table:table-row>
            <table:table-cell table:style-name="Table13.A1" office:value-type="string">
              <text:p text:style-name="P48">20</text:p>
            </table:table-cell>
            <table:table-cell table:style-name="Table13.A1" office:value-type="string">
              <text:p text:style-name="P52">A2</text:p>
            </table:table-cell>
            <table:table-cell table:style-name="Table13.A1" office:value-type="string">
              <text:p text:style-name="P56">GND</text:p>
            </table:table-cell>
            <table:table-cell table:style-name="Table13.A1" office:value-type="string">
              <text:p text:style-name="P15">/<text:span text:style-name="T22">IO_CS</text:span></text:p>
            </table:table-cell>
          </table:table-row>
          <table:table-row>
            <table:table-cell table:style-name="Table13.A1" office:value-type="string">
              <text:p text:style-name="P48">21</text:p>
            </table:table-cell>
            <table:table-cell table:style-name="Table13.A1" office:value-type="string">
              <text:p text:style-name="P52">A3</text:p>
            </table:table-cell>
            <table:table-cell table:style-name="Table13.A1" office:value-type="string">
              <text:p text:style-name="P56">GND</text:p>
            </table:table-cell>
            <table:table-cell table:style-name="Table13.A1" office:value-type="string">
              <text:p text:style-name="P58">/MEM_CS</text:p>
            </table:table-cell>
          </table:table-row>
          <table:table-row>
            <table:table-cell table:style-name="Table13.A1" office:value-type="string">
              <text:p text:style-name="P48">22</text:p>
            </table:table-cell>
            <table:table-cell table:style-name="Table13.A1" office:value-type="string">
              <text:p text:style-name="P52">A4</text:p>
            </table:table-cell>
            <table:table-cell table:style-name="Table13.A1" office:value-type="string">
              <text:p text:style-name="P15">GND</text:p>
            </table:table-cell>
            <table:table-cell table:style-name="Table13.A1" office:value-type="string">
              <text:p text:style-name="P57">A19</text:p>
            </table:table-cell>
          </table:table-row>
          <table:table-row table:style-name="Table13.24">
            <table:table-cell table:style-name="Table13.A1" office:value-type="string">
              <text:p text:style-name="P48">23</text:p>
            </table:table-cell>
            <table:table-cell table:style-name="Table13.A1" office:value-type="string">
              <text:p text:style-name="P52">A5</text:p>
            </table:table-cell>
            <table:table-cell table:style-name="Table13.A1" office:value-type="string">
              <text:p text:style-name="P56">GND</text:p>
            </table:table-cell>
            <table:table-cell table:style-name="Table13.A1" office:value-type="string">
              <text:p text:style-name="P57">A18</text:p>
            </table:table-cell>
          </table:table-row>
          <table:table-row>
            <table:table-cell table:style-name="Table13.A1" office:value-type="string">
              <text:p text:style-name="P48">24</text:p>
            </table:table-cell>
            <table:table-cell table:style-name="Table13.A1" office:value-type="string">
              <text:p text:style-name="P52">A6</text:p>
            </table:table-cell>
            <table:table-cell table:style-name="Table13.A1" office:value-type="string">
              <text:p text:style-name="P56">GND</text:p>
            </table:table-cell>
            <table:table-cell table:style-name="Table13.A1" office:value-type="string">
              <text:p text:style-name="P57">A17</text:p>
            </table:table-cell>
          </table:table-row>
          <table:table-row table:style-name="Table13.26">
            <table:table-cell table:style-name="Table13.A1" office:value-type="string">
              <text:p text:style-name="P48">25</text:p>
            </table:table-cell>
            <table:table-cell table:style-name="Table13.A1" office:value-type="string">
              <text:p text:style-name="P9">A7</text:p>
            </table:table-cell>
            <table:table-cell table:style-name="Table13.A1" office:value-type="string">
              <text:p text:style-name="P56">GND</text:p>
            </table:table-cell>
            <table:table-cell table:style-name="Table13.A1" office:value-type="string">
              <text:p text:style-name="P11">A16</text:p>
            </table:table-cell>
          </table:table-row>
          <table:table-row table:style-name="Table13.27">
            <table:table-cell table:style-name="Table13.A1" office:value-type="string">
              <text:p text:style-name="P48">26</text:p>
            </table:table-cell>
            <table:table-cell table:style-name="Table13.A1" office:value-type="string">
              <text:p text:style-name="P9">A8</text:p>
            </table:table-cell>
            <table:table-cell table:style-name="Table13.A1" office:value-type="string">
              <text:p text:style-name="P56">GND</text:p>
            </table:table-cell>
            <table:table-cell table:style-name="Table13.A1" office:value-type="string">
              <text:p text:style-name="P11">A15</text:p>
            </table:table-cell>
          </table:table-row>
          <table:table-row table:style-name="Table13.28">
            <table:table-cell table:style-name="Table13.A1" office:value-type="string">
              <text:p text:style-name="P48">27</text:p>
            </table:table-cell>
            <table:table-cell table:style-name="Table13.A1" office:value-type="string">
              <text:p text:style-name="P53">A9</text:p>
            </table:table-cell>
            <table:table-cell table:style-name="Table13.A1" office:value-type="string">
              <text:p text:style-name="P15">GND</text:p>
            </table:table-cell>
            <table:table-cell table:style-name="Table13.A1" office:value-type="string">
              <text:p text:style-name="P55">A14</text:p>
            </table:table-cell>
          </table:table-row>
          <table:table-row>
            <table:table-cell table:style-name="Table13.A1" office:value-type="string">
              <text:p text:style-name="P48">28</text:p>
            </table:table-cell>
            <table:table-cell table:style-name="Table13.A1" office:value-type="string">
              <text:p text:style-name="P53">A10</text:p>
            </table:table-cell>
            <table:table-cell table:style-name="Table13.A1" office:value-type="string">
              <text:p text:style-name="P15">GND</text:p>
            </table:table-cell>
            <table:table-cell table:style-name="Table13.A1" office:value-type="string">
              <text:p text:style-name="P49">FREE</text:p>
            </table:table-cell>
          </table:table-row>
          <table:table-row>
            <table:table-cell table:style-name="Table13.A1" office:value-type="string">
              <text:p text:style-name="P48">29</text:p>
            </table:table-cell>
            <table:table-cell table:style-name="Table13.A1" office:value-type="string">
              <text:p text:style-name="P52">A11</text:p>
            </table:table-cell>
            <table:table-cell table:style-name="Table13.A1" office:value-type="string">
              <text:p text:style-name="P15">GND</text:p>
            </table:table-cell>
            <table:table-cell table:style-name="Table13.A1" office:value-type="string">
              <text:p text:style-name="P57">IRQ1</text:p>
            </table:table-cell>
          </table:table-row>
          <table:table-row>
            <table:table-cell table:style-name="Table13.A1" office:value-type="string">
              <text:p text:style-name="P48">30</text:p>
            </table:table-cell>
            <table:table-cell table:style-name="Table13.A1" office:value-type="string">
              <text:p text:style-name="P52">A12</text:p>
            </table:table-cell>
            <table:table-cell table:style-name="Table13.A1" office:value-type="string">
              <text:p text:style-name="P15">GND</text:p>
            </table:table-cell>
            <table:table-cell table:style-name="Table13.A1" office:value-type="string">
              <text:p text:style-name="P48">-5V (Auxiliary Rail)</text:p>
            </table:table-cell>
          </table:table-row>
          <table:table-row>
            <table:table-cell table:style-name="Table13.A1" office:value-type="string">
              <text:p text:style-name="P48">31</text:p>
            </table:table-cell>
            <table:table-cell table:style-name="Table13.A1" office:value-type="string">
              <text:p text:style-name="P53">A13</text:p>
            </table:table-cell>
            <table:table-cell table:style-name="Table13.A1" office:value-type="string">
              <text:p text:style-name="P53">GND</text:p>
            </table:table-cell>
            <table:table-cell table:style-name="Table13.A1" office:value-type="string">
              <text:p text:style-name="P48">+12V (Auxiliary Rail)</text:p>
            </table:table-cell>
          </table:table-row>
          <table:table-row>
            <table:table-cell table:style-name="Table13.A1" office:value-type="string">
              <text:p text:style-name="P48">32</text:p>
            </table:table-cell>
            <table:table-cell table:style-name="Table13.A1" office:value-type="string">
              <text:p text:style-name="P48">GND (Main Return)</text:p>
            </table:table-cell>
            <table:table-cell table:style-name="Table13.A1" office:value-type="string">
              <text:p text:style-name="P48">GND (Main Return)</text:p>
            </table:table-cell>
            <table:table-cell table:style-name="Table13.A1" office:value-type="string">
              <text:p text:style-name="P48">GND (Main Return)</text:p>
            </table:table-cell>
          </table:table-row>
        </table:table>
        <text:list text:continue-numbering="true" text:style-name="List_20_1">
          <text:list-item>
            <text:h text:style-name="P75" text:outline-level="3"><text:soft-page-break/>Implementation Notes for the Memory Subsystem Layout</text:h>
          </text:list-item>
          <text:list-item>
            <text:p text:style-name="P121"><text:span text:style-name="T1">Symmetric Data Paths:</text:span> Spreading the data bus across Row A (D0​−D7​) and Row B (D8​−D15​) keeps the physical path lengths highly balanced when transitioning from the backplane onto the memory card, which minimizes differential propagation delay between the LOW and HIGH banks during 16-bit word cycles.</text:p>
          </text:list-item>
          <text:list-item>
            <text:p text:style-name="P121"><text:span text:style-name="T1">Pre-Decoded Chip Selects (/MEM_CS0,/MEM_CS1):</text:span> Bringing pre-decoded chip select lines from a master logic device (e.g., a system GAL located on the CPU or backplane supervisor board) onto pins 23 and 24 minimizes the amount of discrete glue logic gates required directly on the memory board, streamlining the expansion hardware footprint.</text:p>
          </text:list-item>
        </text:list>
      </text:section>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4.2. Configuration Jumper Map (ROM/RAM Selection)</text:h>
      <text:section text:style-name="Sect1" text:name="model-response-message-contentr_5e34cb0d9f5e09be">
        <text:p text:style-name="P59">The PDS317 features a highly flexible hardware configuration memory map managed via onboard jumpers. This design serves two primary strategic purposes:<text:line-break/><text:tab/></text:p>
        <text:list text:continue-numbering="true" text:style-name="List_20_1">
          <text:list-item>
            <text:p text:style-name="P122"><text:span text:style-name="T1">ROM Footprint Versatility:</text:span> It allows the two primary non-volatile sockets to accept either standard <text:span text:style-name="T1">28-pin</text:span> or <text:span text:style-name="T1">32-pin</text:span> memory packages. While this manual frequently references the 28-pin <text:span text:style-name="T1">AT28C256 EEPROM</text:span> as the default system baseline, the hardware natively supports <text:soft-page-break/>32-pin devices like the <text:span text:style-name="T1">AT29C512 Flash Memory</text:span>, which was utilized during the initial development phases of the PDS317.</text:p>
          </text:list-item>
          <text:list-item>
            <text:p text:style-name="P122"><text:span text:style-name="T1">Socket Reallocation (RAM Expansion):</text:span> Because the Orion68K ecosystem is modular and interconnected via a backplane, a dedicated CPU card might already carry its own surface-mount (PLCC) boot ROM. To prevent the PDS317’s two ROM sockets from being wasted in such scenarios, these jumpers allow the user to reconfigure those sockets to accept standard <text:span text:style-name="T1">AS6C4008 SRAM</text:span> chips instead, significantly expanding the system's volatile memory capacity.<text:line-break/>Primary Memory Selection Jumpers (J3, J29, J30, J31)</text:p>
          </text:list-item>
        </text:list>
        <text:p text:style-name="P59">These four jumpers must be configured as a matching set depending on the specific integrated circuit (IC) type and package installed in the ROM/Universal sockets.<text:span text:style-name="T24"><text:line-break/></text:span><text:span text:style-name="T23">Jumper J3</text:span></text:p>
        <table:table table:name="Table5" table:style-name="Table5">
          <table:table-column table:style-name="Table5.A"/>
          <table:table-column table:style-name="Table5.B"/>
          <table:table-header-rows>
            <table:table-row>
              <table:table-cell table:style-name="Table5.A1" office:value-type="string">
                <text:p text:style-name="P40">Position</text:p>
              </table:table-cell>
              <table:table-cell table:style-name="Table5.A1" office:value-type="string">
                <text:p text:style-name="P40">Selection Mapping</text:p>
              </table:table-cell>
            </table:table-row>
          </table:table-header-rows>
          <table:table-row>
            <table:table-cell table:style-name="Table5.A1" office:value-type="string">
              <text:p text:style-name="P41">1 - 2</text:p>
            </table:table-cell>
            <table:table-cell table:style-name="Table5.A1" office:value-type="string">
              <text:p text:style-name="P39">ROM AT28C256 (28-pin) <text:span text:style-name="T1">OR</text:span> RAM AS6C4008</text:p>
            </table:table-cell>
          </table:table-row>
          <table:table-row table:style-name="Table5.3">
            <table:table-cell table:style-name="Table5.A1" office:value-type="string">
              <text:p text:style-name="P41">2 - 3</text:p>
            </table:table-cell>
            <table:table-cell table:style-name="Table5.A1" office:value-type="string">
              <text:p text:style-name="P39">ROM AT29C512 (32-pin)</text:p>
            </table:table-cell>
          </table:table-row>
        </table:table>
        <text:h text:style-name="P38" text:outline-level="4">Jumper J29</text:h>
        <table:table table:name="Table6" table:style-name="Table6">
          <table:table-column table:style-name="Table6.A"/>
          <table:table-column table:style-name="Table6.B"/>
          <table:table-header-rows>
            <table:table-row>
              <table:table-cell table:style-name="Table6.A1" office:value-type="string">
                <text:p text:style-name="P40">Position</text:p>
              </table:table-cell>
              <table:table-cell table:style-name="Table6.A1" office:value-type="string">
                <text:p text:style-name="P40">Selection Mapping</text:p>
              </table:table-cell>
            </table:table-row>
          </table:table-header-rows>
          <table:table-row>
            <table:table-cell table:style-name="Table6.A1" office:value-type="string">
              <text:p text:style-name="P41">1 - 2</text:p>
            </table:table-cell>
            <table:table-cell table:style-name="Table6.A1" office:value-type="string">
              <text:p text:style-name="P39">ROM AT28C256 (28-pin) <text:span text:style-name="T1">OR</text:span> RAM AS6C4008</text:p>
            </table:table-cell>
          </table:table-row>
          <table:table-row>
            <table:table-cell table:style-name="Table6.A1" office:value-type="string">
              <text:p text:style-name="P41">2 - 3</text:p>
            </table:table-cell>
            <table:table-cell table:style-name="Table6.A1" office:value-type="string">
              <text:p text:style-name="P39">ROM AT29C512 (32-pin)</text:p>
            </table:table-cell>
          </table:table-row>
        </table:table>
        <text:h text:style-name="P38" text:outline-level="4">Jumper J30</text:h>
        <table:table table:name="Table7" table:style-name="Table7">
          <table:table-column table:style-name="Table7.A"/>
          <table:table-column table:style-name="Table7.B"/>
          <table:table-header-rows>
            <table:table-row>
              <table:table-cell table:style-name="Table7.A1" office:value-type="string">
                <text:p text:style-name="P40">Position</text:p>
              </table:table-cell>
              <table:table-cell table:style-name="Table7.A1" office:value-type="string">
                <text:p text:style-name="P40">Selection Mapping</text:p>
              </table:table-cell>
            </table:table-row>
          </table:table-header-rows>
          <table:table-row>
            <table:table-cell table:style-name="Table7.A1" office:value-type="string">
              <text:p text:style-name="P41">1 - 2</text:p>
            </table:table-cell>
            <table:table-cell table:style-name="Table7.A1" office:value-type="string">
              <text:p text:style-name="P39">ROM AT28C256 (28-pin)</text:p>
            </table:table-cell>
          </table:table-row>
          <table:table-row table:style-name="Table7.3">
            <table:table-cell table:style-name="Table7.A1" office:value-type="string">
              <text:p text:style-name="P41">2 - 3</text:p>
            </table:table-cell>
            <table:table-cell table:style-name="Table7.A1" office:value-type="string">
              <text:p text:style-name="P39">ROM AT29C512 (32-pin) <text:span text:style-name="T1">OR</text:span> RAM AS6C4008</text:p>
            </table:table-cell>
          </table:table-row>
        </table:table>
        <text:h text:style-name="P38" text:outline-level="4">Jumper J31</text:h>
        <table:table table:name="Table8" table:style-name="Table8">
          <table:table-column table:style-name="Table8.A"/>
          <table:table-column table:style-name="Table8.B"/>
          <table:table-header-rows>
            <table:table-row>
              <table:table-cell table:style-name="Table8.A1" office:value-type="string">
                <text:p text:style-name="P40">Position</text:p>
              </table:table-cell>
              <table:table-cell table:style-name="Table8.A1" office:value-type="string">
                <text:p text:style-name="P40">Selection Mapping</text:p>
              </table:table-cell>
            </table:table-row>
          </table:table-header-rows>
          <table:table-row>
            <table:table-cell table:style-name="Table8.A1" office:value-type="string">
              <text:p text:style-name="P41">1 - 2</text:p>
            </table:table-cell>
            <table:table-cell table:style-name="Table8.A1" office:value-type="string">
              <text:p text:style-name="P39">RAM AS6C4008</text:p>
            </table:table-cell>
          </table:table-row>
          <table:table-row>
            <table:table-cell table:style-name="Table8.A1" office:value-type="string">
              <text:p text:style-name="P41">2 - 3</text:p>
            </table:table-cell>
            <table:table-cell table:style-name="Table8.A1" office:value-type="string">
              <text:p text:style-name="P39">ROM AT29C512 (32-pin)</text:p>
            </table:table-cell>
          </table:table-row>
        </table:table>
        <text:h text:style-name="P37" text:outline-level="3"/>
        <text:list text:continue-numbering="true" text:style-name="List_20_1">
          <text:list-item>
            <text:h text:style-name="P75" text:outline-level="3">Hardware Configuration &amp; Static Signal Jumpers</text:h>
          </text:list-item>
        </text:list>
        <text:p text:style-name="Text_20_body">These jumpers route specific static control lines, hardware configurations, or are tied to default logical states for the current revision.</text:p>
        <text:list text:continue-numbering="true" text:style-name="List_20_1">
          <text:list-item>
            <text:h text:style-name="P76" text:outline-level="4">Jumpers J6, J7, J8, J10, and J11 (Default Closed 2-3)</text:h>
          </text:list-item>
        </text:list>
        <text:p text:style-name="Text_20_body">These jumpers must remain closed on pins 2-3 for normal operation in revision 1.0.</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Jumper</text:p>
              </table:table-cell>
              <table:table-cell table:style-name="Table9.A1" office:value-type="string">
                <text:p text:style-name="Table_20_Heading">Position 1 - 2</text:p>
              </table:table-cell>
              <table:table-cell table:style-name="Table9.A1" office:value-type="string">
                <text:p text:style-name="Table_20_Heading">Position 2 - 3</text:p>
              </table:table-cell>
            </table:table-row>
          </table:table-header-rows>
          <table:table-row>
            <table:table-cell table:style-name="Table9.A1" office:value-type="string">
              <text:p text:style-name="P48">J6</text:p>
            </table:table-cell>
            <table:table-cell table:style-name="Table9.A1" office:value-type="string">
              <text:p text:style-name="Table_20_Contents">N/A</text:p>
            </table:table-cell>
            <table:table-cell table:style-name="Table9.A1" office:value-type="string">
              <text:p text:style-name="Table_20_Contents"><text:span text:style-name="T1">CLOSED</text:span> (Default)</text:p>
            </table:table-cell>
          </table:table-row>
          <table:table-row>
            <table:table-cell table:style-name="Table9.A1" office:value-type="string">
              <text:p text:style-name="P48">J7</text:p>
            </table:table-cell>
            <table:table-cell table:style-name="Table9.A1" office:value-type="string">
              <text:p text:style-name="Table_20_Contents">N/A</text:p>
            </table:table-cell>
            <table:table-cell table:style-name="Table9.A1" office:value-type="string">
              <text:p text:style-name="Table_20_Contents"><text:span text:style-name="T1">CLOSED</text:span> (Default)</text:p>
            </table:table-cell>
          </table:table-row>
          <text:soft-page-break/>
          <table:table-row>
            <table:table-cell table:style-name="Table9.A1" office:value-type="string">
              <text:p text:style-name="P48">J8</text:p>
            </table:table-cell>
            <table:table-cell table:style-name="Table9.A1" office:value-type="string">
              <text:p text:style-name="Table_20_Contents">N/A</text:p>
            </table:table-cell>
            <table:table-cell table:style-name="Table9.A1" office:value-type="string">
              <text:p text:style-name="Table_20_Contents"><text:span text:style-name="T1">CLOSED</text:span> (Default)</text:p>
            </table:table-cell>
          </table:table-row>
          <table:table-row>
            <table:table-cell table:style-name="Table9.A1" office:value-type="string">
              <text:p text:style-name="P48">J10</text:p>
            </table:table-cell>
            <table:table-cell table:style-name="Table9.A1" office:value-type="string">
              <text:p text:style-name="Table_20_Contents">N/A</text:p>
            </table:table-cell>
            <table:table-cell table:style-name="Table9.A1" office:value-type="string">
              <text:p text:style-name="Table_20_Contents"><text:span text:style-name="T1">CLOSED</text:span> (Default)</text:p>
            </table:table-cell>
          </table:table-row>
          <table:table-row>
            <table:table-cell table:style-name="Table9.A1" office:value-type="string">
              <text:p text:style-name="P48">J11</text:p>
            </table:table-cell>
            <table:table-cell table:style-name="Table9.A1" office:value-type="string">
              <text:p text:style-name="Table_20_Contents">N/A</text:p>
            </table:table-cell>
            <table:table-cell table:style-name="Table9.A1" office:value-type="string">
              <text:p text:style-name="Table_20_Contents"><text:span text:style-name="T1">CLOSED</text:span> (Default)</text:p>
            </table:table-cell>
          </table:table-row>
        </table:table>
        <text:h text:style-name="Heading_20_4" text:outline-level="4">Jumper J12 (Default Closed 1-2)</text:h>
        <table:table table:name="Table10" table:style-name="Table10">
          <table:table-column table:style-name="Table10.A"/>
          <table:table-column table:style-name="Table10.B"/>
          <table:table-header-rows>
            <table:table-row>
              <table:table-cell table:style-name="Table10.A1" office:value-type="string">
                <text:p text:style-name="Table_20_Heading">Position</text:p>
              </table:table-cell>
              <table:table-cell table:style-name="Table10.A1" office:value-type="string">
                <text:p text:style-name="Table_20_Heading">Status</text:p>
              </table:table-cell>
            </table:table-row>
          </table:table-header-rows>
          <table:table-row>
            <table:table-cell table:style-name="Table10.A1" office:value-type="string">
              <text:p text:style-name="P48">1 - 2</text:p>
            </table:table-cell>
            <table:table-cell table:style-name="Table10.A1" office:value-type="string">
              <text:p text:style-name="Table_20_Contents"><text:span text:style-name="T1">CLOSED</text:span> (Default)</text:p>
            </table:table-cell>
          </table:table-row>
          <table:table-row>
            <table:table-cell table:style-name="Table10.A1" office:value-type="string">
              <text:p text:style-name="P48">2 - 3</text:p>
            </table:table-cell>
            <table:table-cell table:style-name="Table10.A1" office:value-type="string">
              <text:p text:style-name="Table_20_Contents">N/A</text:p>
            </table:table-cell>
          </table:table-row>
        </table:table>
        <text:list xml:id="list150112328182943" text:continue-numbering="true" text:style-name="List_20_1">
          <text:list-item>
            <text:h text:style-name="P75" text:outline-level="3">Reserved / Future Expansion Jumpers (J4, J9)</text:h>
          </text:list-item>
        </text:list>
        <text:p text:style-name="Quotations">⚠️ <text:span text:style-name="T1">Hardware Note:</text:span> These jumpers are allocated for future hardware expansion subroutines and experimental traces that have not yet been fully validated. For <text:span text:style-name="T1">PDS317 Hardware Version 1.0</text:span>, these <text:span text:style-name="T1">must be left completely open</text:span> (no jumper shunts installed).</text:p>
        <text:h text:style-name="Heading_20_4" text:outline-level="4">Jumper J4</text:h>
        <table:table table:name="Table11" table:style-name="Table11">
          <table:table-column table:style-name="Table11.A"/>
          <table:table-column table:style-name="Table11.B"/>
          <table:table-header-rows>
            <table:table-row>
              <table:table-cell table:style-name="Table11.A1" office:value-type="string">
                <text:p text:style-name="Table_20_Heading">Position</text:p>
              </table:table-cell>
              <table:table-cell table:style-name="Table11.A1" office:value-type="string">
                <text:p text:style-name="Table_20_Heading">Selection / Function</text:p>
              </table:table-cell>
            </table:table-row>
          </table:table-header-rows>
          <table:table-row>
            <table:table-cell table:style-name="Table11.A1" office:value-type="string">
              <text:p text:style-name="P48">1 - 2</text:p>
            </table:table-cell>
            <table:table-cell table:style-name="Table11.A1" office:value-type="string">
              <text:p text:style-name="Table_20_Contents">N/A (Leave Open)</text:p>
            </table:table-cell>
          </table:table-row>
          <table:table-row>
            <table:table-cell table:style-name="Table11.A1" office:value-type="string">
              <text:p text:style-name="P48">2 - 3</text:p>
            </table:table-cell>
            <table:table-cell table:style-name="Table11.A1" office:value-type="string">
              <text:p text:style-name="Table_20_Contents">N/A (Leave Open)</text:p>
            </table:table-cell>
          </table:table-row>
        </table:table>
        <text:h text:style-name="Heading_20_4" text:outline-level="4">Jumper J9</text:h>
        <table:table table:name="Table12" table:style-name="Table12">
          <table:table-column table:style-name="Table12.A"/>
          <table:table-column table:style-name="Table12.B"/>
          <table:table-header-rows>
            <table:table-row>
              <table:table-cell table:style-name="Table12.A1" office:value-type="string">
                <text:p text:style-name="Table_20_Heading">Position</text:p>
              </table:table-cell>
              <table:table-cell table:style-name="Table12.A1" office:value-type="string">
                <text:p text:style-name="Table_20_Heading">Selection / Function</text:p>
              </table:table-cell>
            </table:table-row>
          </table:table-header-rows>
          <table:table-row>
            <table:table-cell table:style-name="Table12.A1" office:value-type="string">
              <text:p text:style-name="P48">1 - 2</text:p>
            </table:table-cell>
            <table:table-cell table:style-name="Table12.A1" office:value-type="string">
              <text:p text:style-name="Table_20_Contents">N/A (Leave Open)</text:p>
            </table:table-cell>
          </table:table-row>
          <table:table-row>
            <table:table-cell table:style-name="Table12.A1" office:value-type="string">
              <text:p text:style-name="P48">2 - 3</text:p>
            </table:table-cell>
            <table:table-cell table:style-name="Table12.A1" office:value-type="string">
              <text:p text:style-name="Table_20_Contents">N/A (Leave Open)</text:p>
            </table:table-cell>
          </table:table-row>
        </table:table>
        <text:p text:style-name="Text_20_body"/>
      </text:section>
      <text:p text:style-name="Text_20_body"/>
      <text:h text:style-name="Heading_20_2" text:outline-level="2">5. Address Decoding Logic and Chip Select (/CS)</text:h>
      <text:h text:style-name="P42" text:outline-level="3">5.1. <text:span text:style-name="T20">Address Decoding Subsystem (74HC138)</text:span><text:line-break/></text:h>
      <text:p text:style-name="P32"><text:span text:style-name="T12">The memory bank selection logic on the board is managed by a pair of </text:span><text:span text:style-name="T13">74HC138 3-to-8 line decoders/demultiplexers</text:span><text:span text:style-name="T12"> (</text:span><text:span text:style-name="Source_20_Text"><text:span text:style-name="T12">U100A1</text:span></text:span><text:span text:style-name="T12"> and </text:span><text:span text:style-name="Source_20_Text"><text:span text:style-name="T12">U100B1</text:span></text:span><text:span text:style-name="T12">). This circuit takes the high-order </text:span><text:soft-page-break/><text:span text:style-name="T12">address lines from the CPU bus and decodes them into individual, active-low Chip Select (</text:span><text:span text:style-name="Source_20_Text"><text:span text:style-name="T12">/CS</text:span></text:span><text:span text:style-name="T12">) signals for the physical RAM and ROM/Universal memory chips.</text:span></text:p>
      <text:p text:style-name="P45">The architecture is split into two identical decoder stages to natively support the 16-bit data bus structure of the MC68000:</text:p>
      <text:list text:style-name="L13">
        <text:list-item>
          <text:p text:style-name="P113"><text:span text:style-name="Source_20_Text"><text:span text:style-name="T13">U100A1</text:span></text:span><text:span text:style-name="T13"> (LOW Bank Decoder):</text:span><text:span text:style-name="T12"> Generates chip selects for the lower byte (</text:span><text:span text:style-name="Source_20_Text"><text:span text:style-name="T12">_L</text:span></text:span><text:span text:style-name="T12">) memory chips connected to data lines D_0 - D_7.</text:span></text:p>
        </text:list-item>
        <text:list-item>
          <text:p text:style-name="P113"><text:span text:style-name="Source_20_Text"><text:span text:style-name="T13">U100B1</text:span></text:span><text:span text:style-name="T13"> (HIGH Bank Decoder):</text:span><text:span text:style-name="T12"> Generates chip selects for the upper byte (</text:span><text:span text:style-name="Source_20_Text"><text:span text:style-name="T12">_H</text:span></text:span><text:span text:style-name="T12">) memory chips connected to data lines D_8 - D_15.</text:span></text:p>
        </text:list-item>
      </text:list>
      <text:h text:style-name="P18" text:outline-level="3">Active Decoding Logic (Validated Configuration)</text:h>
      <text:p text:style-name="P45">In the current validated configuration, the system utilizes address lines <text:span text:style-name="T1">BA19, BA20, and BA21</text:span> mapped to the selection pins (A_0, A_1, A_2) of both decoders to slice the memory map into distinct blocks.</text:p>
      <text:h text:style-name="P30" text:outline-level="4"><text:span text:style-name="T20">1. Enable Gates Integration (</text:span><text:span text:style-name="Source_20_Text"><text:span text:style-name="T12">/MEM_CS</text:span></text:span><text:span text:style-name="T20">, </text:span><text:span text:style-name="Source_20_Text"><text:span text:style-name="T12">/LDS</text:span></text:span><text:span text:style-name="T20">, </text:span><text:span text:style-name="Source_20_Text"><text:span text:style-name="T12">/UDS</text:span></text:span><text:span text:style-name="T20">)</text:span></text:h>
      <text:p text:style-name="P45">For a decoder output to assert low, all three hardware enable pins E0, E1, E2) must be satisfied simultaneously:</text:p>
      <text:list text:style-name="L14">
        <text:list-item>
          <text:p text:style-name="P114"><text:span text:style-name="T13">Primary Block Enable (E0):</text:span><text:span text:style-name="T12"> Driven by </text:span><text:span text:style-name="Source_20_Text"><text:span text:style-name="T12">/MEM_CS</text:span></text:span><text:span text:style-name="T12"> (a master pre-decoded memory space signal from the backplane/GAL). Both decoders are kept in standby until this signal drops low.</text:span></text:p>
        </text:list-item>
        <text:list-item>
          <text:p text:style-name="P114"><text:span text:style-name="T13">Data Strobe Masking (E1):</text:span><text:span text:style-name="T12"> * On </text:span><text:span text:style-name="Source_20_Text"><text:span text:style-name="T12">U100A1</text:span></text:span><text:span text:style-name="T12"> (LOW Bank), this pin is tied to </text:span><text:span text:style-name="Source_20_Text"><text:span text:style-name="T12">/LDS</text:span></text:span><text:span text:style-name="T12">. It ensures the decoder only activates during lower-byte or full 16-bit word operations.</text:span></text:p>
          <text:list>
            <text:list-item>
              <text:p text:style-name="P114"><text:span text:style-name="T12">On </text:span><text:span text:style-name="Source_20_Text"><text:span text:style-name="T12">U100B1</text:span></text:span><text:span text:style-name="T12"> (HIGH Bank), this pin is tied to </text:span><text:span text:style-name="Source_20_Text"><text:span text:style-name="T12">/UDS</text:span></text:span><text:span text:style-name="T12">. It ensures the decoder only activates during upper-byte or full 16-bit word operations.</text:span></text:p>
            </text:list-item>
          </text:list>
        </text:list-item>
      </text:list>
      <text:list text:continue-list="list150112328182943" text:style-name="List_20_1">
        <text:list-item>
          <text:list>
            <text:list-item>
              <text:list>
                <text:list-item>
                  <text:list>
                    <text:list-item>
                      <text:list>
                        <text:list-item>
                          <text:list>
                            <text:list-item>
                              <text:h text:style-name="P77" text:outline-level="4"><text:span text:style-name="T20"><text:s/>Signal Routing Output Map</text:span></text:h>
                            </text:list-item>
                          </text:list>
                        </text:list-item>
                      </text:list>
                    </text:list-item>
                  </text:list>
                </text:list-item>
              </text:list>
            </text:list-item>
          </text:list>
        </text:list-item>
      </text:list>
      <text:p text:style-name="P32"><text:span text:style-name="T12">When enabled, the binary combination of the validated address lines </text:span><text:span text:style-name="Source_20_Text"><text:span text:style-name="T12">BA19 </text:span></text:span><text:span text:style-name="T12">A_0, </text:span><text:span text:style-name="Source_20_Text"><text:span text:style-name="T12">BA20</text:span></text:span><text:span text:style-name="T12"> <text:s/>A_1, </text:span><text:span text:style-name="Source_20_Text"><text:span text:style-name="T12">BA21</text:span></text:span><text:span text:style-name="T12"> A_2) routes the selection to the matching memory chips:</text:span></text:p>
      <text:list text:style-name="L15">
        <text:list-item>
          <text:p text:style-name="P115"><text:span text:style-name="T13">Y0 Output:</text:span><text:span text:style-name="T12"> Generates </text:span><text:span text:style-name="Source_20_Text"><text:span text:style-name="T12">/MEM1CS_L</text:span></text:span><text:span text:style-name="T12"> and </text:span><text:span text:style-name="Source_20_Text"><text:span text:style-name="T12">/MEM1CS_H</text:span></text:span><text:span text:style-name="T12"> (typically used for the boot ROM sockets).</text:span></text:p>
        </text:list-item>
        <text:list-item>
          <text:p text:style-name="P115"><text:soft-page-break/><text:span text:style-name="T13">Y1 to Y4 Outputs:</text:span><text:span text:style-name="T12"> Generate individual chip selects for the static RAM expansion array (</text:span><text:span text:style-name="Source_20_Text"><text:span text:style-name="T12">/RAM1CS</text:span></text:span><text:span text:style-name="T12"> through </text:span><text:span text:style-name="Source_20_Text"><text:span text:style-name="T12">/RAM4CS</text:span></text:span><text:span text:style-name="T12"> for both banks).</text:span></text:p>
        </text:list-item>
      </text:list>
      <text:h text:style-name="P18" text:outline-level="3">Hardware Jumpers for Future/Experimental Configuration</text:h>
      <text:p text:style-name="P32"><text:span text:style-name="T12">The layout features several 3-pin configuration headers (</text:span><text:span text:style-name="Source_20_Text"><text:span text:style-name="T12">J2</text:span></text:span><text:span text:style-name="T12">, </text:span><text:span text:style-name="Source_20_Text"><text:span text:style-name="T12">J4</text:span></text:span><text:span text:style-name="T12">, </text:span><text:span text:style-name="Source_20_Text"><text:span text:style-name="T12">J6</text:span></text:span><text:span text:style-name="T12">, </text:span><text:span text:style-name="Source_20_Text"><text:span text:style-name="T12">J7</text:span></text:span><text:span text:style-name="T12">, </text:span><text:span text:style-name="Source_20_Text"><text:span text:style-name="T12">J8</text:span></text:span><text:span text:style-name="T12">, </text:span><text:span text:style-name="Source_20_Text"><text:span text:style-name="T12">J9</text:span></text:span><text:span text:style-name="T12">, </text:span><text:span text:style-name="Source_20_Text"><text:span text:style-name="T12">J10</text:span></text:span><text:span text:style-name="T12">, </text:span><text:span text:style-name="Source_20_Text"><text:span text:style-name="T12">J11</text:span></text:span><text:span text:style-name="T12">) that allow the inputs of the 74HC138 chips to be altered.</text:span></text:p>
      <text:p text:style-name="P29">⚠️ <text:span text:style-name="T13">Important:</text:span><text:span text:style-name="T12"> The jumper selections involving static Ground, </text:span><text:span text:style-name="Source_20_Text"><text:span text:style-name="T12">ROMRAM9900_CS</text:span></text:span><text:span text:style-name="T12">, and address line </text:span><text:span text:style-name="Source_20_Text"><text:span text:style-name="T12">BA22</text:span></text:span><text:span text:style-name="T12"> are architectural provisions for future system updates. They are </text:span><text:span text:style-name="T13">not yet validated</text:span><text:span text:style-name="T12"> for Revision 1.0.</text:span></text:p>
      <text:h text:style-name="P30" text:outline-level="4"><text:span text:style-name="T20"><text:s/>Address Line Demultiplexing &amp; Overrides (</text:span><text:span text:style-name="Source_20_Text"><text:span text:style-name="T12">J6</text:span></text:span><text:span text:style-name="T20">, </text:span><text:span text:style-name="Source_20_Text"><text:span text:style-name="T12">J7</text:span></text:span><text:span text:style-name="T20">, </text:span><text:span text:style-name="Source_20_Text"><text:span text:style-name="T12">J8</text:span></text:span><text:span text:style-name="T20">, </text:span><text:span text:style-name="Source_20_Text"><text:span text:style-name="T12">J10</text:span></text:span><text:span text:style-name="T20">, </text:span><text:span text:style-name="Source_20_Text"><text:span text:style-name="T12">J11</text:span></text:span><text:span text:style-name="T20">)</text:span></text:h>
      <text:list text:style-name="L16">
        <text:list-item>
          <text:p text:style-name="P116"><text:span text:style-name="T13">Validated State (Revision 1.0):</text:span><text:span text:style-name="T12"> Shunts must be placed on pins </text:span><text:span text:style-name="T13">2-3</text:span><text:span text:style-name="T12"> of these headers. This directly bypasses the experimental paths and safely routes </text:span><text:span text:style-name="Source_20_Text"><text:span text:style-name="T12">BA19</text:span></text:span><text:span text:style-name="T12">, </text:span><text:span text:style-name="Source_20_Text"><text:span text:style-name="T12">BA20</text:span></text:span><text:span text:style-name="T12">, and </text:span><text:span text:style-name="Source_20_Text"><text:span text:style-name="T12">BA21</text:span></text:span><text:span text:style-name="T12"> straight to the decoder inputs.</text:span></text:p>
        </text:list-item>
        <text:list-item>
          <text:p text:style-name="P116"><text:span text:style-name="T13">Future Provision (Pins 1-2):</text:span><text:span text:style-name="T12"> Shunting pins 1-2 allows the address lines to be disconnected from the inputs, forcing those specific decoder pins to a static hardware </text:span><text:span text:style-name="T13">Ground (GND)</text:span><text:span text:style-name="T12"> or alternate custom signals like </text:span><text:span text:style-name="Source_20_Text"><text:span text:style-name="T12">ROMRAM9900_CS</text:span></text:span><text:span text:style-name="T12"> via </text:span><text:span text:style-name="Source_20_Text"><text:span text:style-name="T12">J4</text:span></text:span><text:span text:style-name="T12"> and </text:span><text:span text:style-name="Source_20_Text"><text:span text:style-name="T12">J9</text:span></text:span><text:span text:style-name="T12">.</text:span><text:span text:style-name="T20"> Upper Memory Space Expansion Header (</text:span><text:span text:style-name="Source_20_Text"><text:span text:style-name="T12">J2</text:span></text:span><text:span text:style-name="T20">)</text:span></text:p>
        </text:list-item>
      </text:list>
      <text:list text:style-name="L17">
        <text:list-item>
          <text:p text:style-name="P106"><text:span text:style-name="T1">Validated State (Revision 1.0):</text:span> This header manages the active-high enable input (E2, pin 6) of both decoders. In the baseline version, it is tied to a configuration that keeps the decoders permanently unblocked during standard memory cycles.</text:p>
        </text:list-item>
        <text:list-item>
          <text:p text:style-name="P117"><text:span text:style-name="T13">Future Provision (</text:span><text:span text:style-name="Source_20_Text"><text:span text:style-name="T13">BA22</text:span></text:span><text:span text:style-name="T13">):</text:span><text:span text:style-name="T12"> Traces are available on pin 3 to route the higher-order CPU address line </text:span><text:span text:style-name="T13">BA22</text:span><text:span text:style-name="T12"> directly into the E2 gate. When populated in future configurations, this will automatically double the decodable address space by disabling or enabling the entire 74HC138 network depending on whether </text:span><text:span text:style-name="Source_20_Text"><text:span text:style-name="T12">BA22</text:span></text:span><text:span text:style-name="T12"> is high or low.</text:span></text:p>
        </text:list-item>
      </text:list>
      <text:p text:style-name="Text_20_body"/>
      <text:h text:style-name="Heading_20_3" text:outline-level="3"><text:soft-page-break/></text:h>
      <text:h text:style-name="Heading_20_2" text:outline-level="2">6. Diagnostics and Bench Testing</text:h>
      <text:h text:style-name="Heading_20_3" text:outline-level="3">6.1. Essential On-Board Test Points (TP)</text:h>
      <text:p text:style-name="Text_20_body"><text:tab/><text:span text:style-name="T40">In the board revision A does not have test points, they are missing.</text:span></text:p>
      <text:h text:style-name="Heading_20_3" text:outline-level="3">6.2. 68k Assembly Routine for Memory March Test (RAM Test)</text:h>
      <text:p text:style-name="Text_20_body"/>
      <text:p text:style-name="Preformatted_20_Text"><text:span text:style-name="Source_20_Text">; =============================================================================</text:span></text:p>
      <text:p text:style-name="Preformatted_20_Text"><text:span text:style-name="Source_20_Text">; PDS100 SRAM MARCH TEST ROUTINE (16-BIT WORDS)</text:span></text:p>
      <text:p text:style-name="Preformatted_20_Text"><text:span text:style-name="Source_20_Text">; =============================================================================</text:span></text:p>
      <text:p text:style-name="Preformatted_20_Text"><text:span text:style-name="Source_20_Text"><text:s text:c="8"/>ORG <text:s text:c="4"/>$00001000 <text:s text:c="6"/>; Example execution address in RAM/ROM</text:span></text:p>
      <text:p text:style-name="Preformatted_20_Text"/>
      <text:p text:style-name="Preformatted_20_Text"><text:span text:style-name="Source_20_Text">RAM_START <text:s text:c="2"/>EQU <text:s text:c="4"/>$00002000 <text:s text:c="2"/>; Define your PDS100 RAM base address here</text:span></text:p>
      <text:p text:style-name="Preformatted_20_Text"><text:span text:style-name="Source_20_Text">RAM_END <text:s text:c="4"/>EQU <text:s text:c="4"/>$003FFFFF <text:s text:c="2"/>; Define your 4MB upper limit here</text:span></text:p>
      <text:p text:style-name="Preformatted_20_Text"><text:span text:style-name="Source_20_Text">TEST_PAT1 <text:s text:c="2"/>EQU <text:s text:c="4"/>$5555 <text:s text:c="6"/>; Alternating bit pattern 1 (0101...)</text:span></text:p>
      <text:p text:style-name="Preformatted_20_Text"><text:span text:style-name="Source_20_Text">TEST_PAT2 <text:s text:c="2"/>EQU <text:s text:c="4"/>$AAAA <text:s text:c="6"/>; Alternating bit pattern 2 (1010...)</text:span></text:p>
      <text:p text:style-name="Preformatted_20_Text"/>
      <text:p text:style-name="Preformatted_20_Text"><text:span text:style-name="Source_20_Text">START_TEST:</text:span></text:p>
      <text:p text:style-name="Preformatted_20_Text"><text:span text:style-name="Source_20_Text"><text:s text:c="8"/>LEA <text:s text:c="4"/>RAM_START,A0 <text:s text:c="3"/>; Load start address into Pointer A0</text:span></text:p>
      <text:p text:style-name="Preformatted_20_Text"><text:span text:style-name="Source_20_Text"><text:s text:c="8"/>MOVE.L <text:s/>#TEST_PAT1,D0 <text:s text:c="2"/>; Load first test pattern into D0</text:span></text:p>
      <text:p text:style-name="Preformatted_20_Text"/>
      <text:p text:style-name="Preformatted_20_Text"><text:span text:style-name="Source_20_Text">; --- WRITE PHASE 1 ---</text:span></text:p>
      <text:p text:style-name="Preformatted_20_Text"><text:span text:style-name="Source_20_Text">WRITE_LOOP:</text:span></text:p>
      <text:p text:style-name="Preformatted_20_Text"><text:span text:style-name="Source_20_Text"><text:s text:c="8"/>MOVE.W <text:s/>D0,(A0)+ <text:s text:c="7"/>; Write pattern to current address, move to next</text:span></text:p>
      <text:p text:style-name="Preformatted_20_Text"><text:span text:style-name="Source_20_Text"><text:s text:c="8"/>CMPA.L <text:s/>#RAM_END,A0 <text:s text:c="4"/>; Check if we reached the end of RAM</text:span></text:p>
      <text:p text:style-name="Preformatted_20_Text"><text:span text:style-name="Source_20_Text"><text:s text:c="8"/>BNE <text:s text:c="4"/>WRITE_LOOP <text:s text:c="5"/>; If not, keep writing</text:span></text:p>
      <text:p text:style-name="Preformatted_20_Text"/>
      <text:p text:style-name="Preformatted_20_Text"><text:span text:style-name="Source_20_Text">; --- READ &amp; VERIFY PHASE 2 ---</text:span></text:p>
      <text:p text:style-name="Preformatted_20_Text"><text:span text:style-name="Source_20_Text"><text:s text:c="8"/>LEA <text:s text:c="4"/>RAM_START,A0 <text:s text:c="3"/>; Reset pointer to start of RAM</text:span></text:p>
      <text:p text:style-name="Preformatted_20_Text"><text:span text:style-name="Source_20_Text">VERIFY_LOOP:</text:span></text:p>
      <text:p text:style-name="Preformatted_20_Text"><text:span text:style-name="Source_20_Text"><text:s text:c="8"/>MOVE.W <text:s/>(A0)+,D1 <text:s text:c="7"/>; Read value from RAM into D1</text:span></text:p>
      <text:p text:style-name="Preformatted_20_Text"><text:span text:style-name="Source_20_Text"><text:s text:c="8"/>CMP.W <text:s text:c="2"/>D0,D1 <text:s text:c="10"/>; Compare read value with original pattern</text:span></text:p>
      <text:p text:style-name="Preformatted_20_Text"><text:span text:style-name="Source_20_Text"><text:s text:c="8"/>BNE <text:s text:c="4"/>RAM_FAIL <text:s text:c="7"/>; If mismatch, jump to fail routine</text:span></text:p>
      <text:p text:style-name="Preformatted_20_Text"><text:span text:style-name="Source_20_Text"><text:s text:c="8"/>CMPA.L <text:s/>#RAM_END,A0 <text:s text:c="4"/>; Check if we verified all memory</text:span></text:p>
      <text:p text:style-name="Preformatted_20_Text"><text:span text:style-name="Source_20_Text"><text:s text:c="8"/>BNE <text:s text:c="4"/>VERIFY_LOOP <text:s text:c="4"/>; If not, keep verifying</text:span></text:p>
      <text:p text:style-name="Preformatted_20_Text"/>
      <text:p text:style-name="Preformatted_20_Text"><text:span text:style-name="Source_20_Text">RAM_PASS:</text:span></text:p>
      <text:p text:style-name="Preformatted_20_Text"><text:span text:style-name="Source_20_Text"><text:s text:c="8"/>; Put your "LED On" or Serial Out Success code here (System Alive!)</text:span></text:p>
      <text:p text:style-name="Preformatted_20_Text"><text:span text:style-name="Source_20_Text"><text:s text:c="8"/>BRA <text:s text:c="4"/>RAM_PASS</text:span></text:p>
      <text:p text:style-name="Preformatted_20_Text"/>
      <text:p text:style-name="Preformatted_20_Text"><text:span text:style-name="Source_20_Text">RAM_FAIL:</text:span></text:p>
      <text:p text:style-name="Preformatted_20_Text"><text:span text:style-name="Source_20_Text"><text:s text:c="8"/>; Address of failure is stored in A0 (minus 2 due to post-increment)</text:span></text:p>
      <text:p text:style-name="Preformatted_20_Text"><text:span text:style-name="Source_20_Text"><text:s text:c="8"/>; Put your Error Handling / Halt code here</text:span></text:p>
      <text:p text:style-name="P12"><text:span text:style-name="Source_20_Text"><text:s text:c="8"/>ILLEGAL <text:s text:c="16"/>; Force exception for debugging</text:span></text:p>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ela1" table:style-name="Tabela1">
        <table:table-column table:style-name="Tabela1.A"/>
        <table:table-column table:style-name="Tabela1.B" table:number-columns-repeated="3"/>
        <table:table-row table:style-name="Tabela1.1">
          <table:table-cell table:style-name="Tabela1.A1" office:value-type="string">
            <text:p text:style-name="P98">Date</text:p>
          </table:table-cell>
          <table:table-cell table:style-name="Tabela1.A1" office:value-type="string">
            <text:p text:style-name="P97">Revision</text:p>
          </table:table-cell>
          <table:table-cell table:style-name="Tabela1.A1" office:value-type="string">
            <text:p text:style-name="P97">Author</text:p>
          </table:table-cell>
          <table:table-cell table:style-name="Tabela1.A1" office:value-type="string">
            <text:p text:style-name="P97">Mod.</text:p>
          </table:table-cell>
        </table:table-row>
        <table:table-row>
          <table:table-cell table:style-name="Tabela1.A1" office:value-type="string">
            <text:p text:style-name="P98">2026/06/22</text:p>
          </table:table-cell>
          <table:table-cell table:style-name="Tabela1.A1" office:value-type="string">
            <text:p text:style-name="P97">A</text:p>
          </table:table-cell>
          <table:table-cell table:style-name="Tabela1.A1" office:value-type="string">
            <text:p text:style-name="P97">pdsilva</text:p>
          </table:table-cell>
          <table:table-cell table:style-name="Tabela1.A1" office:value-type="string">
            <text:p text:style-name="P97">Initial</text:p>
          </table:table-cell>
        </table:table-row>
        <table:table-row>
          <table:table-cell table:style-name="Tabela1.A1" office:value-type="string">
            <text:p text:style-name="P96"/>
          </table:table-cell>
          <table:table-cell table:style-name="Tabela1.A1" office:value-type="string">
            <text:p text:style-name="P96"/>
          </table:table-cell>
          <table:table-cell table:style-name="Tabela1.A1" office:value-type="string">
            <text:p text:style-name="P96"/>
          </table:table-cell>
          <table:table-cell table:style-name="Tabela1.A1" office:value-type="string">
            <text:p text:style-name="P97"/>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5">Intentionaly left blank</text:p>
      <text:h text:style-name="P63" text:outline-level="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5">Intentionaly left bla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style:font-face style:name="Ubuntu Sans" svg:font-family="'Ubuntu Sans'" style:font-family-generic="swiss"/>
    <style:font-face style:name="Ubuntu Sans1" svg:font-family="'Ubuntu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Ubuntu Sans" fo:font-size="13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Ubuntu Sans" fo:font-size="13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3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Ubuntu Sans" fo:font-family="'Ubunt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Sans" fo:font-family="'Ubuntu Sans'" style:font-family-generic="swiss" fo:font-size="13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Sans" fo:font-family="'Ubuntu Sans'" style:font-family-generic="swis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0e78bf"/>
    </style:style>
    <style:style style:name="MP2" style:family="paragraph" style:parent-style-name="Header">
      <style:paragraph-properties fo:text-align="end" style:justify-single-word="false"/>
      <style:text-properties officeooo:paragraph-rsid="000e78bf"/>
    </style:style>
    <style:style style:name="MP3" style:family="paragraph" style:parent-style-name="Footer">
      <style:paragraph-properties fo:text-align="end" style:justify-single-word="false"/>
      <style:text-properties officeooo:rsid="00127bdc" officeooo:paragraph-rsid="00155e02"/>
    </style:style>
    <style:style style:name="MP4" style:family="paragraph" style:parent-style-name="Footer">
      <style:text-properties officeooo:rsid="001560d0" officeooo:paragraph-rsid="001560d0"/>
    </style:style>
    <style:style style:name="MP5" style:family="paragraph" style:parent-style-name="Footer">
      <style:paragraph-properties fo:text-align="start" style:justify-single-word="false"/>
      <style:text-properties officeooo:rsid="00127bdc" officeooo:paragraph-rsid="001301e0"/>
    </style:style>
    <style:style style:name="MP6" style:family="paragraph" style:parent-style-name="Footer">
      <style:paragraph-properties fo:text-align="start" style:justify-single-word="false"/>
      <style:text-properties officeooo:rsid="00127bdc" officeooo:paragraph-rsid="00127bdc"/>
    </style:style>
    <style:style style:name="MT1" style:family="text">
      <style:text-properties fo:font-weight="bold" officeooo:rsid="000e78bf" style:font-weight-asian="bold" style:font-weight-complex="bold"/>
    </style:style>
    <style:style style:name="MT2" style:family="text">
      <style:text-properties fo:font-weight="normal" officeooo:rsid="000e78bf" style:font-weight-asian="normal" style:font-weight-complex="normal"/>
    </style:style>
    <style:style style:name="MT3" style:family="text">
      <style:text-properties fo:font-weight="normal" officeooo:rsid="003f35f7" style:font-weight-asian="normal" style:font-weight-complex="normal"/>
    </style:style>
    <style:style style:name="MT4" style:family="text">
      <style:text-properties officeooo:rsid="00155e02"/>
    </style:style>
    <style:style style:name="MT5" style:family="text">
      <style:text-properties fo:color="#0000ff" loext:opacity="100%"/>
    </style:style>
    <style:page-layout style:name="Mpm1">
      <style:page-layout-properties fo:page-width="21.001cm" fo:page-height="29.7cm" style:num-format="1" style:print-orientation="portrait" fo:margin-top="2cm" fo:margin-bottom="2cm" fo:margin-left="0.741cm" fo:margin-right="0.85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ISTEMA COMPUTACIONAL PDS317 <text:s text:c="9"/></text:span><text:span text:style-name="MT2">Módulo CPU PDS</text:span><text:span text:style-name="MT3">100</text:span><text:span text:style-name="MT2"> — Manual Técnico</text:span></text:p>
        <text:p text:style-name="MP2">Rev. 1.0</text:p>
      </style:header>
      <style:header-first>
        <text:p text:style-name="MP1"><text:span text:style-name="MT2"/></text:p>
      </style:header-first>
      <style:footer>
        <text:p text:style-name="MP3">PDS<text:span text:style-name="MT4">100 – Memory board</text:span><text:tab/><text:tab/>pag.: <text:s/><text:bookmark-start text:name="PageNumWizard_FOOTER_Default Page Style3"/><text:bookmark-start text:name="PageNumWizard_FOOTER_Default Page Style3 Copy 1"/><text:bookmark-start text:name="PageNumWizard_FOOTER_Default Page Style3 Copy 3"/><text:page-number text:select-page="current">21</text:page-number><text:bookmark-end text:name="PageNumWizard_FOOTER_Default Page Style3"/><text:bookmark-end text:name="PageNumWizard_FOOTER_Default Page Style3 Copy 1"/><text:s/>/ <text:page-count>22</text:page-count><text:bookmark-end text:name="PageNumWizard_FOOTER_Default Page Style3 Copy 3"/></text:p>
      </style:footer>
      <style:footer-left>
        <text:p text:style-name="MP5">PDS<text:span text:style-name="MT4">100 – Memory board</text:span><text:tab/><text:tab/>pag.: <text:s/><text:bookmark-start text:name="PageNumWizard_FOOTER_Default Page Style4"/><text:page-number text:select-page="current">22</text:page-number><text:s/>/ <text:page-count>22</text:page-count><text:bookmark-end text:name="PageNumWizard_FOOTER_Default Page Style4"/></text:p>
        <text:p text:style-name="MP6"><text:bookmark text:name="PageNumWizard_FOOTER_Default Page Style2"/></text:p>
        <text:p text:style-name="MP6"/>
      </style:footer-left>
      <style:footer-first>
        <text:p text:style-name="MP4"><text:tab/><text:tab/><text:span text:style-name="MT5">Memory board PDS100</text:span></text:p>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22T09:46:48.107988274</meta:creation-date>
    <dc:date>2026-06-22T15:01:11.356414807</dc:date>
    <meta:editing-duration>PT2H11M43S</meta:editing-duration>
    <meta:editing-cycles>42</meta:editing-cycles>
    <meta:generator>LibreOffice/24.2.7.2$Linux_X86_64 LibreOffice_project/420$Build-2</meta:generator>
    <meta:document-statistic meta:table-count="14" meta:image-count="1" meta:object-count="0" meta:page-count="22" meta:paragraph-count="521" meta:word-count="3825" meta:character-count="23491" meta:non-whitespace-character-count="19664"/>
  </office:meta>
</office:document-meta>
</file>
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Visão Geral do Sistema (Aplica o estilo: <text:span text:style-name="T1">Título 1</text:span>)</text:h>
      <text:list text:style-name="L1">
        <text:list-item>
          <text:p text:style-name="P1"><text:span text:style-name="T1">1.1. Introdução à Arquitetura PDS317</text:span> (Aplica o estilo: <text:span text:style-name="T1">Título 2</text:span>)</text:p>
        </text:list-item>
        <text:list-item>
          <text:p text:style-name="P1"><text:span text:style-name="T1">1.2. Barramento de Expansão e Backplane DIN 41612</text:span> (Estilo: <text:span text:style-name="T1">Título 2</text:span>)</text:p>
        </text:list-item>
      </text:list>
      <text:h text:style-name="Heading_20_3" text:outline-level="3">2. Módulo CPU - PDS600 (Aplica o estilo: <text:span text:style-name="T1">Título 1</text:span>)</text:h>
      <text:list text:style-name="L2">
        <text:list-item>
          <text:p text:style-name="P2"><text:span text:style-name="T1">2.1. Especificações Técnicas e Processador MC68000</text:span> (Estilo: <text:span text:style-name="T1">Título 2</text:span>)</text:p>
        </text:list-item>
        <text:list-item>
          <text:p text:style-name="P2"><text:span text:style-name="T1">2.2. Subsistema de Clock e Sincronismo</text:span> (Estilo: <text:span text:style-name="T1">Título 2</text:span>)</text:p>
        </text:list-item>
        <text:list-item>
          <text:p text:style-name="P2"><text:span text:style-name="T1">2.3. Lógica de Interrupção e Controle (ATmega8-16P)</text:span> (Estilo: <text:span text:style-name="T1">Título 2</text:span>)</text:p>
        </text:list-item>
        <text:list-item>
          <text:p text:style-name="P2"><text:span text:style-name="T1">2.4. Circuito de Inicialização (Reset, Halt e MFT555)</text:span> (Estilo: <text:span text:style-name="T1">Título 2</text:span>)</text:p>
        </text:list-item>
        <text:list-item>
          <text:p text:style-name="P2"><text:span text:style-name="T1">2.5. Configuração de Jumpers da CPU</text:span> (Estilo: <text:span text:style-name="T1">Título 2</text:span>)</text:p>
        </text:list-item>
      </text:list>
      <text:h text:style-name="Heading_20_3" text:outline-level="3">3. Módulo de Memória RAM - PDS100 (Aplica o estilo: <text:span text:style-name="T1">Título 1</text:span>)</text:h>
      <text:list text:style-name="L3">
        <text:list-item>
          <text:p text:style-name="P3"><text:span text:style-name="T1">3.1. Arquitetura do Barramento de 16-bits (HIGH / LOW)</text:span> (Estilo: <text:span text:style-name="T1">Título 2</text:span>)</text:p>
        </text:list-item>
        <text:list-item>
          <text:p text:style-name="P3"><text:span text:style-name="T1">3.2. Dimensionamento das Trilhas de Alimentação (VCC/GND)</text:span> (Estilo: <text:span text:style-name="T1">Título 2</text:span>) <text:span text:style-name="T2">-&gt; Pra deixar registrado o orgulho dos 0,5 mm!</text:span></text:p>
        </text:list-item>
        <text:list-item>
          <text:p text:style-name="P3"><text:span text:style-name="T1">3.3. Capacitores de Desacoplamento e Integridade de Sinal</text:span> (Estilo: <text:span text:style-name="T1">Título 2</text:span>)</text:p>
        </text:list-item>
      </text:list>
      <text:h text:style-name="Heading_20_3" text:outline-level="3">4. Mapa de Memória e Decodificação de Endereços (Aplica o estilo: <text:span text:style-name="T1">Título 1</text:span>)</text:h>
      <text:list text:style-name="L4">
        <text:list-item>
          <text:p text:style-name="P4"><text:span text:style-name="T1">4.1. Alocação de Espaço de Endereçamento do 68k</text:span> (Estilo: <text:span text:style-name="T1">Título 2</text:span>)</text:p>
        </text:list-item>
        <text:list-item>
          <text:p text:style-name="P4"><text:span text:style-name="T1">4.2. Lógica de Boot e Espelhamento (Kickstart)</text:span> (Estilo: <text:span text:style-name="T1">Título 2</text:span>)</text:p>
        </text:list-item>
        <text:list-item>
          <text:p text:style-name="P4"><text:span text:style-name="T1">4.3. Equações Lógicas dos Chips GAL (WinCUPL/GALasm)</text:span> (Estilo: <text:span text:style-name="T1">Título 2</text:span>)</text:p>
        </text:list-item>
      </text:list>
      <text:h text:style-name="Heading_20_3" text:outline-level="3">5. Subsistema de Comunicação Serial (Aplica o estilo: <text:span text:style-name="T1">Título 1</text:span>)</text:h>
      <text:list text:style-name="L5">
        <text:list-item>
          <text:p text:style-name="P5"><text:span text:style-name="T1">5.1. Interface UART 16C554</text:span> (Estilo: <text:span text:style-name="T1">Título 2</text:span>)</text:p>
        </text:list-item>
        <text:list-item>
          <text:p text:style-name="P5"><text:span text:style-name="T1">5.2. Configuração de Taxa de Transmissão (115200 Baud)</text:span> (Estilo: <text:span text:style-name="T1">Título 2</text:span>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Sans" fo:font-family="'Ubuntu Sans'" style:font-family-generic="swiss" fo:font-size="13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2T10:43:00.253972578</meta:creation-date>
    <dc:date>2026-06-22T10:44:06.829123842</dc:date>
    <meta:editing-duration>PT1M7S</meta:editing-duration>
    <meta:editing-cycles>1</meta:editing-cycles>
    <meta:document-statistic meta:table-count="0" meta:image-count="0" meta:object-count="0" meta:page-count="1" meta:paragraph-count="20" meta:word-count="230" meta:character-count="1363" meta:non-whitespace-character-count="1168"/>
    <meta:generator>LibreOffice/24.2.7.2$Linux_X86_64 LibreOffice_project/420$Build-2</meta:generator>
  </office:meta>
</office:document-meta>
</file>
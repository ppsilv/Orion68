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27bdc" officeooo:paragraph-rsid="00127bdc"/>
    </style:style>
    <style:style style:name="P2" style:family="paragraph" style:parent-style-name="Footer">
      <style:paragraph-properties fo:text-align="start" style:justify-single-word="false"/>
      <style:text-properties officeooo:rsid="00127bdc" officeooo:paragraph-rsid="001301e0"/>
    </style:style>
    <style:style style:name="P3" style:family="paragraph" style:parent-style-name="Footer">
      <style:paragraph-properties fo:text-align="end" style:justify-single-word="false"/>
      <style:text-properties officeooo:rsid="00127bdc" officeooo:paragraph-rsid="001396d9"/>
    </style:style>
    <style:style style:name="P4" style:family="paragraph" style:parent-style-name="Header">
      <style:paragraph-properties fo:text-align="end" style:justify-single-word="false"/>
      <style:text-properties officeooo:paragraph-rsid="000e78bf"/>
    </style:style>
    <style:style style:name="P5" style:family="paragraph" style:parent-style-name="Header">
      <style:text-properties officeooo:paragraph-rsid="000e78bf"/>
    </style:style>
    <style:style style:name="P6" style:family="paragraph" style:parent-style-name="Standard">
      <style:text-properties officeooo:rsid="000e78bf" officeooo:paragraph-rsid="000e78bf"/>
    </style:style>
    <style:style style:name="P7" style:family="paragraph" style:parent-style-name="Standard">
      <style:paragraph-properties fo:break-before="page"/>
      <style:text-properties officeooo:rsid="000e78bf" officeooo:paragraph-rsid="000e78bf"/>
    </style:style>
    <style:style style:name="P8" style:family="paragraph" style:parent-style-name="Standard">
      <style:paragraph-properties fo:text-align="center" style:justify-single-word="false"/>
      <style:text-properties officeooo:rsid="000e78bf" officeooo:paragraph-rsid="000e78bf"/>
    </style:style>
    <style:style style:name="P9" style:family="paragraph" style:parent-style-name="Standard">
      <style:paragraph-properties fo:text-align="center" style:justify-single-word="false"/>
      <style:text-properties fo:color="#0000ff" loext:opacity="100%" fo:font-weight="bold" officeooo:rsid="000e78bf" officeooo:paragraph-rsid="000e78bf" style:font-weight-asian="bold" style:font-weight-complex="bold"/>
    </style:style>
    <style:style style:name="T1" style:family="text">
      <style:text-properties fo:font-weight="normal" officeooo:rsid="000e78bf" style:font-weight-asian="normal" style:font-weight-complex="normal"/>
    </style:style>
    <style:style style:name="T2" style:family="text">
      <style:text-properties fo:font-weight="bold" officeooo:rsid="000e78bf" style:font-weight-asian="bold" style:font-weight-complex="bold"/>
    </style:style>
    <style:style style:name="T3" style:family="text">
      <style:text-properties fo:color="#0000ff" loext:opacity="100%" fo:font-weight="bold" style:font-weight-asian="bold" style:font-weight-complex="bold"/>
    </style:style>
    <style:style style:name="T4" style:family="text">
      <style:text-properties officeooo:rsid="00114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==================================================</text:p>
      <text:p text:style-name="P8">SISTEMA PDS317</text:p>
      <text:p text:style-name="P8">Manual Técnico do Módulo <text:span text:style-name="T3">==================================================</text:span> 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utor: pdsilva<text:span text:style-name="T4">(aka pgordao)</text:span></text:p>
      <text:p text:style-name="P6">Data: Junho de 2026 </text:p>
      <text:p text:style-name="P6">Versão: 1.0</text:p>
      <text:p text:style-name="P7">Índic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e78bf"/>
    </style:style>
    <style:style style:name="MP2" style:family="paragraph" style:parent-style-name="Header">
      <style:paragraph-properties fo:text-align="end" style:justify-single-word="false"/>
      <style:text-properties officeooo:paragraph-rsid="000e78bf"/>
    </style:style>
    <style:style style:name="MP3" style:family="paragraph" style:parent-style-name="Footer">
      <style:paragraph-properties fo:text-align="end" style:justify-single-word="false"/>
      <style:text-properties officeooo:rsid="00127bdc" officeooo:paragraph-rsid="001396d9"/>
    </style:style>
    <style:style style:name="MP4" style:family="paragraph" style:parent-style-name="Footer">
      <style:paragraph-properties fo:text-align="start" style:justify-single-word="false"/>
      <style:text-properties officeooo:rsid="00127bdc" officeooo:paragraph-rsid="001301e0"/>
    </style:style>
    <style:style style:name="MP5" style:family="paragraph" style:parent-style-name="Footer">
      <style:paragraph-properties fo:text-align="start" style:justify-single-word="false"/>
      <style:text-properties officeooo:rsid="00127bdc" officeooo:paragraph-rsid="00127bdc"/>
    </style:style>
    <style:style style:name="MT1" style:family="text">
      <style:text-properties fo:font-weight="bold" officeooo:rsid="000e78bf" style:font-weight-asian="bold" style:font-weight-complex="bold"/>
    </style:style>
    <style:style style:name="MT2" style:family="text">
      <style:text-properties fo:font-weight="normal" officeooo:rsid="000e78bf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ISTEMA COMPUTACIONAL PDS317 <text:s text:c="9"/></text:span><text:span text:style-name="MT2">Módulo CPU PDSxxx — Manual Técnico</text:span></text:p>
        <text:p text:style-name="MP2">Rev. 1.0</text:p>
      </style:header>
      <style:header-first>
        <text:p text:style-name="MP1"><text:span text:style-name="MT2"/></text:p>
      </style:header-first>
      <style:footer>
        <text:p text:style-name="MP3">PDS317 – Especificação técnica<text:tab/><text:tab/>pag.: <text:s/><text:bookmark-start text:name="PageNumWizard_FOOTER_Default Page Style3"/><text:bookmark-start text:name="PageNumWizard_FOOTER_Default Page Style3 Copy 1"/><text:bookmark-start text:name="PageNumWizard_FOOTER_Default Page Style3 Copy 3"/><text:page-number text:select-page="current">5</text:page-number><text:bookmark-end text:name="PageNumWizard_FOOTER_Default Page Style3"/><text:bookmark-end text:name="PageNumWizard_FOOTER_Default Page Style3 Copy 1"/><text:s/>/ <text:page-count>8</text:page-count><text:bookmark-end text:name="PageNumWizard_FOOTER_Default Page Style3 Copy 3"/></text:p>
      </style:footer>
      <style:footer-left>
        <text:p text:style-name="MP4">PDS317 – Especificação técnica<text:tab/><text:tab/>pag.: <text:s/><text:bookmark-start text:name="PageNumWizard_FOOTER_Default Page Style4"/><text:page-number text:select-page="current">8</text:page-number><text:s/>/ <text:page-count>8</text:page-count><text:bookmark-end text:name="PageNumWizard_FOOTER_Default Page Style4"/></text:p>
        <text:p text:style-name="MP5"><text:bookmark text:name="PageNumWizard_FOOTER_Default Page Style2"/></text:p>
        <text:p text:style-name="MP5"/>
      </style:footer-left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09:46:48.107988274</meta:creation-date>
    <dc:date>2026-06-22T10:24:05.471881713</dc:date>
    <meta:editing-duration>PT37M15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8" meta:paragraph-count="11" meta:word-count="42" meta:character-count="373" meta:non-whitespace-character-count="324"/>
  </office:meta>
</office:document-meta>
</file>
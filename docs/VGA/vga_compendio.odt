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FreeMono" svg:font-family="FreeMono" style:font-family-generic="modern" style:font-pitch="fixed"/>
    <style:font-face style:name="Google Sans" svg:font-family="'Google Sans', Roboto, RobotoDraft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  <style:font-face style:name="google sans" svg:font-family="'google sans', sans-serif"/>
    <style:font-face style:name="google sans text" svg:font-family="'google sans text'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" fo:font-size="14pt" fo:letter-spacing="normal" fo:font-style="normal" fo:font-weight="normal" loext:padding="0cm" loext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bold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14%" fo:padding="0cm" fo:border="none" style:writing-mode="lr-tb"/>
    </style:style>
    <style:style style:name="P5" style:family="paragraph" style:parent-style-name="Quotations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bold" loext:padding="0cm" loext:border="none"/>
    </style:style>
    <style:style style:name="P6" style:family="paragraph" style:parent-style-name="Quotations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7" style:family="paragraph" style:parent-style-name="Quotations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8" style:family="paragraph" style:parent-style-name="Quotations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indent="0cm" style:auto-text-indent="fals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loext:opacity="100%" style:font-name="Google Sans" fo:font-size="14pt" fo:letter-spacing="normal" fo:font-style="normal" fo:font-weight="normal" style:font-name-asian="Google Sans" style:font-size-asian="14pt" style:font-style-asian="normal" style:font-weight-asian="normal" style:font-name-complex="Google Sans" style:font-size-complex="14pt" style:font-style-complex="normal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color="#1f1f1f" loext:opacity="100%" style:font-name="google sans text"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20" style:family="paragraph" style:parent-style-name="Text_20_body" style:list-style-name="L10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ffffff" loext:opacity="100%" style:font-name="google sans text" fo:font-size="14pt" fo:letter-spacing="normal" fo:font-style="normal" fo:font-weight="normal" loext:padding="0cm" loext:border="none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27" style:family="paragraph" style:parent-style-name="Text_20_body" style:list-style-name="L7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P28" style:family="paragraph" style:parent-style-name="Text_20_body" style:list-style-name="L8">
      <style:paragraph-properties fo:margin-left="0cm" fo:margin-right="0cm" fo:margin-top="0cm" fo:margin-bottom="0cm" style:contextual-spacing="false" fo:line-height="114%" fo:text-indent="0cm" style:auto-text-indent="false" fo:padding="0cm" fo:border="none"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000000" loext:char-shading-value="0" style:font-weight-asian="bold" style:font-weight-complex="bold"/>
    </style:style>
    <style:style style:name="T6" style:family="text">
      <style:text-properties loext:padding="0cm" loext:border="none"/>
    </style:style>
    <style:style style:name="T7" style:family="text">
      <style:text-properties fo:font-variant="normal" fo:text-transform="none" fo:color="#1f1f1f" loext:opacity="100%" style:font-name="google sans text" fo:font-size="14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1f1f1f" loext:opacity="100%" style:font-name="google sans text" fo:font-size="14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1f1f1f" loext:opacity="100%" style:font-name="google sans text" fo:font-size="14pt" fo:letter-spacing="normal" fo:font-style="italic" fo:font-weight="normal" loext:padding="0cm" loext:border="none"/>
    </style:style>
    <style:style style:name="T10" style:family="text">
      <style:text-properties fo:font-variant="normal" fo:text-transform="none" fo:color="#000000" loext:opacity="55%" style:font-name="google sans text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222222" loext:opacity="100%" style:font-name="Google Sans" fo:font-size="14pt" fo:letter-spacing="normal" fo:font-style="normal" fo:font-weight="normal" style:font-name-asian="Google Sans" style:font-size-asian="14pt" style:font-style-asian="normal" style:font-weight-asian="normal" style:font-name-complex="Google Sans" style:font-size-complex="14pt" style:font-style-complex="normal" style:font-weight-complex="normal" loext:padding="0cm" loext:border="none"/>
    </style:style>
    <style:style style:name="T12" style:family="text">
      <style:text-properties fo:font-variant="normal" fo:text-transform="none" fo:color="#ffffff" loext:opacity="100%" style:font-name="google sans text" fo:font-size="10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ffffff" loext:opacity="100%" style:font-name="google sans text" fo:font-size="10.5pt" fo:letter-spacing="normal" fo:font-style="normal" loext:padding="0cm" loext:border="none"/>
    </style:style>
    <style:style style:name="T14" style:family="text">
      <style:text-properties fo:font-variant="normal" fo:text-transform="none" fo:color="#ffffff" loext:opacity="100%" style:font-name="google sans text" fo:font-size="10.5pt" fo:letter-spacing="normal" fo:font-style="normal" fo:font-weight="bold" style:font-weight-asian="bold" style:font-weight-complex="bold" loext:padding="0cm" loext:border="none"/>
    </style:style>
    <style:style style:name="T15" style:family="text">
      <style:text-properties fo:font-variant="normal" fo:text-transform="none" fo:color="#ffffff" loext:opacity="100%" style:font-name="google sans text" fo:font-size="10.5pt" fo:letter-spacing="normal" fo:font-style="normal" fo:font-weight="bold" style:font-weight-asian="bold" style:font-weight-complex="bold" loext:padding="0cm" loext:border="none"/>
    </style:style>
    <style:style style:name="T16" style:family="text">
      <style:text-properties fo:font-variant="normal" fo:text-transform="none" fo:color="#ffffff" loext:opacity="100%" style:font-name="google sans text" fo:font-size="10.5pt" fo:letter-spacing="normal" fo:font-style="normal" fo:font-weight="bold" fo:background-color="#ffff00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ffffff" loext:opacity="100%" style:font-name="google sans text" fo:font-size="10.5pt" fo:letter-spacing="normal" fo:font-style="normal" fo:font-weight="bold" fo:background-color="#ffff00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ffffff" loext:opacity="100%" style:font-name="google sans text" fo:font-size="10.5pt" fo:letter-spacing="normal" fo:font-style="normal" fo:font-weight="bold" fo:background-color="#000000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ffffff" loext:opacity="100%" style:font-name="google sans text" fo:font-size="10.5pt" fo:letter-spacing="normal" fo:font-style="normal" fo:font-weight="bold" fo:background-color="#000000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ffffff" loext:opacity="100%" style:font-name="google sans text" fo:letter-spacing="normal" fo:font-style="normal" fo:font-weight="bold" fo:background-color="#000000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ffffff" loext:opacity="100%" style:font-name="google sans text" fo:font-size="11pt" fo:letter-spacing="normal" fo:font-style="normal" fo:font-weight="bold" fo:background-color="#000000" loext:char-shading-value="0" style:font-size-asian="11pt" style:font-weight-asian="bold" style:font-size-complex="11pt" style:font-weight-complex="bold" loext:padding="0cm" loext:border="none"/>
    </style:style>
    <style:style style:name="T22" style:family="text">
      <style:text-properties fo:font-variant="normal" fo:text-transform="none" fo:color="#ffffff" loext:opacity="100%" style:font-name="google sans text" fo:font-size="9pt" fo:letter-spacing="normal" fo:font-style="normal" fo:font-weight="bold" fo:background-color="#000000" loext:char-shading-value="0" style:font-size-asian="9pt" style:font-weight-asian="bold" style:font-size-complex="9pt" style:font-weight-complex="bold" loext:padding="0cm" loext:border="none"/>
    </style:style>
    <style:style style:name="T23" style:family="text">
      <style:text-properties fo:font-variant="normal" fo:text-transform="none" fo:color="#ffffff" loext:opacity="100%" style:font-name="google sans text" fo:font-size="6pt" fo:letter-spacing="normal" fo:font-style="normal" fo:font-weight="bold" fo:background-color="#000000" loext:char-shading-value="0" style:font-size-asian="6pt" style:font-weight-asian="bold" style:font-size-complex="6pt" style:font-weight-complex="bold" loext:padding="0cm" loext:border="none"/>
    </style:style>
    <style:style style:name="T24" style:family="text">
      <style:text-properties fo:font-variant="normal" fo:text-transform="none" fo:color="#ffffff" loext:opacity="100%" style:font-name="google sans text" fo:font-size="7pt" fo:letter-spacing="normal" fo:font-style="normal" fo:font-weight="bold" fo:background-color="#000000" loext:char-shading-value="0" style:font-size-asian="7pt" style:font-weight-asian="bold" style:font-size-complex="7pt" style:font-weight-complex="bold" loext:padding="0cm" loext:border="none"/>
    </style:style>
    <style:style style:name="T25" style:family="text">
      <style:text-properties fo:font-variant="normal" fo:text-transform="none" fo:color="#ffffff" loext:opacity="100%" style:font-name="google sans text" fo:font-size="8pt" fo:letter-spacing="normal" fo:font-style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26" style:family="text">
      <style:text-properties fo:font-variant="normal" fo:text-transform="none" fo:color="#ffffff" loext:opacity="100%" fo:letter-spacing="normal" loext:padding="0cm" loext:border="none"/>
    </style:style>
    <style:style style:name="T27" style:family="text">
      <style:text-properties fo:font-variant="normal" fo:text-transform="none" fo:color="#ffffff" loext:opacity="100%" fo:letter-spacing="normal" fo:font-weight="bold" style:font-weight-asian="bold" style:font-weight-complex="bold" loext:padding="0cm" loext:border="none"/>
    </style:style>
    <style:style style:name="T28" style:family="text">
      <style:text-properties fo:font-variant="normal" fo:text-transform="none" fo:color="#ffffff" loext:opacity="100%" fo:letter-spacing="normal" fo:font-weight="bold" style:font-weight-asian="bold" style:font-weight-complex="bold" loext:padding="0cm" loext:border="none"/>
    </style:style>
    <style:style style:name="T29" style:family="text">
      <style:text-properties fo:font-variant="normal" fo:text-transform="none" fo:color="#ffffff" loext:opacity="100%" fo:letter-spacing="normal" fo:font-weight="bold" fo:background-color="#ffff00" loext:char-shading-value="0" style:font-weight-asian="bold" style:font-weight-complex="bold" loext:padding="0cm" loext:border="none"/>
    </style:style>
    <style:style style:name="T30" style:family="text">
      <style:text-properties fo:font-variant="normal" fo:text-transform="none" fo:color="#ffffff" loext:opacity="100%" fo:letter-spacing="normal" fo:font-weight="bold" fo:background-color="#ffff00" loext:char-shading-value="0" style:font-weight-asian="bold" style:font-weight-complex="bold" loext:padding="0cm" loext:border="none"/>
    </style:style>
    <style:style style:name="T31" style:family="text">
      <style:text-properties fo:font-variant="normal" fo:text-transform="none" fo:color="#ffffff" loext:opacity="100%" fo:letter-spacing="normal" fo:font-weight="bold" fo:background-color="#000000" loext:char-shading-value="0" style:font-weight-asian="bold" style:font-weight-complex="bold" loext:padding="0cm" loext:border="none"/>
    </style:style>
    <style:style style:name="T32" style:family="text">
      <style:text-properties fo:font-variant="normal" fo:text-transform="none" fo:color="#ffffff" loext:opacity="100%" fo:letter-spacing="normal" fo:font-weight="bold" fo:background-color="#000000" loext:char-shading-value="0" style:font-weight-asian="bold" style:font-weight-complex="bold" loext:padding="0cm" loext:border="none"/>
    </style:style>
    <style:style style:name="T33" style:family="text">
      <style:text-properties fo:font-variant="normal" fo:text-transform="none" fo:color="#ffffff" loext:opacity="100%" fo:font-size="11pt" fo:letter-spacing="normal" fo:font-weight="bold" fo:background-color="#000000" loext:char-shading-value="0" style:font-size-asian="11pt" style:font-weight-asian="bold" style:font-size-complex="11pt" style:font-weight-complex="bold" loext:padding="0cm" loext:border="none"/>
    </style:style>
    <style:style style:name="T34" style:family="text">
      <style:text-properties fo:font-variant="normal" fo:text-transform="none" fo:color="#ffffff" loext:opacity="100%" fo:font-size="9pt" fo:letter-spacing="normal" fo:font-weight="bold" fo:background-color="#000000" loext:char-shading-value="0" style:font-size-asian="9pt" style:font-weight-asian="bold" style:font-size-complex="9pt" style:font-weight-complex="bold" loext:padding="0cm" loext:border="none"/>
    </style:style>
    <style:style style:name="T35" style:family="text">
      <style:text-properties fo:font-variant="normal" fo:text-transform="none" fo:color="#ffffff" loext:opacity="100%" fo:font-size="6pt" fo:letter-spacing="normal" fo:font-weight="bold" fo:background-color="#000000" loext:char-shading-value="0" style:font-size-asian="6pt" style:font-weight-asian="bold" style:font-size-complex="6pt" style:font-weight-complex="bold" loext:padding="0cm" loext:border="none"/>
    </style:style>
    <style:style style:name="T36" style:family="text">
      <style:text-properties fo:font-variant="normal" fo:text-transform="none" fo:color="#ffffff" loext:opacity="100%" fo:font-size="7pt" fo:letter-spacing="normal" fo:font-weight="bold" fo:background-color="#000000" loext:char-shading-value="0" style:font-size-asian="7pt" style:font-weight-asian="bold" style:font-size-complex="7pt" style:font-weight-complex="bold" loext:padding="0cm" loext:border="none"/>
    </style:style>
    <style:style style:name="T37" style:family="text">
      <style:text-properties fo:font-variant="normal" fo:text-transform="none" fo:color="#ffffff" loext:opacity="100%" fo:font-size="8pt" fo:letter-spacing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38" style:family="text">
      <style:text-properties fo:font-variant="normal" fo:text-transform="none" fo:color="#ffffff" loext:opacity="100%" fo:font-size="8pt" fo:letter-spacing="normal" fo:font-style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39" style:family="text">
      <style:text-properties fo:font-variant="normal" fo:text-transform="none" fo:color="#ffffff" loext:opacity="100%" style:font-name="FreeMono" fo:font-size="8pt" fo:letter-spacing="normal" fo:font-style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40" style:family="text">
      <style:text-properties fo:font-variant="normal" fo:text-transform="none" fo:color="#ffffff" loext:opacity="100%" style:font-name="FreeMono" fo:font-size="8pt" fo:letter-spacing="normal" fo:font-style="normal" fo:font-weight="normal" style:font-size-asian="8pt" style:font-size-complex="8pt" loext:padding="0cm" loext:border="none"/>
    </style:style>
    <style:style style:name="T41" style:family="text">
      <style:text-properties fo:font-variant="normal" fo:text-transform="none" fo:color="#ffffff" loext:opacity="100%" style:font-name="FreeMono" fo:font-size="8pt" fo:letter-spacing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42" style:family="text">
      <style:text-properties fo:font-variant="normal" fo:text-transform="none" fo:color="#ffffff" loext:opacity="100%" style:font-name="FreeMono" fo:font-size="8pt" fo:letter-spacing="normal" style:font-size-asian="8pt" style:font-size-complex="8pt" loext:padding="0cm" loext:border="none"/>
    </style:style>
    <style:style style:name="T43" style:family="text">
      <style:text-properties fo:font-variant="normal" fo:text-transform="none" fo:color="#ffffff" loext:opacity="100%" style:font-name="FreeMono" fo:letter-spacing="normal" loext:padding="0cm" loext:border="none"/>
    </style:style>
    <style:style style:name="T44" style:family="text">
      <style:text-properties fo:font-variant="normal" fo:text-transform="none" fo:color="#ffffff" loext:opacity="100%" style:font-name="FreeMono" fo:letter-spacing="normal" fo:font-style="normal" fo:font-weight="bold" fo:background-color="#000000" loext:char-shading-value="0" style:font-weight-asian="bold" style:font-weight-complex="bold" loext:padding="0cm" loext:border="none"/>
    </style:style>
    <style:style style:name="T45" style:family="text">
      <style:text-properties fo:font-variant="normal" fo:text-transform="none" fo:color="#ffffff" loext:opacity="100%" style:font-name="FreeMono" fo:letter-spacing="normal" fo:font-weight="bold" fo:background-color="#000000" loext:char-shading-value="0" style:font-weight-asian="bold" style:font-weight-complex="bold" loext:padding="0cm" loext:border="none"/>
    </style:style>
    <style:style style:name="T46" style:family="text">
      <style:text-properties fo:font-variant="normal" fo:text-transform="none" fo:color="#ffffff" loext:opacity="100%" style:font-name="FreeMono" fo:font-size="10.5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ff0000" loext:opacity="100%" style:font-name="FreeMono" fo:font-size="8pt" fo:letter-spacing="normal" style:font-size-asian="8pt" style:font-size-complex="8pt" loext:padding="0cm" loext:border="none"/>
    </style:style>
    <style:style style:name="T48" style:family="text">
      <style:text-properties fo:font-variant="normal" fo:text-transform="none" fo:color="#ff0000" loext:opacity="100%" style:font-name="FreeMono" fo:font-size="8pt" fo:letter-spacing="normal" fo:font-style="normal" fo:font-weight="normal" style:font-size-asian="8pt" style:font-size-complex="8pt" loext:padding="0cm" loext:border="none"/>
    </style:style>
    <style:style style:name="T49" style:family="text">
      <style:text-properties fo:font-variant="normal" fo:text-transform="none" fo:color="#ff0000" loext:opacity="100%" style:font-name="FreeMono" fo:font-size="8pt" fo:letter-spacing="normal" fo:font-style="normal" fo:font-weight="normal" fo:background-color="#ffffff" loext:char-shading-value="0" style:font-size-asian="8pt" style:font-size-complex="8pt" loext:padding="0cm" loext:border="none"/>
    </style:style>
    <style:style style:name="T50" style:family="text">
      <style:text-properties fo:font-variant="normal" fo:text-transform="none" fo:color="#ff0000" loext:opacity="100%" style:font-name="FreeMono" fo:font-size="8pt" fo:letter-spacing="normal" fo:font-style="normal" fo:font-weight="normal" fo:background-color="#ffffff" loext:char-shading-value="0" style:font-size-asian="8pt" style:font-size-complex="8pt" loext:padding="0cm" loext:border="none"/>
    </style:style>
    <style:style style:name="T51" style:family="text">
      <style:text-properties fo:font-variant="normal" fo:text-transform="none" fo:color="#ff0000" loext:opacity="100%" style:font-name="FreeMono" fo:font-size="8pt" fo:letter-spacing="normal" fo:font-style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52" style:family="text">
      <style:text-properties fo:font-variant="normal" fo:text-transform="none" fo:color="#ff0000" loext:opacity="100%" style:font-name="FreeMono" fo:font-size="8pt" fo:letter-spacing="normal" fo:font-style="normal" fo:font-weight="bold" style:font-size-asian="8pt" style:font-weight-asian="bold" style:font-size-complex="8pt" style:font-weight-complex="bold" loext:padding="0cm" loext:border="none"/>
    </style:style>
    <style:style style:name="T53" style:family="text">
      <style:text-properties fo:font-variant="normal" fo:text-transform="none" fo:color="#ff0000" loext:opacity="100%" style:font-name="FreeMono" fo:font-size="8pt" fo:letter-spacing="normal" fo:font-style="normal" fo:font-weight="bold" fo:background-color="#ffffff" loext:char-shading-value="0" style:font-size-asian="8pt" style:font-weight-asian="bold" style:font-size-complex="8pt" style:font-weight-complex="bold" loext:padding="0cm" loext:border="none"/>
    </style:style>
    <style:style style:name="T54" style:family="text">
      <style:text-properties fo:font-variant="normal" fo:text-transform="none" fo:color="#ff0000" loext:opacity="100%" style:font-name="FreeMono" fo:font-size="8pt" fo:letter-spacing="normal" fo:font-style="normal" fo:font-weight="bold" fo:background-color="#ffffff" loext:char-shading-value="0" style:font-size-asian="8pt" style:font-weight-asian="bold" style:font-size-complex="8pt" style:font-weight-complex="bold" loext:padding="0cm" loext:border="none"/>
    </style:style>
    <style:style style:name="T55" style:family="text">
      <style:text-properties fo:font-variant="normal" fo:text-transform="none" fo:color="#ff0000" loext:opacity="100%" style:font-name="FreeMono" fo:font-size="8pt" fo:letter-spacing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56" style:family="text">
      <style:text-properties fo:font-variant="normal" fo:text-transform="none" fo:color="#ff0000" loext:opacity="100%" style:font-name="FreeMono" fo:font-size="8pt" fo:letter-spacing="normal" fo:font-weight="bold" style:font-size-asian="8pt" style:font-weight-asian="bold" style:font-size-complex="8pt" style:font-weight-complex="bold" loext:padding="0cm" loext:border="none"/>
    </style:style>
    <style:style style:name="T57" style:family="text">
      <style:text-properties fo:font-variant="normal" fo:text-transform="none" fo:color="#ff0000" loext:opacity="100%" style:font-name="FreeMono" fo:font-size="8pt" fo:letter-spacing="normal" fo:font-weight="bold" fo:background-color="#ffffff" loext:char-shading-value="0" style:font-size-asian="8pt" style:font-weight-asian="bold" style:font-size-complex="8pt" style:font-weight-complex="bold" loext:padding="0cm" loext:border="none"/>
    </style:style>
    <style:style style:name="T58" style:family="text">
      <style:text-properties fo:font-variant="normal" fo:text-transform="none" fo:color="#ff0000" loext:opacity="100%" style:font-name="FreeMono" fo:font-size="8pt" fo:letter-spacing="normal" fo:font-weight="bold" fo:background-color="#ffffff" loext:char-shading-value="0" style:font-size-asian="8pt" style:font-weight-asian="bold" style:font-size-complex="8pt" style:font-weight-complex="bold" loext:padding="0cm" loext:border="none"/>
    </style:style>
    <style:style style:name="T59" style:family="text">
      <style:text-properties fo:font-variant="normal" fo:text-transform="none" fo:color="#ff0000" loext:opacity="100%" style:font-name="FreeMono" fo:font-size="8pt" fo:letter-spacing="normal" fo:background-color="#ffffff" loext:char-shading-value="0" style:font-size-asian="8pt" style:font-size-complex="8pt" loext:padding="0cm" loext:border="none"/>
    </style:style>
    <style:style style:name="T60" style:family="text">
      <style:text-properties fo:font-variant="normal" fo:text-transform="none" fo:color="#ff0000" loext:opacity="100%" style:font-name="FreeMono" fo:font-size="8pt" fo:letter-spacing="normal" fo:background-color="#ffffff" loext:char-shading-value="0" style:font-size-asian="8pt" style:font-size-complex="8pt" loext:padding="0cm" loext:border="none"/>
    </style:style>
    <style:style style:name="T61" style:family="text">
      <style:text-properties fo:font-variant="normal" fo:text-transform="none" style:font-name="FreeMono" fo:font-size="8pt" fo:letter-spacing="normal" fo:font-style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62" style:family="text">
      <style:text-properties fo:font-variant="normal" fo:text-transform="none" style:font-name="FreeMono" fo:font-size="8pt" fo:letter-spacing="normal" fo:font-weight="bold" fo:background-color="#000000" loext:char-shading-value="0" style:font-size-asian="8pt" style:font-weight-asian="bold" style:font-size-complex="8pt" style:font-weight-complex="bold" loext:padding="0cm" loext:border="none"/>
    </style:style>
    <style:style style:name="T63" style:family="text">
      <style:text-properties fo:font-style="italic"/>
    </style:style>
    <style:style style:name="T64" style:family="text">
      <style:text-properties fo:font-size="11pt" style:font-size-asian="11pt" style:font-size-complex="11pt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6pt" style:font-size-asian="6pt" style:font-size-complex="6pt"/>
    </style:style>
    <style:style style:name="T67" style:family="text">
      <style:text-properties fo:font-size="7pt" style:font-size-asian="7pt" style:font-size-complex="7pt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style:font-name="FreeMono" fo:font-size="8pt" style:font-size-asian="8pt" style:font-size-complex="8pt"/>
    </style:style>
    <style:style style:name="T70" style:family="text">
      <style:text-properties fo:color="#ff0000" loext:opacity="100%" style:font-name="FreeMono" fo:font-size="8pt" style:font-size-asian="8pt" style:font-size-complex="8pt"/>
    </style:style>
    <style:style style:name="T71" style:family="text">
      <style:text-properties fo:color="#ff0000" loext:opacity="100%" style:font-name="FreeMono" fo:font-size="8pt" fo:background-color="#ffffff" loext:char-shading-value="0" style:font-size-asian="8pt" style:font-size-complex="8pt"/>
    </style:style>
    <style:style style:name="T72" style:family="text">
      <style:text-properties fo:color="#ff0000" loext:opacity="100%" style:font-name="FreeMono" fo:font-size="8pt" fo:background-color="#ffffff" loext:char-shading-value="0" style:font-size-asian="8pt" style:font-size-complex="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oa noite, pdsilva! Excelente questão. Quando você tira a memória de vídeo de dentro do microcontrolador (ou do circuito principal de controle) e a coloca no barramento externo, a arquitetura clássica dos anos 80 e 90 para placas de vídeo de texto é exatamente a resposta para evitar esse "gargalo" de processamento.</text:p>
      <text:p text:style-name="P10"/>
      <text:p text:style-name="P10">Para fazer isso de forma puramente em hardware (sem que o Pico precise ler o ASCII, traduzir e gerar o pixel), você precisa de um circuito clássico de **geração de caracteres por hardware**.</text:p>
      <text:p text:style-name="P10"/>
      <text:p text:style-name="P10">A lógica consiste em transformar o processo em um "pipeline" sequencial de hardware usando três componentes principais externos:</text:p>
      <text:p text:style-name="P10"/>
      <text:p text:style-name="P10">1. **VRAM (Memória de Vídeo Externa):** Armazena apenas os códigos ASCII (e opcionalmente atributos de cor).</text:p>
      <text:p text:style-name="P10">2. **ROM de Caracteres (Font ROM):** Armazena os bitmaps (as matrizes de pixels) de cada caractere.</text:p>
      <text:p text:style-name="P10">3. **Shift Register (Registrador de Deslocamento):** Transforma os bytes paralelos da ROM em um fluxo serial de pixels (os pontos na tela).</text:p>
      <text:p text:style-name="P10"/>
      <text:p text:style-name="P10">Aqui está como esse circuito se organiza e funciona na prática:</text:p>
      <text:p text:style-name="P10"/>
      <text:p text:style-name="P10">### O Fluxo do Hardware (Passo a Passo)</text:p>
      <text:p text:style-name="P10"/>
      <text:p text:style-name="P10">1. **Os Contadores de Vídeo (Geradores de Endereço):** O seu circuito gerador de sincronismo (H-Sync/V-Sync), que pode ser lógica discreta ou o próprio Pico gerando os tempos, mantém contadores de pixels, linhas e colunas.</text:p>
      <text:p text:style-name="P10">2. **Acessando a VRAM (O código ASCII):**</text:p>
      <text:p text:style-name="P10">A partir da linha e da coluna atuais da tela, os contadores geram o endereço da **VRAM**. A VRAM devolve o código ASCII correspondente àquela posição de texto (por exemplo, `0x41` para a letra 'A').</text:p>
      <text:p text:style-name="P10">3. **Acessando a ROM de Caracteres (O Bitmap):**</text:p>
      <text:p text:style-name="P10">O código ASCII vindo da VRAM não vai para a CPU; ele vai direto para as **linhas de endereço superiores** da ROM de Caracteres. Enquanto isso, o contador de "linhas do caractere" (que conta de 0 a 7 ou 0 a 15, dependendo do tamanho da fonte) é injetado nas **linhas de endereço inferiores** da ROM.</text:p>
      <text:p text:style-name="P10">* *Resultado:* A ROM recebe (Código ASCII + Linha Atual) e entrega na saída um byte que representa exatamente os pixels daquela linha específica daquela letra.</text:p>
      <text:p text:style-name="P10"/>
      <text:p text:style-name="P10"/>
      <text:p text:style-name="P10">4. **Serialização (O Shift Register):**</text:p>
      <text:p text:style-name="P10">Esse byte da ROM é carregado em paralelo em um Shift Register de alta velocidade (como o clássico 74HC165). O clock de pixel (*dot clock*) vai deslocando esses bits para fora, um a um. Cada bit `1` vira pixel aceso (cor de frente) e cada `0` vira pixel apagado (fundo), que seguem para o DAC.</text:p>
      <text:p text:style-name="P10"/>
      <text:p text:style-name="P10">---</text:p>
      <text:p text:style-name="P10"/>
      <text:p text:style-name="P10">### Como estruturar isso sem desperdiçar ciclos do Pico?</text:p>
      <text:p text:style-name="P10"/>
      <text:p text:style-name="P10">Se você quiser implementar isso com chips discretos (ou dentro de uma CPLD/FPGA para economizar espaço no seu barramento modular), a arquitetura de acesso à VRAM geralmente segue dois caminhos:</text:p>
      <text:p text:style-name="P10"><text:soft-page-break/></text:p>
      <text:p text:style-name="P10">#### 1. Acesso Compartilhado (Dual-Port RAM ou Multiplexada)</text:p>
      <text:p text:style-name="P10"/>
      <text:p text:style-name="P10">Para a CPU (ou o Pico) poder escrever o texto na VRAM sem atrapalhar o gerador de vídeo, usa-se uma memória RAM de porta dupla (**Dual-Port RAM**), onde o Pico escreve por um lado e o circuito de vídeo lê pelo outro.</text:p>
      <text:p text:style-name="P10"/>
      <text:p text:style-name="P10">* *Alternativa barata:* Multiplexadores de barramento (como o 74HC257). Quando o sinal de vídeo está na área visível, os multiplexadores entregam o controle dos endereços da VRAM para os contadores de vídeo. Durante o *Blanking* (H-Blank ou V-Blank), o controle é devolvido para o Pico escrever os novos códigos ASCII.</text:p>
      <text:p text:style-name="P10"/>
      <text:p text:style-name="P10">#### 2. O Pico apenas como "Gerador de Endereços e Sincronismo"</text:p>
      <text:p text:style-name="P10"/>
      <text:p text:style-name="P10">Se você não quiser usar chips de lógica para os contadores de pixel/linha, o Pico pode usar as fiações de PIO apenas para "apontar" para a VRAM externa e gerar o HSync/VSync. Ele mudaria o endereço na VRAM a cada caractere, e o hardware externo (ROM + Shift Register) cuidaria do resto do trabalho pesado de abrir a matriz de pontos e disparar o DAC.</text:p>
      <text:p text:style-name="P10"/>
      <text:p text:style-name="P10">### Resumo dos Chips Clássicos para o Circuito</text:p>
      <text:p text:style-name="P10"/>
      <text:p text:style-name="P10">Se você fosse montar isso hoje com lógica discreta na bancada, o "core" do circuito usaria:</text:p>
      <text:p text:style-name="P10"/>
      <text:p text:style-name="P10">* **SRAM comum (ex: 62256):** Como VRAM para guardar os blocos de texto.</text:p>
      <text:p text:style-name="P10">* **EEPROM/Flash (ex: 28C64 ou 29F010):** Gravada com os bitmaps da sua fonte (ex: matriz 8x8 ou 8x16 do IBM PC).</text:p>
      <text:p text:style-name="P10">* **74HC165:** Como Shift Register para serializar os pixels para o DAC.</text:p>
      <text:p text:style-name="P10">* **74HC157 / 74HC257:** Multiplexadores para isolar o barramento do Pico do barramento do circuito de vídeo.</text:p>
      <text:p text:style-name="P10"/>
      <text:p text:style-name="P10">Essa era a mágica por trás de chips dedicados como o **Motorola 6845** (usado no IBM MDA/CGA e no BBC Micro). Ele não processava pixels; ele apenas gerenciava os endereços da VRAM e os tempos de sincronismo, deixando a geração de pontos para a Font ROM e o Shift Register externos.</text:p>
      <text:p text:style-name="P10"/>
      <text:p text:style-name="P10">Essa lógica faz sentido para o que você está visualizando para o barramento externo? Se quiser, podemos detalhar como ficaria a pinagem ou a multiplexação dessa VRAM.</text:p>
      <text:p text:style-name="Standard"/>
      <text:p text:style-name="Standard"/>
      <text:p text:style-name="Standard"/>
      <text:section text:style-name="Sect1" text:name=":1mq">
        <text:section text:style-name="Sect1" text:name=":1m0">
          <text:p text:style-name="P9"/>
          <text:section text:style-name="Sect1" text:name="avWBGd-111">
            <text:p text:style-name="P12">Perfeito, pdsilva! Essa é exatamente a "virada de chave" para entender a lógica de texto por hardware. O segredo está em como o circuito de vídeo enxerga a tela.</text:p>
            <text:p text:style-name="P17">A tela VGA faz a varredura linha por linha de pixels (horizontalmente), de cima para baixo. Como uma fonte 8x16 tem <text:span text:style-name="T1">16 linhas de pixel de altura</text:span>, <text:soft-page-break/>o feixe de elétrons (ou o sinal digital) vai demorar <text:span text:style-name="T1">16 linhas horizontais da tela VGA</text:span> para desenhar completamente uma única linha de texto.</text:p>
            <text:p text:style-name="P17">Para o caractere 'A' na coluna 0, linha de texto 5, o circuito precisa fatiar o desenho dele ao longo dessas 16 varreduras da tela. Vamos ver como os contadores de hardware fazem isso:</text:p>
            <text:h text:style-name="P1" text:outline-level="3">1. O Cálculo das Coordenadas (Divisão de Tarefas)</text:h>
            <text:p text:style-name="P17">O seu gerador de vídeo (sejam contadores discretos ou o Pico) possui dois contadores principais para a vertical:</text:p>
            <text:list text:style-name="L1">
              <text:list-item>
                <text:p text:style-name="P13"><text:span text:style-name="T1">Contador de Linhas de Texto (Y_Texto):</text:span> Indica em qual linha de blocos de texto a tela está (no seu exemplo, <text:span text:style-name="T1">5</text:span>).</text:p>
              </text:list-item>
              <text:list-item>
                <text:p text:style-name="P13"><text:span text:style-name="T1">Contador de Linhas do Caractere (Y_Pixel):</text:span> Conta de <text:span text:style-name="T1">0 a 15</text:span>, indicando qual "fatia" horizontal da fonte está sendo desenhada naquele exato momento.</text:p>
              </text:list-item>
            </text:list>
            <text:h text:style-name="P1" text:outline-level="3">2. O Passo a Passo da Varredura (Linha por Linha)</text:h>
            <text:p text:style-name="P26"><text:span text:style-name="T7">Quando o feixe VGA chega na linha de texto 5, o contador </text:span><text:span text:style-name="Source_20_Text"><text:span text:style-name="T10">Y_Pixel</text:span></text:span><text:span text:style-name="T7"> zera e começa a contagem daquela linha de texto:</text:span></text:p>
            <text:h text:style-name="P2" text:outline-level="4">Tela VGA: Varredura Física nº 80 (Exemplo: Linha de Texto 5, Y_Pixel = 0)</text:h>
            <text:list text:style-name="L2">
              <text:list-item>
                <text:p text:style-name="P22"><text:span text:style-name="T7">O circuito calcula o endereço da VRAM para a coluna 0, linha 5. A VRAM responde com </text:span><text:span text:style-name="Source_20_Text"><text:span text:style-name="T10">0x41</text:span></text:span><text:span text:style-name="T7"> ('A').</text:span></text:p>
              </text:list-item>
              <text:list-item>
                <text:p text:style-name="P22"><text:span text:style-name="T7">O circuito joga </text:span><text:span text:style-name="Source_20_Text"><text:span text:style-name="T10">0x41</text:span></text:span><text:span text:style-name="T7"> nos bits superiores de endereço da </text:span><text:span text:style-name="T8">ROM de Fonte</text:span><text:span text:style-name="T7">, e joga </text:span><text:span text:style-name="Source_20_Text"><text:span text:style-name="T10">0</text:span></text:span><text:span text:style-name="T7"> (porque </text:span><text:span text:style-name="Source_20_Text"><text:span text:style-name="T10">Y_Pixel = 0</text:span></text:span><text:span text:style-name="T7">) nos bits inferiores.</text:span></text:p>
              </text:list-item>
              <text:list-item>
                <text:p text:style-name="P22"><text:span text:style-name="T7">A ROM de Fonte olha para o mapa do caractere </text:span><text:span text:style-name="Source_20_Text"><text:span text:style-name="T10">0x41</text:span></text:span><text:span text:style-name="T7">, na sua primeiríssima linha (linha 0), e entrega o byte correspondente (geralmente </text:span><text:span text:style-name="Source_20_Text"><text:span text:style-name="T10">0x00</text:span></text:span><text:span text:style-name="T7"> ou </text:span><text:span text:style-name="Source_20_Text"><text:span text:style-name="T10">0x18</text:span></text:span><text:span text:style-name="T7">, dependendo do design do 'A', já que o topo costuma ser vazio ou apenas a pontinha da letra).</text:span></text:p>
              </text:list-item>
              <text:list-item>
                <text:p text:style-name="P14">Esse byte vai para o Shift Register e é cuspido na tela.</text:p>
              </text:list-item>
            </text:list>
            <text:h text:style-name="P2" text:outline-level="4">Tela VGA: Varredura Física nº 81 (Ainda na Linha de Texto 5, mas agora Y_Pixel = 1)</text:h>
            <text:p text:style-name="P17">A tela terminou a linha anterior, deu o H-Sync, e agora está desenhando a linha de pixel logo abaixo.</text:p>
            <text:list text:style-name="L3">
              <text:list-item>
                <text:p text:style-name="P23"><text:span text:style-name="T7">O feixe passa de novo pela coluna 0. O circuito lê a VRAM na mesma posição (linha 5, coluna 0) e obtém o mesmo </text:span><text:span text:style-name="Source_20_Text"><text:span text:style-name="T10">0x41</text:span></text:span><text:span text:style-name="T7">.</text:span></text:p>
              </text:list-item>
              <text:list-item>
                <text:p text:style-name="P23"><text:soft-page-break/><text:span text:style-name="T7">Mas agora, o contador </text:span><text:span text:style-name="Source_20_Text"><text:span text:style-name="T10">Y_Pixel</text:span></text:span><text:span text:style-name="T7"> mudou para </text:span><text:span text:style-name="T8">1</text:span><text:span text:style-name="T7">.</text:span></text:p>
              </text:list-item>
              <text:list-item>
                <text:p text:style-name="P23"><text:span text:style-name="T7">O endereço da ROM de Fonte agora é </text:span><text:span text:style-name="Source_20_Text"><text:span text:style-name="T10">0x41</text:span></text:span><text:span text:style-name="T7"> nos bits superiores e </text:span><text:span text:style-name="Source_20_Text"><text:span text:style-name="T10">1</text:span></text:span><text:span text:style-name="T7"> nos bits inferiores.</text:span></text:p>
              </text:list-item>
              <text:list-item>
                <text:p text:style-name="P23"><text:span text:style-name="T7">A ROM agora entrega a </text:span><text:span text:style-name="T8">segunda linha de pixels</text:span><text:span text:style-name="T7"> da matriz do 'A' (algo como </text:span><text:span text:style-name="Source_20_Text"><text:span text:style-name="T10">0x3C</text:span></text:span><text:span text:style-name="T7">, que representa o topo da letra </text:span><text:span text:style-name="Source_20_Text"><text:span text:style-name="T10">..XXXX..</text:span></text:span><text:span text:style-name="T7">).</text:span></text:p>
              </text:list-item>
              <text:list-item>
                <text:p text:style-name="P23"><text:span text:style-name="T7">O Shift Register recebe </text:span><text:span text:style-name="Source_20_Text"><text:span text:style-name="T10">0x3C</text:span></text:span><text:span text:style-name="T7"> e desenha essa fatia na tela.</text:span></text:p>
              </text:list-item>
            </text:list>
            <text:h text:style-name="P2" text:outline-level="4">Tela VGA: Varredura Física nº 85 (Y_Pixel = 5 - O meio do 'A')</text:h>
            <text:p text:style-name="P17">Algumas linhas depois, o feixe está passando pelo meio do caractere.</text:p>
            <text:list text:style-name="L4">
              <text:list-item>
                <text:p text:style-name="P24"><text:span text:style-name="T7">VRAM continua entregando </text:span><text:span text:style-name="Source_20_Text"><text:span text:style-name="T10">0x41</text:span></text:span><text:span text:style-name="T7">.</text:span></text:p>
              </text:list-item>
              <text:list-item>
                <text:p text:style-name="P24"><text:span text:style-name="T7">A ROM recebe </text:span><text:span text:style-name="Source_20_Text"><text:span text:style-name="T10">0x41</text:span></text:span><text:span text:style-name="T7"> + </text:span><text:span text:style-name="Source_20_Text"><text:span text:style-name="T10">Y_Pixel = 5</text:span></text:span><text:span text:style-name="T7">.</text:span></text:p>
              </text:list-item>
              <text:list-item>
                <text:p text:style-name="P24"><text:span text:style-name="T7">Nessa altura, o 'A' tem aquela barra horizontal do meio. A ROM vai entregar um byte cheio de bits 1 (ex: </text:span><text:span text:style-name="Source_20_Text"><text:span text:style-name="T10">0x7E</text:span></text:span><text:span text:style-name="T7">, que em binário é </text:span><text:span text:style-name="Source_20_Text"><text:span text:style-name="T10">.XXXXXX.</text:span></text:span><text:span text:style-name="T7">).</text:span></text:p>
              </text:list-item>
              <text:list-item>
                <text:p text:style-name="P15">O Shift Register serializa isso e você vê o traço horizontal do 'A' na tela.</text:p>
              </text:list-item>
            </text:list>
            <text:h text:style-name="P1" text:outline-level="3">Como a ROM de Fonte se organiza na memória?</text:h>
            <text:p text:style-name="P17">Para que isso funcione direto no barramento sem lógica complexa, a ROM de Fonte é gravada pensando exatamente nessa matemática. Cada caractere ocupa <text:span text:style-name="T1">16 bytes seguidos</text:span> na memória:</text:p>
            <text:list text:style-name="L5">
              <text:list-item>
                <text:p text:style-name="P25"><text:span text:style-name="T7">Endereço </text:span><text:span text:style-name="Source_20_Text"><text:span text:style-name="T10">0x410</text:span></text:span><text:span text:style-name="T7"> (letra 'A', linha 0) $\rightarrow$ Byte da linha 0 do 'A'</text:span></text:p>
              </text:list-item>
              <text:list-item>
                <text:p text:style-name="P25"><text:span text:style-name="T7">Endereço </text:span><text:span text:style-name="Source_20_Text"><text:span text:style-name="T10">0x411</text:span></text:span><text:span text:style-name="T7"> (letra 'A', linha 1) $\rightarrow$ Byte da linha 1 do 'A'</text:span></text:p>
              </text:list-item>
              <text:list-item>
                <text:p text:style-name="P16">...</text:p>
              </text:list-item>
              <text:list-item>
                <text:p text:style-name="P25"><text:span text:style-name="T7">Endereço </text:span><text:span text:style-name="Source_20_Text"><text:span text:style-name="T10">0x41F</text:span></text:span><text:span text:style-name="T7"> (letra 'A', linha 15) $\rightarrow$ Byte da linha 15 do 'A'</text:span></text:p>
              </text:list-item>
            </text:list>
            <text:p text:style-name="P5">A Mágica do Barramento:</text:p>
            <text:p text:style-name="P6">Se você juntar os fios do barramento de endereço da ROM de Fonte assim:</text:p>
            <text:list text:style-name="L6">
              <text:list-item>
                <text:p text:style-name="P7"><text:span text:style-name="T8">A11 até A4:</text:span><text:span text:style-name="T7"> Conectados direto na saída de dados da VRAM (os 8 bits do ASCII </text:span><text:span text:style-name="Source_20_Text"><text:span text:style-name="T10">0x41</text:span></text:span><text:span text:style-name="T7">).</text:span></text:p>
              </text:list-item>
              <text:list-item>
                <text:p text:style-name="P7"><text:span text:style-name="T8">A3 até A0:</text:span><text:span text:style-name="T7"> Conectados direto no seu contador </text:span><text:span text:style-name="Source_20_Text"><text:span text:style-name="T10">Y_Pixel</text:span></text:span><text:span text:style-name="T7"> (que conta de 0 a 15).</text:span></text:p>
              </text:list-item>
            </text:list>
            <text:p text:style-name="P8"><text:span text:style-name="T7">O próprio hardware faz a soma de ponteiros instantaneamente! Sempre que o </text:span><text:span text:style-name="Source_20_Text"><text:span text:style-name="T10">Y_Pixel</text:span></text:span><text:span text:style-name="T7"> incrementa a cada nova linha da tela, a ROM aponta automaticamente para a próxima fatia do caractere, sem que o Pico precise mover um único bit para isso.</text:span></text:p>
            <text:p text:style-name="P17"><text:soft-page-break/>Ficou mais claro como o circuito "fatia" a letra à medida que a varredura da tela vai descendo?<text:span text:style-name="T6"/></text:p>
          </text:section>
        </text:section>
      </text:section>
      <text:section text:style-name="Sect1" text:name="avWBGd-112">
        <text:p text:style-name="P11"/>
      </text:section>
      <text:p text:style-name="Standard"><text:line-break/></text:p>
      <text:section text:style-name="Sect1" text:name=":1mb">
        <text:section text:style-name="Sect1" text:name=":1mr">
          <text:p text:style-name="P9"/>
          <text:section text:style-name="Sect1" text:name="avWBGd-143">
            <text:p text:style-name="P12">Para desenhar a palavra <text:span text:style-name="T1">"pdsilva"</text:span> na tela, o circuito de vídeo vai processar essa linha de texto horizontalmente, caractere por caractere, da esquerda para a direita.</text:p>
            <text:p text:style-name="P17">Como a fonte tem 16 linhas de altura, a tela VGA vai passar por essa mesma linha de texto <text:span text:style-name="T1">16 vezes</text:span> (uma para cada linha de pixel/varredura).</text:p>
            <text:p text:style-name="P17">Considerando a <text:span text:style-name="T1">primeira varredura física</text:span> (Linha do Caractere = 0, o topo das letras), o desenho de 1 linha de texto acontece de forma suscinta assim:</text:p>
            <text:h text:style-name="P1" text:outline-level="3">O Fluxo da Esquerda para a Direita (Varredura Horizontal):</text:h>
            <text:list text:style-name="L7">
              <text:list-item>
                <text:p text:style-name="P27"><text:span text:style-name="T8">Letra "p" (Coluna 0):</text:span><text:span text:style-name="T7"> O circuito lê a VRAM $\rightarrow$ descobre o ASCII do </text:span><text:span text:style-name="Source_20_Text"><text:span text:style-name="T10">p</text:span></text:span><text:span text:style-name="T7"> $\rightarrow$ combina com a Linha 0 na ROM de Fonte $\rightarrow$ O Shift Register recebe o byte e solta os 8 pixels do topo do </text:span><text:span text:style-name="Source_20_Text"><text:span text:style-name="T10">p</text:span></text:span><text:span text:style-name="T7"> (provavelmente tudo </text:span><text:span text:style-name="Source_20_Text"><text:span text:style-name="T10">0</text:span></text:span><text:span text:style-name="T7">, vazio).</text:span></text:p>
              </text:list-item>
              <text:list-item>
                <text:p text:style-name="P27"><text:span text:style-name="T8">Letra "d" (Coluna 1):</text:span><text:span text:style-name="T7"> O contador de colunas avança. A VRAM entrega o ASCII do </text:span><text:span text:style-name="Source_20_Text"><text:span text:style-name="T10">d</text:span></text:span><text:span text:style-name="T7"> $\rightarrow$ ROM de Fonte entrega a Linha 0 do </text:span><text:span text:style-name="Source_20_Text"><text:span text:style-name="T10">d</text:span></text:span><text:span text:style-name="T7"> $\rightarrow$ Shift Register solta os 8 pixels na tela (a ponta da haste vertical do </text:span><text:span text:style-name="Source_20_Text"><text:span text:style-name="T10">d</text:span></text:span><text:span text:style-name="T7">).</text:span></text:p>
              </text:list-item>
              <text:list-item>
                <text:p text:style-name="P27"><text:span text:style-name="T8">Letra "s" (Coluna 2):</text:span><text:span text:style-name="T7"> A VRAM entrega o ASCII do </text:span><text:span text:style-name="Source_20_Text"><text:span text:style-name="T10">s</text:span></text:span><text:span text:style-name="T7"> $\rightarrow$ ROM entrega a Linha 0 do </text:span><text:span text:style-name="Source_20_Text"><text:span text:style-name="T10">s</text:span></text:span><text:span text:style-name="T7"> $\rightarrow$ Shift Register solta os 8 pixels (o topo da curva do </text:span><text:span text:style-name="Source_20_Text"><text:span text:style-name="T10">s</text:span></text:span><text:span text:style-name="T7">).</text:span></text:p>
              </text:list-item>
              <text:list-item>
                <text:p text:style-name="P27"><text:span text:style-name="T8">Letra "i" (Coluna 3):</text:span><text:span text:style-name="T7"> A VRAM entrega o ASCII do </text:span><text:span text:style-name="Source_20_Text"><text:span text:style-name="T10">i</text:span></text:span><text:span text:style-name="T7"> $\rightarrow$ ROM entrega a Linha 0 do </text:span><text:span text:style-name="Source_20_Text"><text:span text:style-name="T10">i</text:span></text:span><text:span text:style-name="T7"> $\rightarrow$ Shift Register solta os 8 pixels (o pingo do </text:span><text:span text:style-name="Source_20_Text"><text:span text:style-name="T10">i</text:span></text:span><text:span text:style-name="T7">).</text:span></text:p>
              </text:list-item>
              <text:list-item>
                <text:p text:style-name="P27"><text:span text:style-name="T8">Letra "l" (Coluna 4):</text:span><text:span text:style-name="T7"> A VRAM entrega o ASCII do </text:span><text:span text:style-name="Source_20_Text"><text:span text:style-name="T10">l</text:span></text:span><text:span text:style-name="T7"> $\rightarrow$ ROM entrega a Linha 0 do </text:span><text:span text:style-name="Source_20_Text"><text:span text:style-name="T10">l</text:span></text:span><text:span text:style-name="T7"> $\rightarrow$ Shift Register solta os 8 pixels (o topo da haste do </text:span><text:span text:style-name="Source_20_Text"><text:span text:style-name="T10">l</text:span></text:span><text:span text:style-name="T7">).</text:span></text:p>
              </text:list-item>
              <text:list-item>
                <text:p text:style-name="P27"><text:soft-page-break/><text:span text:style-name="T8">Letra "v" (Coluna 5):</text:span><text:span text:style-name="T7"> A VRAM entrega o ASCII do </text:span><text:span text:style-name="Source_20_Text"><text:span text:style-name="T10">v</text:span></text:span><text:span text:style-name="T7"> $\rightarrow$ ROM entrega a Linha 0 do </text:span><text:span text:style-name="Source_20_Text"><text:span text:style-name="T10">v</text:span></text:span><text:span text:style-name="T7"> $\rightarrow$ Shift Register solta os 8 pixels (vazio, o topo do </text:span><text:span text:style-name="Source_20_Text"><text:span text:style-name="T10">v</text:span></text:span><text:span text:style-name="T7"> começa mais abaixo).</text:span></text:p>
              </text:list-item>
              <text:list-item>
                <text:p text:style-name="P27"><text:span text:style-name="T8">Letra "a" (Coluna 6):</text:span><text:span text:style-name="T7"> A VRAM entrega o ASCII do </text:span><text:span text:style-name="Source_20_Text"><text:span text:style-name="T10">a</text:span></text:span><text:span text:style-name="T7"> $\rightarrow$ ROM entrega a Linha 0 do </text:span><text:span text:style-name="Source_20_Text"><text:span text:style-name="T10">a</text:span></text:span><text:span text:style-name="T7"> $\rightarrow$ Shift Register solta os 8 pixels (vazio).</text:span></text:p>
              </text:list-item>
            </text:list>
            <text:h text:style-name="P1" text:outline-level="3">O Resultado</text:h>
            <text:p text:style-name="P17">Ao final dessa primeira passagem de 56 pixels de largura (7 letras $\times$ 8 pixels), o circuito gera o sinal de <text:span text:style-name="T1">H-Sync</text:span> (retorno horizontal).</text:p>
            <text:p text:style-name="P26"><text:span text:style-name="T7">Na próxima linha da tela VGA, o contador da ROM muda para a </text:span><text:span text:style-name="T8">Linha do Caractere = 1</text:span><text:span text:style-name="T7">. O circuito lê exatamente os mesmos códigos ASCII na RAM (</text:span><text:span text:style-name="Source_20_Text"><text:span text:style-name="T10">p</text:span></text:span><text:span text:style-name="T7">, </text:span><text:span text:style-name="Source_20_Text"><text:span text:style-name="T10">d</text:span></text:span><text:span text:style-name="T7">, </text:span><text:span text:style-name="Source_20_Text"><text:span text:style-name="T10">s</text:span></text:span><text:span text:style-name="T7">, </text:span><text:span text:style-name="Source_20_Text"><text:span text:style-name="T10">i</text:span></text:span><text:span text:style-name="T7">, </text:span><text:span text:style-name="Source_20_Text"><text:span text:style-name="T10">l</text:span></text:span><text:span text:style-name="T7">, </text:span><text:span text:style-name="Source_20_Text"><text:span text:style-name="T10">v</text:span></text:span><text:span text:style-name="T7">, </text:span><text:span text:style-name="Source_20_Text"><text:span text:style-name="T10">a</text:span></text:span><text:span text:style-name="T7">), mas a ROM de Fonte agora vai entregar a segunda fatia de pixels de cada letra, colando-as perfeitamente logo abaixo da primeira passagem. Esse ciclo se repete até a linha 15, completando o nome </text:span><text:span text:style-name="T8">pdsilva</text:span><text:span text:style-name="T7"> na tela.</text:span></text:p>
          </text:section>
        </text:section>
      </text:section>
      <text:section text:style-name="Sect1" text:name="avWBGd-144">
        <text:p text:style-name="P11"/>
      </text:section>
      <text:p text:style-name="Standard"><text:line-break/><text:bookmark text:name=":1m0"/></text:p>
      <text:section text:style-name="Sect1" text:name="Section1">
        <text:section text:style-name="Sect1" text:name=":1ma">
          <text:p text:style-name="P9"/>
          <text:section text:style-name="Sect1" text:name="avWBGd-175">
            <text:p text:style-name="P12">Excelente pergunta! Você chegou no coração do design de hardware de vídeo. A relação entre o contador da RAM (VRAM) e o contador da ROM de Fonte é uma relação de <text:span text:style-name="T1">velocidade (frequência) e de divisão de escala</text:span>.</text:p>
            <text:p text:style-name="P17">Para entender como eles se conectam, pense em como o feixe caminha na tela: ele anda muito rápido na horizontal (pixels) e mais devagar na vertical (linhas).</text:p>
            <text:p text:style-name="P17">A relação exata entre os dois contadores funciona da seguinte forma:</text:p>
            <text:h text:style-name="P1" text:outline-level="3">1. O Contador de Endereços da RAM (VRAM)</text:h>
            <text:p text:style-name="P17">O endereço da VRAM determina <text:span text:style-name="T1">qual caractere</text:span> está sendo lido.</text:p>
            <text:list text:style-name="L8">
              <text:list-item>
                <text:p text:style-name="P28"><text:span text:style-name="T8">Na Horizontal:</text:span><text:span text:style-name="T7"> Ele precisa mudar a cada </text:span><text:span text:style-name="T8">8 pixels</text:span><text:span text:style-name="T7"> (já que a largura do caractere é 8). Ou seja, o clock que faz a VRAM avançar para a próxima coluna é o seu </text:span><text:span text:style-name="Source_20_Text"><text:span text:style-name="T10">Pixel_Clock / 8</text:span></text:span><text:span text:style-name="T7"> (geralmente chamado de </text:span><text:span text:style-name="T9">Character Clock</text:span><text:span text:style-name="T7">).</text:span></text:p>
              </text:list-item>
              <text:list-item>
                <text:p text:style-name="P18"><text:span text:style-name="T1">Na Vertical:</text:span> Quando a linha horizontal da tela termina (H-Sync), o contador da VRAM <text:span text:style-name="T1">não deve avançar para a próxima linha de texto </text:span><text:soft-page-break/><text:span text:style-name="T1">ainda</text:span>. Ele precisa voltar para o início da mesma linha de caracteres, porque a tela ainda precisa desenhar as outras 15 fatias daquelas mesmas letras. Ele só vai para a próxima linha de texto da VRAM após a ROM de fonte terminar todas as suas 16 linhas.</text:p>
              </text:list-item>
            </text:list>
            <text:h text:style-name="P1" text:outline-level="3">2. O Contador de Endereços da ROM de Fonte</text:h>
            <text:p text:style-name="P17">O endereço da ROM é composto por duas partes combinadas no barramento, e cada uma ouve um contador diferente:</text:p>
            <text:list text:style-name="L9">
              <text:list-item>
                <text:p text:style-name="P19"><text:span text:style-name="T1">A parte alta do endereço (ASCII):</text:span> Vem direto dos dados de saída da VRAM. Ela muda na velocidade do <text:span text:style-name="T63">Character Clock</text:span> (horizontal).</text:p>
              </text:list-item>
              <text:list-item>
                <text:p text:style-name="P19"><text:span text:style-name="T1">A parte baixa do endereço (Linha do Caractere):</text:span> Esta parte ouve o <text:span text:style-name="T1">Contador de Linhas Verticais</text:span> da tela. Ela só incrementa <text:span text:style-name="T1">1 vez a cada H-Sync</text:span> (fim de linha física da tela). Ela conta de 0 a 15 e, quando reseta para 0, envia um sinal para o contador da VRAM finalmente avançar para a próxima linha de texto.</text:p>
              </text:list-item>
            </text:list>
            <text:h text:style-name="P1" text:outline-level="3">A Arquitetura de Conexão (Como os fios se ligam)</text:h>
            <text:p text:style-name="P17">Para visualizar isso em hardware discreto (ou lógica PIO/CPLD), imagine os contadores divididos em blocos:</text:p>
            <text:p text:style-name="P21">P<text:span text:style-name="T69">l</text:span><text:span text:style-name="T72"/></text:p>
            <text:p text:style-name="P3"><text:span text:style-name="Source_20_Text"><text:span text:style-name="T54">[ Pixel Clock ] ──&gt; [ Contador de Pixels (0 a 7) ] </text:span></text:span></text:p>
            <text:p text:style-name="P4"><text:span text:style-name="Source_20_Text"><text:span text:style-name="T58"><text:s text:c="27"/>│</text:span></text:span></text:p>
            <text:p text:style-name="P4"><text:span text:style-name="Source_20_Text"><text:span text:style-name="T58"><text:s text:c="27"/>└── </text:span></text:span><text:span text:style-name="Source_20_Text"><text:span text:style-name="T54">(A cada 8 pixels) ──&gt; [ Contador de Colunas da VRAM ] ──&gt; Endereço X da VRAM</text:span></text:span></text:p>
            <text:p text:style-name="P4"><text:span text:style-name="Source_20_Text"><text:span text:style-name="T58"><text:s text:c="96"/>│</text:span></text:span></text:p>
            <text:p text:style-name="P4"><text:span text:style-name="Source_20_Text"><text:span text:style-name="T54">[ H-Sync (Fim de Linha) ] ─────────────────────────&gt; [ Contador Y_Pixel da ROM (0 a 15) ] <text:s text:c="6"/>│ (Lê o ASCII)</text:span></text:span></text:p>
            <text:p text:style-name="P4"><text:span text:style-name="Source_20_Text"><text:span text:style-name="T58"><text:s text:c="27"/>│ <text:s text:c="33"/>│ <text:s text:c="32"/>▼</text:span></text:span></text:p>
            <text:p text:style-name="P4"><text:span text:style-name="Source_20_Text"><text:span text:style-name="T58"><text:s text:c="27"/>│ <text:s text:c="33"/>▼ <text:s text:c="22"/>┌───────────────────┐</text:span></text:span></text:p>
            <text:p text:style-name="P4"><text:span text:style-name="Source_20_Text"><text:span text:style-name="T58"><text:s text:c="27"/>└─ </text:span></text:span><text:span text:style-name="Source_20_Text"><text:span text:style-name="T54">(A cada 16 linhas) ──&gt; [ Contador de Linhas da VRAM ] ──&gt;│ VRAM (Dado: ASCII)│</text:span></text:span></text:p>
            <text:p text:style-name="P4"><text:span text:style-name="Source_20_Text"><text:span text:style-name="T58"><text:s text:c="86"/>└─────────┬─────────┘</text:span></text:span></text:p>
            <text:p text:style-name="P4"><text:span text:style-name="Source_20_Text"><text:span text:style-name="T58"><text:s text:c="96"/>│</text:span></text:span></text:p>
            <text:p text:style-name="P4"><text:span text:style-name="Source_20_Text"><text:span text:style-name="T58"><text:s text:c="96"/>▼ </text:span></text:span><text:span text:style-name="Source_20_Text"><text:span text:style-name="T54">(Bits A11-A4)</text:span></text:span></text:p>
            <text:p text:style-name="P4"><text:span text:style-name="Source_20_Text"><text:span text:style-name="T58"><text:s text:c="86"/>┌───────────────────┐</text:span></text:span></text:p>
            <text:p text:style-name="P4"><text:span text:style-name="Source_20_Text"><text:span text:style-name="T60"><text:s text:c="53"/></text:span></text:span><text:span text:style-name="Source_20_Text"><text:span text:style-name="T50">(Bits A3-A0) ───────────────────&gt;│ ROM DE FON</text:span></text:span><text:span text:style-name="Source_20_Text"><text:span text:style-name="T12">TE <text:s text:c="5"/>│</text:span></text:span></text:p>
            <text:p text:style-name="P4"><text:span text:style-name="Source_20_Text"><text:span text:style-name="T26"><text:s text:c="86"/>└───────────────────┘</text:span></text:span></text:p>
            <text:h text:style-name="P1" text:outline-level="3">Resumo da Relação de Tempo:</text:h>
            <text:list text:style-name="L10">
              <text:list-item>
                <text:p text:style-name="P20"><text:span text:style-name="T1">Contador da ROM (Linhas 0-15):</text:span> É um contador síncrono com o <text:span text:style-name="T1">H-Sync</text:span> da tela. Ele muda devagar (uma vez por linha horizontal da tela).</text:p>
              </text:list-item>
              <text:list-item>
                <text:p text:style-name="P20"><text:soft-page-break/><text:span text:style-name="T1">Contador da RAM (Colunas):</text:span> É um contador síncrono com o <text:span text:style-name="T1">Pixel Clock / 8</text:span>. Ele corre muito rápido na horizontal, reinicia a cada linha da tela, e só muda seu "offset" vertical quando o contador da ROM (0-15) transborda (reseta).</text:p>
              </text:list-item>
            </text:list>
            <text:p text:style-name="P26"><text:span text:style-name="T7">Em circuitos clássicos, para evitar ter que ficar fazendo contas complexas de multiplicação (como </text:span><text:span text:style-name="Source_20_Text"><text:span text:style-name="T10">Linha * 80 + Coluna</text:span></text:span><text:span text:style-name="T7">), os projetistas usavam contadores binários simples e faziam a VRAM ter tamanhos baseados em potências de 2 (como 64 ou 128 colunas por linha, mesmo que a tela só mostrasse 80), conectando os bits dos contadores diretamente nos fios de endereço da RAM.</text:span></text:p>
          </text:section>
        </text:section>
      </text:section>
      <text:section text:style-name="Sect1" text:name="avWBGd-176">
        <text:p text:style-name="P11"/>
      </text:section>
      <text:p text:style-name="Standard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FreeMono" svg:font-family="FreeMono" style:font-family-generic="modern" style:font-pitch="fixed"/>
    <style:font-face style:name="Google Sans" svg:font-family="'Google Sans', Roboto, RobotoDraft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  <style:font-face style:name="google sans" svg:font-family="'google sans', sans-serif"/>
    <style:font-face style:name="google sans text" svg:font-family="'google sans text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13:33:06.090490703</meta:creation-date>
    <dc:date>2026-06-10T13:37:22.914209434</dc:date>
    <meta:editing-duration>PT4M18S</meta:editing-duration>
    <meta:editing-cycles>1</meta:editing-cycles>
    <meta:document-statistic meta:table-count="0" meta:image-count="0" meta:object-count="0" meta:page-count="8" meta:paragraph-count="120" meta:word-count="2518" meta:character-count="14737" meta:non-whitespace-character-count="11501"/>
    <meta:generator>LibreOffice/24.2.7.2$Linux_X86_64 LibreOffice_project/420$Build-2</meta:generator>
  </office:meta>
</office:document-meta>
</file>
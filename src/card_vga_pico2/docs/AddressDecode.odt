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" svg:font-family="'Ubuntu Sans'" style:font-family-generic="swiss"/>
  </office:font-face-decls>
  <office:automatic-styles>
    <style:style style:name="P1" style:family="paragraph" style:parent-style-name="Horizontal_20_Line">
      <style:paragraph-properties style:writing-mode="lr-tb"/>
    </style:style>
    <style:style style:name="P2" style:family="paragraph" style:parent-style-name="Heading_20_3">
      <style:paragraph-properties fo:margin-left="0cm" fo:margin-right="0cm" fo:margin-top="0cm" fo:margin-bottom="0.212cm" style:contextual-spacing="false" fo:line-height="114%" fo:orphans="1" fo:text-indent="0cm" style:auto-text-indent="false" fo:padding="0cm" fo:border="none" style:writing-mode="lr-tb"/>
      <style:text-properties style:font-name="Google Sans" fo:language="en" fo:country="US"/>
    </style:style>
    <style:style style:name="P3" style:family="paragraph" style:parent-style-name="Heading_20_3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  <style:text-properties style:font-name="Google Sans" fo:language="en" fo:country="US"/>
    </style:style>
    <style:style style:name="P4" style:family="paragraph" style:parent-style-name="Quotations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  <style:text-properties style:font-name="Google Sans Text" fo:language="en" fo:country="US" fo:font-weight="bold" loext:padding="0cm" loext:border="none"/>
    </style:style>
    <style:style style:name="P5" style:family="paragraph" style:parent-style-name="Quotations">
      <style:paragraph-properties fo:margin-left="2.058cm" fo:margin-right="2.058cm" fo:margin-top="0cm" fo:margin-bottom="0.423cm" style:contextual-spacing="false" fo:line-height="114%" fo:orphans="1" fo:text-indent="0cm" style:auto-text-indent="false" fo:padding="0cm" fo:border="none" style:writing-mode="lr-tb"/>
      <style:text-properties style:font-name="Google Sans Text" fo:language="en" fo:country="US"/>
    </style:style>
    <style:style style:name="P6" style:family="paragraph" style:parent-style-name="Quotations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  <style:text-properties style:font-name="Google Sans Text" fo:language="en" fo:country="US"/>
    </style:style>
    <style:style style:name="P7" style:family="paragraph" style:parent-style-name="Quotations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</style:style>
    <style:style style:name="P8" style:family="paragraph" style:parent-style-name="Standard">
      <style:text-properties officeooo:rsid="001d7331" officeooo:paragraph-rsid="001d7331"/>
    </style:style>
    <style:style style:name="P9" style:family="paragraph" style:parent-style-name="Standard">
      <style:text-properties fo:font-size="16pt" fo:font-weight="bold" officeooo:rsid="001d7331" officeooo:paragraph-rsid="001d7331" style:font-size-asian="16pt" style:font-weight-asian="bold" style:font-size-complex="16pt" style:font-weight-complex="bold"/>
    </style:style>
    <style:style style:name="P10" style:family="paragraph" style:parent-style-name="Text_20_body">
      <style:paragraph-properties fo:margin-left="0cm" fo:margin-right="0cm" fo:margin-top="0cm" fo:margin-bottom="0.423cm" style:contextual-spacing="false" fo:line-height="114%" fo:orphans="1" fo:text-indent="0cm" style:auto-text-indent="false" fo:padding="0cm" fo:border="none" style:writing-mode="lr-tb"/>
      <style:text-properties style:font-name="Google Sans Text" fo:language="en" fo:country="US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  <style:text-properties style:font-name="Google Sans Text" fo:language="en" fo:country="US"/>
    </style:style>
    <style:style style:name="P12" style:family="paragraph" style:parent-style-name="Text_20_body">
      <style:paragraph-properties fo:margin-left="0cm" fo:margin-right="0cm" fo:margin-top="0cm" fo:margin-bottom="0.212cm" style:contextual-spacing="false" fo:line-height="114%" fo:orphans="1" fo:text-indent="0cm" style:auto-text-indent="false" fo:padding="0cm" fo:border="none" style:writing-mode="lr-tb"/>
      <style:text-properties style:font-name="Google Sans Text" fo:language="en" fo:country="US"/>
    </style:style>
    <style:style style:name="P13" style:family="paragraph" style:parent-style-name="Text_20_body" style:list-style-name="L2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  <style:text-properties style:font-name="Google Sans Text" fo:language="en" fo:country="US"/>
    </style:style>
    <style:style style:name="P14" style:family="paragraph" style:parent-style-name="Text_20_body" style:list-style-name="L3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  <style:text-properties style:font-name="Google Sans Text" fo:language="en" fo:country="US"/>
    </style:style>
    <style:style style:name="P15" style:family="paragraph" style:parent-style-name="Text_20_body">
      <style:text-properties style:font-name="Google Sans Text" fo:language="en" fo:country="US" officeooo:rsid="001d7331" officeooo:paragraph-rsid="001d7331"/>
    </style:style>
    <style:style style:name="P16" style:family="paragraph" style:parent-style-name="Text_20_body" style:list-style-name="L1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14%" fo:orphans="1" fo:text-indent="0cm" style:auto-text-indent="false" fo:padding="0cm" fo:border="none" style:writing-mode="lr-tb"/>
    </style:style>
    <style:style style:name="T1" style:family="text">
      <style:text-properties fo:font-weight="bold" loext:padding="0cm" loext:border="none"/>
    </style:style>
    <style:style style:name="T2" style:family="text">
      <style:text-properties loext:padding="0cm" loext:border="none"/>
    </style:style>
    <style:style style:name="T3" style:family="text">
      <style:text-properties style:font-name="Google Sans Text" loext:padding="0cm" loext:border="none"/>
    </style:style>
    <style:style style:name="T4" style:family="text">
      <style:text-properties style:font-name="Google Sans Text" fo:language="en" fo:country="US"/>
    </style:style>
    <style:style style:name="T5" style:family="text">
      <style:text-properties style:font-name="Google Sans Text" fo:language="en" fo:country="US" fo:font-weight="bold" loext:padding="0cm" loext:border="none"/>
    </style:style>
    <style:style style:name="T6" style:family="text">
      <style:text-properties style:font-name="Google Sans Text" fo:language="en" fo:country="US" loext:padding="0cm" loext:border="none"/>
    </style:style>
    <style:style style:name="T7" style:family="text">
      <style:text-properties fo:font-style="italic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68000: UDS, LDS e Endereços</text:p>
      <text:p text:style-name="P8"/>
      <text:p text:style-name="P15">Você tem razão em questionar, porque a nomenclatura do 68000 é famosa por causar confusão mental, especialmente porque ele é um processador <text:span text:style-name="T1">Big-Endian</text:span>.</text:p>
      <text:p text:style-name="P10">Vamos alinhar os conceitos, pois aqui a lógica inverte o que estamos acostumados em processadores como o Z80 ou x86:</text:p>
      <text:h text:style-name="P2" text:outline-level="3">1. A Regra do 68000 (Big-Endian)</text:h>
      <text:p text:style-name="P11">No MC68000, o <text:span text:style-name="T1">Byte Mais Significativo (Most Significant Byte - MSB)</text:span> fica no endereço <text:span text:style-name="T1">PAR</text:span>, e o <text:span text:style-name="T1">Byte Menos Significativo (Least Significant Byte - LSB)</text:span> fica no endereço <text:span text:style-name="T1">ÍMPAR</text:span>.</text:p>
      <text:list text:style-name="L1">
        <text:list-item>
          <text:p text:style-name="P16"><text:span text:style-name="T5">D8 - D15 (Barramento de Dados Alto):</text:span><text:span text:style-name="T4"> Conecta-se ao Byte de endereço </text:span><text:span text:style-name="T5">PAR</text:span><text:span text:style-name="T4"> (ex: </text:span><text:span text:style-name="Source_20_Text"><text:span text:style-name="T6">0x0000</text:span></text:span><text:span text:style-name="T4">, </text:span><text:span text:style-name="Source_20_Text"><text:span text:style-name="T6">0x0002</text:span></text:span><text:span text:style-name="T4">).</text:span></text:p>
        </text:list-item>
        <text:list-item>
          <text:p text:style-name="P16"><text:span text:style-name="T5">D0 - D7 (Barramento de Dados Baixo):</text:span><text:span text:style-name="T4"> Conecta-se ao Byte de endereço </text:span><text:span text:style-name="T5">ÍMPAR</text:span><text:span text:style-name="T4"> (ex: </text:span><text:span text:style-name="Source_20_Text"><text:span text:style-name="T6">0x0001</text:span></text:span><text:span text:style-name="T4">, </text:span><text:span text:style-name="Source_20_Text"><text:span text:style-name="T6">0x0003</text:span></text:span><text:span text:style-name="T4">).</text:span></text:p>
        </text:list-item>
      </text:list>
      <text:h text:style-name="P3" text:outline-level="3">2. O papel dos Strobes (<text:span text:style-name="T3">$\overline{UDS}$</text:span> e <text:span text:style-name="T3">$\overline{LDS}$</text:span>)</text:h>
      <text:p text:style-name="P12">Agora, veja como os nomes dos strobes se conectam aos pinos de dados:</text:p>
      <text:list text:style-name="L2">
        <text:list-item>
          <text:p text:style-name="P13"><text:span text:style-name="T1">$\overline{UDS}$ (Upper Data Strobe):</text:span> Controla os bits <text:span text:style-name="T1">D8-D15</text:span>. Como esses bits representam o endereço <text:span text:style-name="T1">PAR</text:span>, o <text:span text:style-name="T2">$\overline{UDS}$</text:span> é ativado para endereços <text:span text:style-name="T1">PARES</text:span>.</text:p>
        </text:list-item>
        <text:list-item>
          <text:p text:style-name="P13"><text:span text:style-name="T1">$\overline{LDS}$ (Lower Data Strobe):</text:span> Controla os bits <text:span text:style-name="T1">D0-D7</text:span>. Como esses bits representam o endereço <text:span text:style-name="T1">ÍMPAR</text:span>, o <text:span text:style-name="T2">$\overline{LDS}$</text:span> é ativado para endereços <text:span text:style-name="T1">ÍMPARES</text:span>.</text:p>
        </text:list-item>
      </text:list>
      <text:p text:style-name="P4">Resumo da Tabela de Verdade:</text:p>
      <text:p text:style-name="P6">| Endereço | Tipo de Acesso | <text:span text:style-name="T2">$\overline{UDS}$</text:span> (Pino 7) | <text:span text:style-name="T2">$\overline{LDS}$</text:span> (Pino 8) | Barramento Ativo |</text:p>
      <text:p text:style-name="P5">| :--- | :--- | :--- | :--- | :--- |</text:p>
      <text:p text:style-name="P7"><text:span text:style-name="T4">| </text:span><text:span text:style-name="Source_20_Text"><text:span text:style-name="T6">0x0000</text:span></text:span><text:span text:style-name="T4"> | Byte (Par) | </text:span><text:span text:style-name="T5">0 (Ativo)</text:span><text:span text:style-name="T4"> | 1 (Inativo) | D15 - D8 |</text:span></text:p>
      <text:p text:style-name="P7"><text:span text:style-name="T4">| </text:span><text:span text:style-name="Source_20_Text"><text:span text:style-name="T6">0x0001</text:span></text:span><text:span text:style-name="T4"> | Byte (Ímpar) | 1 (Inativo) | </text:span><text:span text:style-name="T5">0 (Ativo)</text:span><text:span text:style-name="T4"> | D7 - D0 |</text:span></text:p>
      <text:p text:style-name="P7"><text:span text:style-name="T4">| </text:span><text:span text:style-name="Source_20_Text"><text:span text:style-name="T6">0x0000</text:span></text:span><text:span text:style-name="T4"> | Word (16-bit) | </text:span><text:span text:style-name="T5">0 (Ativo)</text:span><text:span text:style-name="T4"> | </text:span><text:span text:style-name="T5">0 (Ativo)</text:span><text:span text:style-name="T4"> | D15 - D0 |</text:span></text:p>
      <text:h text:style-name="P2" text:outline-level="3">3. Por que a confusão?</text:h>
      <text:p text:style-name="P11">Muitas vezes pensamos: <text:span text:style-name="T7">"Se o endereço é 0 (Low), o sinal deveria ser LDS (Low Data Strobe)"</text:span>. Mas no 68000, a palavra "Lower" e "Upper" refere-se à <text:span text:style-name="T1">posição </text:span><text:soft-page-break/><text:span text:style-name="T1">do bit no barramento de dados de 16 bits</text:span>, e não ao valor numérico do endereço.</text:p>
      <text:list text:style-name="L3">
        <text:list-item>
          <text:p text:style-name="P14"><text:span text:style-name="T1">Upper</text:span> = Bits altos (<text:span text:style-name="T1">D15-D8</text:span>) = Endereço <text:span text:style-name="T1">Par</text:span> (porque é Big-Endian).</text:p>
        </text:list-item>
        <text:list-item>
          <text:p text:style-name="P14"><text:span text:style-name="T1">Lower</text:span> = Bits baixos (<text:span text:style-name="T1">D7-D0</text:span>) = Endereço <text:span text:style-name="T1">Ímpar</text:span>.</text:p>
        </text:list-item>
      </text:list>
      <text:h text:style-name="P2" text:outline-level="3">Como isso afeta sua GAL?</text:h>
      <text:p text:style-name="P17"><text:span text:style-name="T4">Se o seu Raspberry Pi Pico estiver mapeado em um endereço </text:span><text:span text:style-name="T5">PAR</text:span><text:span text:style-name="T4"> (por exemplo, </text:span><text:span text:style-name="Source_20_Text"><text:span text:style-name="T6">0x400000</text:span></text:span><text:span text:style-name="T4">), o 68000 vai descer o </text:span><text:span text:style-name="T5">$\overline{UDS}$</text:span><text:span text:style-name="T4"> para falar com ele. Se estiver no </text:span><text:span text:style-name="T5">ÍMPAR</text:span><text:span text:style-name="T4"> (</text:span><text:span text:style-name="Source_20_Text"><text:span text:style-name="T6">0x400001</text:span></text:span><text:span text:style-name="T4">), será o </text:span><text:span text:style-name="T5">$\overline{LDS}$</text:span><text:span text:style-name="T4">.</text:span></text:p>
      <text:p text:style-name="P10">Se você quer que o Pico responda independentemente de ser um acesso de Byte ou Word, a lógica que discutimos antes continua valendo:</text:p>
      <text:p text:style-name="P17"><text:span text:style-name="Source_20_Text"><text:span text:style-name="T6">!DTACK = !CS_PICO &amp; (!UDS # !LDS) &amp; PICO_READY;</text:span></text:span></text:p>
      <text:p text:style-name="P11">Isso garante que, se o 68000 "encostar" em qualquer um dos strobes (seja para o byte par ou ímpar), o <text:span text:style-name="T2">$\overline{DTACK}$</text:span> será gerado.</text:p>
      <text:p text:style-name="P1"/>
      <text:p text:style-name="P11"><text:span text:style-name="T1">Ficou mais claro agora?</text:span> Essa inversão "Upper = Par" e "Lower = Ímpar" é um dos primeiros "nós" que todo mundo tem que desatar quando estuda a arquitetura 68k. 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" svg:font-family="'Ubuntu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Ubuntu Sans" fo:font-size="13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Ubuntu Sans" fo:font-size="13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3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Ubuntu Sans" fo:font-family="'Ubuntu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Sans" fo:font-family="'Ubuntu Sans'" style:font-family-generic="swiss" fo:font-size="13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Sans" fo:font-family="'Ubuntu Sans'" style:font-family-generic="swiss"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9T11:35:42.239841250</meta:creation-date>
    <dc:date>2026-03-19T11:38:29.349976196</dc:date>
    <meta:editing-duration>PT2M48S</meta:editing-duration>
    <meta:editing-cycles>1</meta:editing-cycles>
    <meta:document-statistic meta:table-count="0" meta:image-count="0" meta:object-count="0" meta:page-count="2" meta:paragraph-count="27" meta:word-count="458" meta:character-count="2550" meta:non-whitespace-character-count="2124"/>
    <meta:generator>LibreOffice/24.2.7.2$Linux_X86_64 LibreOffice_project/420$Build-2</meta:generator>
  </office:meta>
</office:document-meta>
</file>
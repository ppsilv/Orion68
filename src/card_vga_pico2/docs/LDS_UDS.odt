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" svg:font-family="'Ubuntu Sans'" style:font-family-generic="swiss"/>
  </office:font-face-decls>
  <office:automatic-styles>
    <style:style style:name="Table1" style:family="table">
      <style:table-properties style:width="13.801cm" table:align="left"/>
    </style:style>
    <style:style style:name="Table1.A" style:family="table-column">
      <style:table-column-properties style:column-width="2.323cm"/>
    </style:style>
    <style:style style:name="Table1.B" style:family="table-column">
      <style:table-column-properties style:column-width="1.378cm"/>
    </style:style>
    <style:style style:name="Table1.C" style:family="table-column">
      <style:table-column-properties style:column-width="6.04cm"/>
    </style:style>
    <style:style style:name="Table1.D" style:family="table-column">
      <style:table-column-properties style:column-width="4.06cm"/>
    </style:style>
    <style:style style:name="Table1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e1.D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P1" style:family="paragraph" style:parent-style-name="Horizontal_20_Line">
      <style:paragraph-properties style:writing-mode="lr-tb"/>
    </style:style>
    <style:style style:name="P2" style:family="paragraph" style:parent-style-name="Heading_20_3">
      <style:paragraph-properties fo:margin-left="0cm" fo:margin-right="0cm" fo:margin-top="0cm" fo:margin-bottom="0.212cm" style:contextual-spacing="false" fo:line-height="114%" fo:orphans="1" fo:text-indent="0cm" style:auto-text-indent="false" fo:padding="0cm" fo:border="none" style:writing-mode="lr-tb"/>
      <style:text-properties style:font-name="Google Sans" fo:language="en" fo:country="US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line-height="114%" fo:orphans="1" fo:text-indent="0cm" style:auto-text-indent="false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line-height="114%" fo:orphans="1" fo:text-indent="0cm" style:auto-text-indent="false"/>
      <style:text-properties style:font-name="Google Sans Text" fo:font-weight="bold" loext:padding="0cm" loext:border="none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14%" fo:orphans="1" fo:text-indent="0cm" style:auto-text-indent="false"/>
      <style:text-properties style:font-name="Google Sans Text" loext:padding="0cm" loext:border="none"/>
    </style:style>
    <style:style style:name="P7" style:family="paragraph" style:parent-style-name="Text_20_body">
      <style:paragraph-properties fo:margin-left="0cm" fo:margin-right="0cm" fo:margin-top="0cm" fo:margin-bottom="0.423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</style:style>
    <style:style style:name="T1" style:family="text">
      <style:text-properties fo:font-weight="bold"/>
    </style:style>
    <style:style style:name="T2" style:family="text">
      <style:text-properties fo:font-weight="bold" loext:padding="0cm" loext:border="none"/>
    </style:style>
    <style:style style:name="T3" style:family="text">
      <style:text-properties loext:padding="0cm" loext:border="none"/>
    </style:style>
    <style:style style:name="T4" style:family="text">
      <style:text-properties style:font-name="Google Sans Text" loext:padding="0cm" loext:border="none"/>
    </style:style>
    <style:style style:name="T5" style:family="text">
      <style:text-properties style:font-name="Google Sans Text" fo:language="en" fo:country="US"/>
    </style:style>
    <style:style style:name="T6" style:family="text">
      <style:text-properties style:font-name="Google Sans Text" fo:language="en" fo:country="US" fo:font-weight="bold" loext:padding="0cm" loext:border="none"/>
    </style:style>
    <style:style style:name="T7" style:family="text">
      <style:text-properties style:font-name="Google Sans Text" fo:language="en" fo:country="US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arramento de Dados 68000: Byte Alto e Baixo</text:p>
      <text:p text:style-name="Standard"/>
      <text:p text:style-name="Standard"/>
      <text:p text:style-name="P7">Vamos lá, esse é o teste real para ver se a lógica do 68000 "clicou" na sua cabeça. Usando o seu exemplo exato:</text:p>
      <text:h text:style-name="P2" text:outline-level="3">O Cenário</text:h>
      <text:list text:style-name="L1">
        <text:list-item>
          <text:p text:style-name="P9"><text:span text:style-name="T2">Endereço 0x0001:</text:span> Contém o dado <text:span text:style-name="T2">0x34</text:span>.</text:p>
        </text:list-item>
        <text:list-item>
          <text:p text:style-name="P9"><text:span text:style-name="T2">Ação:</text:span> Ler 8 bits (Byte) do endereço <text:span text:style-name="T2">0x0001</text:span>.</text:p>
        </text:list-item>
      </text:list>
      <text:h text:style-name="P2" text:outline-level="3">A Resposta</text:h>
      <text:list text:style-name="L2">
        <text:list-item>
          <text:p text:style-name="P10"><text:span text:style-name="T2">Qual sinal ativa?</text:span> Ativa o <text:span text:style-name="T2">$\overline{LDS}$</text:span> (Lower Data Strobe).</text:p>
        </text:list-item>
        <text:list-item>
          <text:p text:style-name="P10"><text:span text:style-name="T2">Em quais bits do barramento de dados o 0x34 aparece?</text:span> Ele aparece nos bits <text:span text:style-name="T2">D0 a D7</text:span> (o byte baixo do barramento de 16 bits).</text:p>
        </text:list-item>
      </text:list>
      <text:p text:style-name="P1"/>
      <text:h text:style-name="P2" text:outline-level="3">Por que isso acontece? (A anatomia do 68k)</text:h>
      <text:p text:style-name="P12"><text:span text:style-name="T5">O 68000 enxerga a memória em "Words" (16 bits), mas ele as organiza de forma </text:span><text:span text:style-name="T6">Big-Endian</text:span><text:span text:style-name="T5">. Imagine que o processador olha para o endereço </text:span><text:span text:style-name="Source_20_Text"><text:span text:style-name="T7">0x0000</text:span></text:span><text:span text:style-name="T5"> e vê uma Word inteira composta pelos endereços </text:span><text:span text:style-name="Source_20_Text"><text:span text:style-name="T7">0x0000</text:span></text:span><text:span text:style-name="T5"> e </text:span><text:span text:style-name="Source_20_Text"><text:span text:style-name="T7">0x0001</text:span></text:span><text:span text:style-name="T5">.</text:span></text:p>
      <text:list text:style-name="L3">
        <text:list-item>
          <text:p text:style-name="P11"><text:span text:style-name="T2">O byte PAR (0x0000)</text:span> é o "Upper Byte" e viaja pelos fios <text:span text:style-name="T2">D15-D8</text:span>. Ele é controlado pelo <text:span text:style-name="T2">$\overline{UDS}$</text:span>.</text:p>
        </text:list-item>
        <text:list-item>
          <text:p text:style-name="P11"><text:span text:style-name="T2">O byte ÍMPAR (0x0001)</text:span> é o "Lower Byte" e viaja pelos fios <text:span text:style-name="T2">D7-D0</text:span>. Ele é controlado pelo <text:span text:style-name="T2">$\overline{LDS}$</text:span>.</text:p>
        </text:list-item>
      </text:list>
      <text:h text:style-name="P2" text:outline-level="3">Como ficaria a Tabela de Verdade para o seu exemplo: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<text:span text:style-name="Strong_20_Emphasis"><text:span text:style-name="T4">Endereço</text:span></text:span></text:p>
            </table:table-cell>
            <table:table-cell table:style-name="Table1.A1" office:value-type="string">
              <text:p text:style-name="P4"><text:span text:style-name="Strong_20_Emphasis"><text:span text:style-name="T4">Dado</text:span></text:span></text:p>
            </table:table-cell>
            <table:table-cell table:style-name="Table1.A1" office:value-type="string">
              <text:p text:style-name="P4"><text:span text:style-name="Strong_20_Emphasis"><text:span text:style-name="T4">No Barramento de 16 bits</text:span></text:span></text:p>
            </table:table-cell>
            <table:table-cell table:style-name="Table1.D1" office:value-type="string">
              <text:p text:style-name="P4"><text:span text:style-name="Strong_20_Emphasis"><text:span text:style-name="T4">Sinal Ativado</text:span></text:span></text:p>
            </table:table-cell>
          </table:table-row>
        </table:table-header-rows>
        <table:table-row>
          <table:table-cell table:style-name="Table1.A1" office:value-type="string">
            <text:p text:style-name="P5">0x0000</text:p>
          </table:table-cell>
          <table:table-cell table:style-name="Table1.A1" office:value-type="string">
            <text:p text:style-name="P6">12</text:p>
          </table:table-cell>
          <table:table-cell table:style-name="Table1.A1" office:value-type="string">
            <text:p text:style-name="P6">Aparece em <text:span text:style-name="T1">D15-D8</text:span></text:p>
          </table:table-cell>
          <table:table-cell table:style-name="Table1.D1" office:value-type="string">
            <text:p text:style-name="P6">$\overline{UDS}$</text:p>
          </table:table-cell>
        </table:table-row>
        <table:table-row>
          <table:table-cell table:style-name="Table1.A1" office:value-type="string">
            <text:p text:style-name="P5">0x0001</text:p>
          </table:table-cell>
          <table:table-cell table:style-name="Table1.A1" office:value-type="string">
            <text:p text:style-name="P6">34</text:p>
          </table:table-cell>
          <table:table-cell table:style-name="Table1.A1" office:value-type="string">
            <text:p text:style-name="P6">Aparece em <text:span text:style-name="T1">D7-D0</text:span></text:p>
          </table:table-cell>
          <table:table-cell table:style-name="Table1.D1" office:value-type="string">
            <text:p text:style-name="P5">$\overline{LDS}$</text:p>
          </table:table-cell>
        </table:table-row>
        <table:table-row>
          <table:table-cell table:style-name="Table1.A1" office:value-type="string">
            <text:p text:style-name="P5">0x0002</text:p>
          </table:table-cell>
          <table:table-cell table:style-name="Table1.A1" office:value-type="string">
            <text:p text:style-name="P6">56</text:p>
          </table:table-cell>
          <table:table-cell table:style-name="Table1.A1" office:value-type="string">
            <text:p text:style-name="P6">Aparece em <text:span text:style-name="T1">D15-D8</text:span></text:p>
          </table:table-cell>
          <table:table-cell table:style-name="Table1.D1" office:value-type="string">
            <text:p text:style-name="P6">$\overline{UDS}$</text:p>
          </table:table-cell>
        </table:table-row>
        <table:table-row>
          <table:table-cell table:style-name="Table1.A1" office:value-type="string">
            <text:p text:style-name="P5">0x0003</text:p>
          </table:table-cell>
          <table:table-cell table:style-name="Table1.A1" office:value-type="string">
            <text:p text:style-name="P6">78</text:p>
          </table:table-cell>
          <table:table-cell table:style-name="Table1.A1" office:value-type="string">
            <text:p text:style-name="P6">Aparece em <text:span text:style-name="T1">D7-D0</text:span></text:p>
          </table:table-cell>
          <table:table-cell table:style-name="Table1.D1" office:value-type="string">
            <text:p text:style-name="P6">$\overline{LDS}$</text:p>
          </table:table-cell>
        </table:table-row>
      </table:table>
      <text:p text:style-name="P1"/>
      <text:h text:style-name="P2" text:outline-level="3"><text:soft-page-break/>Onde o seu projeto com o Pico entra nisso?</text:h>
      <text:p text:style-name="P8">Se o seu Raspberry Pi Pico estiver conectado apenas aos pinos <text:span text:style-name="T2">D0-D7</text:span> do 68000 (usando um 74HC245), o 68000 só conseguirá "falar" com ele através de endereços <text:span text:style-name="T2">ÍMPARES</text:span> (0x0001, 0x0003, etc.).</text:p>
      <text:p text:style-name="P12"><text:span text:style-name="T5">Se o código do 68000 tentar escrever no endereço </text:span><text:span text:style-name="Source_20_Text"><text:span text:style-name="T7">0x0000</text:span></text:span><text:span text:style-name="T5"> (Par), o dado vai sair pelos fios </text:span><text:span text:style-name="T6">D15-D8</text:span><text:span text:style-name="T5">, e como o seu Pico não estaria ligado neles, o dado se perderia no "vazio".</text:span></text:p>
      <text:p text:style-name="P8"><text:span text:style-name="T2">Dica de mestre:</text:span> Se você quer usar apenas 8 bits no Pico, mapeie o endereço do periférico na sua GAL para um endereço <text:span text:style-name="T2">ímpar</text:span>. Assim, toda vez que o software do 68000 escrever naquele endereço, o sinal <text:span text:style-name="T3">$\overline{LDS}$</text:span> será ativado, o 74HC245 abrirá os dados de D7-D0, e o Pico receberá o valor certinho.</text:p>
      <text:p text:style-name="P7">Faz sentido essa separação entre o que é o "endereço na memória" e "qual fio o dado usa"? Se quiser, posso te mostrar como a GAL deve filtrar isso para o Pico não ler lixo quando o 68000 estiver falando com o endereço par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" svg:font-family="'Ubuntu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Ubuntu Sans" fo:font-size="13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Ubuntu Sans" fo:font-size="13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Ubuntu Sans" fo:font-family="'Ubuntu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Sans" fo:font-family="'Ubuntu Sans'" style:font-family-generic="swiss" fo:font-size="13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Sans" fo:font-family="'Ubuntu Sans'" style:font-family-generic="swiss"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9T11:38:33.777239393</meta:creation-date>
    <dc:date>2026-03-19T11:39:52.102163140</dc:date>
    <meta:editing-duration>PT1M19S</meta:editing-duration>
    <meta:editing-cycles>1</meta:editing-cycles>
    <meta:document-statistic meta:table-count="1" meta:image-count="0" meta:object-count="0" meta:page-count="2" meta:paragraph-count="38" meta:word-count="383" meta:character-count="2089" meta:non-whitespace-character-count="1750"/>
    <meta:generator>LibreOffice/24.2.7.2$Linux_X86_64 LibreOffice_project/420$Build-2</meta:generator>
  </office:meta>
</office:document-meta>
</file>
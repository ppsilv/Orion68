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" svg:font-family="'Ubuntu Sans'" style:font-family-generic="swiss"/>
  </office:font-face-decls>
  <office:automatic-styles>
    <style:style style:name="P1" style:family="paragraph" style:parent-style-name="Heading_20_3">
      <style:paragraph-properties fo:margin-left="0cm" fo:margin-right="0cm" fo:margin-top="0cm" fo:margin-bottom="0.212cm" style:contextual-spacing="false" fo:line-height="114%" fo:orphans="1" fo:text-indent="0cm" style:auto-text-indent="false" fo:padding="0cm" fo:border="none" style:writing-mode="lr-tb"/>
      <style:text-properties style:font-name="Google Sans" fo:language="en" fo:country="US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  <style:text-properties style:font-name="Google Sans" fo:language="en" fo:country="US"/>
    </style:style>
    <style:style style:name="P3" style:family="paragraph" style:parent-style-name="Horizontal_20_Line">
      <style:paragraph-properties style:writing-mode="lr-tb"/>
    </style:style>
    <style:style style:name="P4" style:family="paragraph" style:parent-style-name="Standard">
      <style:text-properties fo:font-size="16pt" fo:font-weight="bold" officeooo:rsid="0012eb69" officeooo:paragraph-rsid="0012eb69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left="0cm" fo:margin-right="0cm" fo:margin-top="0cm" fo:margin-bottom="0.423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7" style:family="paragraph" style:parent-style-name="Text_20_body">
      <style:paragraph-properties fo:margin-left="0cm" fo:margin-right="0cm" fo:margin-top="0cm" fo:margin-bottom="0.212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8" style:family="paragraph" style:parent-style-name="Horizontal_20_Line">
      <style:paragraph-properties style:writing-mode="lr-tb"/>
    </style:style>
    <style:style style:name="P9" style:family="paragraph" style:parent-style-name="Heading_20_3">
      <style:paragraph-properties fo:margin-left="0cm" fo:margin-right="0cm" fo:margin-top="0cm" fo:margin-bottom="0.212cm" style:contextual-spacing="false" fo:line-height="114%" fo:orphans="1" fo:text-indent="0cm" style:auto-text-indent="false" fo:padding="0cm" fo:border="none" style:writing-mode="lr-tb"/>
      <style:text-properties style:font-name="Google Sans" fo:language="en" fo:country="US"/>
    </style:style>
    <style:style style:name="P10" style:family="paragraph" style:parent-style-name="Heading_20_3">
      <style:paragraph-properties fo:margin-left="0cm" fo:margin-right="0cm" fo:margin-top="0cm" fo:margin-bottom="0.212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fo:line-height="114%" fo:orphans="1" fo:padding="0cm" fo:border="none" style:writing-mode="lr-tb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15" style:family="paragraph" style:parent-style-name="Text_20_body" style:list-style-name="L2">
      <style:paragraph-properties fo:margin-left="0cm" fo:margin-right="0cm" fo:margin-top="0cm" fo:margin-bottom="0.212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16" style:family="paragraph" style:parent-style-name="Text_20_body" style:list-style-name="L3">
      <style:paragraph-properties fo:margin-left="0cm" fo:margin-right="0cm" fo:margin-top="0cm" fo:margin-bottom="0.212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17" style:family="paragraph" style:parent-style-name="Text_20_body">
      <style:paragraph-properties fo:margin-left="0cm" fo:margin-right="0cm" fo:margin-top="0cm" fo:margin-bottom="0.423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19" style:family="paragraph" style:parent-style-name="Text_20_body">
      <style:paragraph-properties fo:margin-left="0cm" fo:margin-right="0cm" fo:margin-top="0cm" fo:margin-bottom="0.212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20" style:family="paragraph" style:parent-style-name="Text_20_body" style:list-style-name="L4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21" style:family="paragraph" style:parent-style-name="Text_20_body" style:list-style-name="L5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22" style:family="paragraph" style:parent-style-name="Text_20_body" style:list-style-name="L6">
      <style:paragraph-properties fo:margin-left="0cm" fo:margin-right="0cm" fo:margin-top="0cm" fo:margin-bottom="0.212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23" style:family="paragraph" style:parent-style-name="Text_20_body" style:list-style-name="L6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24" style:family="paragraph" style:parent-style-name="Text_20_body" style:list-style-name="L7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25" style:family="paragraph" style:parent-style-name="Text_20_body">
      <style:paragraph-properties fo:margin-left="0cm" fo:margin-right="0cm" fo:line-height="114%" fo:orphans="1" fo:text-indent="0cm" style:auto-text-indent="false" style:writing-mode="lr-tb"/>
      <style:text-properties style:font-name="Google Sans Text" fo:language="en" fo:country="US" loext:padding="0cm" loext:border="none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 officeooo:rsid="0014b890" officeooo:paragraph-rsid="0014b890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 fo:font-weight="bold" loext:padding="0cm" loext:border="none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</style:style>
    <style:style style:name="P29" style:family="paragraph" style:parent-style-name="Text_20_body" style:list-style-name="L4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  <style:text-properties officeooo:paragraph-rsid="0014f551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  <style:text-properties officeooo:rsid="0014b890" officeooo:paragraph-rsid="0014b890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  <style:text-properties fo:font-size="16pt" fo:font-weight="bold" officeooo:rsid="0014b890" officeooo:paragraph-rsid="0014b890" style:font-size-asian="16pt" style:font-weight-asian="bold" style:font-size-complex="16pt" style:font-weight-complex="bold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  <style:text-properties officeooo:rsid="0014f551"/>
    </style:style>
    <style:style style:name="T1" style:family="text">
      <style:text-properties fo:font-weight="bold" loext:padding="0cm" loext:border="none"/>
    </style:style>
    <style:style style:name="T2" style:family="text">
      <style:text-properties loext:padding="0cm" loext:border="none"/>
    </style:style>
    <style:style style:name="T3" style:family="text">
      <style:text-properties style:font-name="Google Sans Text" loext:padding="0cm" loext:border="none"/>
    </style:style>
    <style:style style:name="T4" style:family="text">
      <style:text-properties style:font-name="Google Sans Text" fo:language="en" fo:country="US"/>
    </style:style>
    <style:style style:name="T5" style:family="text">
      <style:text-properties style:font-name="Google Sans Text" fo:language="en" fo:country="US" fo:font-weight="bold" loext:padding="0cm" loext:border="none"/>
    </style:style>
    <style:style style:name="T6" style:family="text">
      <style:text-properties style:font-name="Google Sans Text" fo:language="en" fo:country="US" loext:padding="0cm" loext:border="none"/>
    </style:style>
    <style:style style:name="T7" style:family="text">
      <style:text-properties style:font-name="Google Sans Text" fo:language="en" fo:country="US" fo:font-style="italic" loext:padding="0cm" loext:border="none"/>
    </style:style>
    <style:style style:name="T8" style:family="text">
      <style:text-properties fo:font-style="italic" loext:padding="0cm" loext:border="none"/>
    </style:style>
    <style:style style:name="T9" style:family="text">
      <style:text-properties fo:font-variant="normal" fo:text-transform="none" style:font-name="Google Sans Text" fo:font-size="10.5pt" fo:language="en" fo:country="US" fo:font-style="normal" fo:font-weight="normal" loext:padding="0cm" loext:border="none"/>
    </style:style>
    <style:style style:name="T10" style:family="text">
      <style:text-properties fo:font-variant="normal" fo:text-transform="none" loext:padding="0cm" loext:border="none"/>
    </style:style>
    <style:style style:name="T11" style:family="text">
      <style:text-properties officeooo:rsid="0014f551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o funciona DTACK no 68000</text:p>
      <text:p text:style-name="Standard"/>
      <text:p text:style-name="P5">Essa é uma excelente pergunta de "arqueologia digital"! Você tocou no ponto que tornava o design de placas com o 68000 um pouco mais complexo (e elegante) do que com processadores como o Z80 ou o 6502.</text:p>
      <text:p text:style-name="P6">Como as memórias RAM e ROM/EPROM são componentes <text:span text:style-name="T1">passivos</text:span> (elas não "sabem" que terminaram de ler, apenas disponibilizam o dado após um tempo <text:span text:style-name="T2">$t_{ACC}$</text:span>), os projetistas usavam a <text:span text:style-name="T1">Lógica de Decodificação de Endereço</text:span> para "mentir" ou confirmar para o processador que o dado estava pronto.</text:p>
      <text:p text:style-name="P5">Aqui estão as três formas principais como isso era resolvido:</text:p>
      <text:p text:style-name="P3"/>
      <text:h text:style-name="P1" text:outline-level="3">1. O DTACK "Direto" (0 Wait States)</text:h>
      <text:p text:style-name="P6">Se a memória fosse rápida o suficiente para responder dentro do ciclo de clock do 68000, o projetista simplesmente ligava a saída da lógica de seleção (o sinal <text:span text:style-name="T2">$\overline{CS}$</text:span> ou <text:span text:style-name="T2">$\overline{CE}$</text:span> da memória) diretamente ao <text:span text:style-name="T2">$\overline{DTACK}$</text:span> do processador.</text:p>
      <text:list text:style-name="L1">
        <text:list-item>
          <text:p text:style-name="P13"><text:span text:style-name="T1">Como funcionava:</text:span> Assim que o 68000 colocava o endereço no barramento e a lógica de decodificação (geralmente um chip <text:span text:style-name="T1">74LS138</text:span>) reconhecia que era um acesso à RAM, ela ativava o chip da RAM e, ao mesmo tempo, puxava o <text:span text:style-name="T2">$\overline{DTACK}$</text:span> para nível baixo.</text:p>
        </text:list-item>
        <text:list-item>
          <text:p text:style-name="P13"><text:span text:style-name="T1">Resultado:</text:span> O 68000 seguia na velocidade máxima, sem esperar nenhum ciclo extra.</text:p>
        </text:list-item>
      </text:list>
      <text:h text:style-name="P1" text:outline-level="3">2. Geradores de Wait States (O "Atrasador")</text:h>
      <text:p text:style-name="P6">Quando a memória era mais lenta que o processador (muito comum com as EPROMs antigas), os projetistas usavam um <text:span text:style-name="T1">Shift Register</text:span> (como o <text:span text:style-name="T1">74LS164</text:span>) ou um contador para atrasar o sinal de <text:span text:style-name="T2">$\overline{DTACK}$</text:span>.</text:p>
      <text:list text:style-name="L2">
        <text:list-item>
          <text:p text:style-name="P14"><text:span text:style-name="T1">O truque:</text:span> 1. O sinal <text:span text:style-name="T2">$\overline{AS}$</text:span> (Address Strobe) disparava o contador/shift register.</text:p>
          <text:p text:style-name="P15">2. Após 1, 2 ou 3 pulsos de clock do sistema, uma das saídas do contador ia para nível baixo.</text:p>
          <text:p text:style-name="P14">3. Essa saída era conectada ao <text:span text:style-name="T2">$\overline{DTACK}$</text:span>.</text:p>
        </text:list-item>
        <text:list-item>
          <text:p text:style-name="P14"><text:span text:style-name="T1">Resultado:</text:span> O processador entrava em um estado de espera (<text:span text:style-name="T8">Wait State</text:span>) até que o contador desse o "ok", garantindo que a memória lenta tivesse tempo de colocar os dados no barramento.</text:p>
        </text:list-item>
      </text:list>
      <text:h text:style-name="P1" text:outline-level="3"><text:soft-page-break/>3. Circuitos com Flip-Flops</text:h>
      <text:p text:style-name="P6">Muitas vezes, usava-se um flip-flop (como o <text:span text:style-name="T1">74LS74</text:span>) para sincronizar o sinal de seleção de chip com o clock do sistema. O <text:span text:style-name="T2">$\overline{AS}$</text:span> "setava" o flip-flop, e o próximo pulso de clock (ou o seguinte) enviava o <text:span text:style-name="T2">$\overline{DTACK}$</text:span>. Isso garantia que o sinal de confirmação fosse perfeitamente síncrono com o coração do processador.</text:p>
      <text:p text:style-name="P3"/>
      <text:h text:style-name="P1" text:outline-level="3">Por que o 68000 era assim?</text:h>
      <text:p text:style-name="P6">Diferente de outros chips, o 68000 foi desenhado para ser <text:span text:style-name="T1">assíncrono</text:span>. Isso significa que, teoricamente, você poderia ter uma memória que demora 10 segundos para responder; o processador simplesmente ficaria parado esperando o <text:span text:style-name="T2">$\overline{DTACK}$</text:span>.</text:p>
      <text:p text:style-name="P7">Isso permitia:</text:p>
      <text:list text:style-name="L3">
        <text:list-item>
          <text:p text:style-name="P16">Misturar memórias rápidas e lentas no mesmo sistema.</text:p>
        </text:list-item>
        <text:list-item>
          <text:p text:style-name="P16">Interconectar periféricos de velocidades completamente diferentes (como o seu Pico!).</text:p>
        </text:list-item>
        <text:list-item>
          <text:p text:style-name="P16">Criar sistemas multi-processados onde um processador espera o outro liberar o barramento.</text:p>
        </text:list-item>
      </text:list>
      <text:h text:style-name="P2" text:outline-level="3">O Perigo: O "Bus Error" (<text:span text:style-name="T3">$\overline{BERR}$</text:span>)</text:h>
      <text:p text:style-name="P6">Se um projetista cometesse um erro e o processador tentasse acessar um endereço onde não havia nada (e, portanto, ninguém responderia o <text:span text:style-name="T2">$\overline{DTACK}$</text:span>), o 68000 ficaria travado para sempre. Por isso, as placas profissionais tinham um circuito de <text:span text:style-name="T1">Watchdog</text:span> que, se o <text:span text:style-name="T2">$\overline{DTACK}$</text:span> demorasse demais, ativava o pino <text:span text:style-name="T1">$\overline{BERR}$</text:span> para forçar uma exceção de erro de barramento no software.</text:p>
      <text:p text:style-name="P3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2"><text:soft-page-break/>Usando um GAL para gerar DTACK</text:p>
      <text:p text:style-name="P31"/>
      <text:p text:style-name="P26">Com uma <text:span text:style-name="T1">GAL única "dona" da linha de DTACK</text:span> (ou seja, nenhum outro componente ou periférico está ligado fisicamente a esse pino no 68000 além da saída da GAL), você não precisa se preocupar com conflitos de barramento (o famoso <text:span text:style-name="T8">bus contention</text:span>).</text:p>
      <text:p text:style-name="P6">Nesse caso, você pode usar a saída da GAL no modo <text:span text:style-name="T1">Totem-Pole</text:span> (saída ativa comum), o que simplifica o código e garante transições de sinal bem rápidas e limpas.</text:p>
      <text:p text:style-name="P3"/>
      <text:h text:style-name="P1" text:outline-level="3">Como fica o seu código final (WinCUPL):</text:h>
      <text:p text:style-name="P5">Considerando que a GAL é a única enviando o sinal para a CPU, a lógica que você validou é a definitiva:</text:p>
      <text:p text:style-name="P25">Snippet de código</text:p>
      <text:p text:style-name="P11"><text:span text:style-name="Source_20_Text"><text:span text:style-name="T9">/* Definindo que o pino DTACK é uma saída combinacional comum */</text:span></text:span></text:p>
      <text:p text:style-name="P12"><text:span text:style-name="Source_20_Text"><text:span text:style-name="T9">PIN 15 = DTACK;</text:span></text:span></text:p>
      <text:p text:style-name="P12"/>
      <text:p text:style-name="P12"><text:span text:style-name="Source_20_Text"><text:span text:style-name="T9">/* A lógica direta (Active Low) */</text:span></text:span></text:p>
      <text:p text:style-name="P12"><text:span text:style-name="Source_20_Text"><text:span text:style-name="T9">!DTACK = (!CS_RAM &amp; !AS) </text:span></text:span></text:p>
      <text:p text:style-name="P12"><text:span text:style-name="Source_20_Text"><text:span text:style-name="T10"><text:s text:c="7"/></text:span></text:span><text:span text:style-name="Source_20_Text"><text:span text:style-name="T9"># (!CS_ACIA &amp; !AS) </text:span></text:span></text:p>
      <text:p text:style-name="P12"><text:span text:style-name="Source_20_Text"><text:span text:style-name="T10"><text:s text:c="7"/></text:span></text:span><text:span text:style-name="Source_20_Text"><text:span text:style-name="T9"># (!CS_PICO &amp; !AS &amp; PICO_READY);</text:span></text:span></text:p>
      <text:h text:style-name="P1" text:outline-level="3">Por que isso é uma vantagem no seu projeto?</text:h>
      <text:list text:style-name="L4">
        <text:list-item>
          <text:p text:style-name="P20"><text:span text:style-name="T1">Velocidade:</text:span> Saídas ativas (Totem-Pole) conseguem "puxar" o sinal para 5V muito mais rápido do que um resistor de pull-up faria sozinho. Isso ajuda o 68000 a encerrar o ciclo de barramento o mais rápido possível.</text:p>
        </text:list-item>
        <text:list-item>
          <text:p text:style-name="P20"><text:span text:style-name="T1">Simplicidade de Hardware:</text:span> Você elimina a necessidade de transistores extras ou portas externas. A GAL recebe os sinais de 5V e o sinal de 3.3V do Pico e resolve tudo internamente.</text:p>
        </text:list-item>
        <text:list-item>
          <text:p text:style-name="P29"><text:span text:style-name="T5">Confiabilidade:</text:span><text:span text:style-name="T4"> Como você centralizou o </text:span><text:span text:style-name="T6">$\overline{DTACK}$</text:span><text:span text:style-name="T4"> em um único chip, se o 68000 travar, você sabe exatamente onde olhar: na lógica da GAL ou no sinal de </text:span><text:span text:style-name="Source_20_Text"><text:span text:style-name="T6">PICO_READY</text:span></text:span><text:span text:style-name="T4">.</text:span></text:p>
        </text:list-item>
      </text:list>
      <text:p text:style-name="P3"/>
      <text:h text:style-name="P1" text:outline-level="3">Dica de Layout para a GAL</text:h>
      <text:p text:style-name="P6">Como você vai lidar com sinais de alta frequência do 68000 (mesmo que seja <text:soft-page-break/>de 8MHz ou 10MHz, as bordas de subida são rápidas), tente manter a GAL <text:span text:style-name="T1">o mais próxima possível do processador</text:span>.</text:p>
      <text:p text:style-name="P6">Isso evita que a linha de <text:span text:style-name="T2">$\overline{DTACK}$</text:span> vire uma "antena" e capte ruído, o que poderia causar um "Double DTACK" e confundir o contador de estados interno do 68000.</text:p>
      <text:p text:style-name="P3"/>
      <text:h text:style-name="P10" text:outline-level="3"/>
      <text:p text:style-name="P3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<text:soft-page-break/><text:span text:style-name="T11">DTACK com LDS/UDS<text:line-break/><text:line-break/></text:span><text:span text:style-name="T4">Exatamente! Você pode usar o </text:span><text:span text:style-name="T6">$\overline{LDS}$</text:span><text:span text:style-name="T4"> ou o </text:span><text:span text:style-name="T6">$\overline{UDS}$</text:span><text:span text:style-name="T4"> para gerar o </text:span><text:span text:style-name="T6">$\overline{DTACK}$</text:span><text:span text:style-name="T4"> tanto na leitura quanto na escrita sem problemas. Na verdade, em muitos designs de computadores baseados no 68000, isso é considerado uma </text:span><text:span text:style-name="T5">boa prática</text:span><text:span text:style-name="T4">.</text:span></text:p>
      <text:p text:style-name="P5">Aqui está o porquê de usar os Data Strobes ser uma escolha inteligente para o seu projeto:</text:p>
      <text:p text:style-name="P3"/>
      <text:h text:style-name="P1" text:outline-level="3">1. Garantia de Sincronismo</text:h>
      <text:p text:style-name="P6">Como discutimos, o <text:span text:style-name="T2">$\overline{AS}$</text:span> indica que o <text:span text:style-name="T1">endereço</text:span> é válido, mas os Data Strobes (<text:span text:style-name="T2">$\overline{LDS}/\overline{UDS}$</text:span>) indicam que o <text:span text:style-name="T1">barramento de dados</text:span> está pronto para a ação.</text:p>
      <text:list text:style-name="L5">
        <text:list-item>
          <text:p text:style-name="P21"><text:span text:style-name="T1">Na Escrita:</text:span> Usar os strobes garante que o Pico só responda o <text:span text:style-name="T2">$\overline{DTACK}$</text:span> após o 68000 ter colocado os dados no barramento.</text:p>
        </text:list-item>
        <text:list-item>
          <text:p text:style-name="P21"><text:span text:style-name="T1">Na Leitura:</text:span> Garante que o 68000 está realmente "aberto" para receber o que o periférico tem a dizer.</text:p>
        </text:list-item>
      </text:list>
      <text:h text:style-name="P1" text:outline-level="3">2. Compatibilidade com Byte e Word</text:h>
      <text:p text:style-name="P6">O 68000 pode ler ou escrever um <text:span text:style-name="T1">Word</text:span> (16 bits) ou apenas um <text:span text:style-name="T1">Byte</text:span> (8 bits).</text:p>
      <text:list text:style-name="L6">
        <text:list-item>
          <text:p text:style-name="P23">Se ele acessa um byte no endereço par, ele desce o <text:span text:style-name="T2">$\overline{UDS}$</text:span>.</text:p>
        </text:list-item>
        <text:list-item>
          <text:p text:style-name="P23">Se ele acessa um byte no endereço ímpar, ele desce o <text:span text:style-name="T2">$\overline{LDS}$</text:span>.</text:p>
        </text:list-item>
        <text:list-item>
          <text:p text:style-name="P22">Se ele acessa um word, desce ambos.</text:p>
        </text:list-item>
      </text:list>
      <text:p text:style-name="P6">Se você usar apenas o <text:span text:style-name="T2">$\overline{AS}$</text:span> na sua GAL, o <text:span text:style-name="T2">$\overline{DTACK}$</text:span> será gerado mesmo que o 68000 esteja tentando falar com "o outro byte" (o que ele não quer no momento). Usando os strobes na lógica da GAL, você garante que o <text:span text:style-name="T2">$\overline{DTACK}$</text:span> só ocorra quando o byte correto estiver sendo acessado.</text:p>
      <text:p text:style-name="P3"/>
      <text:h text:style-name="P1" text:outline-level="3">A Lógica "Universal" para a sua GAL</text:h>
      <text:p text:style-name="P5">Se você quer que a GAL responda para qualquer acesso ao Pico (seja byte alto, baixo ou word), a equação ideal seria:</text:p>
      <text:p text:style-name="P28"><text:span text:style-name="Source_20_Text"><text:span text:style-name="T6">!DTACK = !CS_PICO &amp; (!UDS # !LDS) &amp; PICO_READY;</text:span></text:span></text:p>
      <text:p text:style-name="P28"><text:span text:style-name="T7">(Assumindo que sua decodificação </text:span><text:span text:style-name="Source_20_Text"><text:span text:style-name="T7">CS_PICO</text:span></text:span><text:span text:style-name="T7"> já leva o </text:span><text:span text:style-name="Source_20_Text"><text:span text:style-name="T7">AS</text:span></text:span><text:span text:style-name="T7"> em conta, o que é comum).</text:span></text:p>
      <text:h text:style-name="P1" text:outline-level="3"><text:soft-page-break/>Um detalhe importante sobre o 68000 (Leitura vs Escrita)</text:h>
      <text:p text:style-name="P7">Embora você possa usar os strobes para ambos, há uma pequena diferença técnica no comportamento do processador que você deve conhecer:</text:p>
      <text:list text:style-name="L7">
        <text:list-item>
          <text:p text:style-name="P24"><text:span text:style-name="T1">Na Leitura:</text:span> O <text:span text:style-name="T2">$\overline{AS}$</text:span> e os Strobes descem quase juntos. Não há "atraso" útil aqui.</text:p>
        </text:list-item>
        <text:list-item>
          <text:p text:style-name="P24"><text:span text:style-name="T1">Na Escrita:</text:span> Existe aquele atraso de segurança (mencionado antes) onde o <text:span text:style-name="T2">$\overline{AS}$</text:span> desce primeiro e os Strobes descem depois, quando o dado já está "limpo" no barramento.</text:p>
        </text:list-item>
      </text:list>
      <text:p text:style-name="P27">Por que isso é bom para você?</text:p>
      <text:p text:style-name="P6">Como o seu Pico vai atuar como um periférico de <text:span text:style-name="T1">escrita</text:span>, usar o <text:span text:style-name="T2">$\overline{LDS}/\overline{UDS}$</text:span> na GAL dá ao seu código no Pico alguns nanossegundos preciosos a mais para detectar que o ciclo começou antes de ter que "assinar" o recebimento com o <text:span text:style-name="T2">$\overline{DTACK}$</text:span>.</text:p>
      <text:p text:style-name="P3"/>
      <text:h text:style-name="P1" text:outline-level="3">Resumo da ópera</text:h>
      <text:p text:style-name="P6">Sim, usar <text:span text:style-name="T2">$\overline{LDS}$</text:span> ou <text:span text:style-name="T2">$\overline{UDS}$</text:span> para gerar o <text:span text:style-name="T2">$\overline{DTACK}$</text:span> é <text:span text:style-name="T1">mais seguro</text:span> e <text:span text:style-name="T1">mais robusto</text:span> do que usar apenas o <text:span text:style-name="T2">$\overline{AS}$</text:span>. Você evita que o 68000 encerre o ciclo antes que os dados tenham tido tempo de se estabilizar eletricamente nos pinos do Pico (através do seu buffer 74HC245).</text:p>
      <text:p text:style-name="P33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" svg:font-family="'Ubuntu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Sans" fo:font-family="'Ubuntu Sans'" style:font-family-generic="swiss" fo:font-size="13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9T11:14:56.572294899</meta:creation-date>
    <dc:date>2026-03-19T11:36:51.036162046</dc:date>
    <meta:editing-duration>PT21M21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6" meta:paragraph-count="67" meta:word-count="1297" meta:character-count="7689" meta:non-whitespace-character-count="6461"/>
  </office:meta>
</office:document-meta>
</file>
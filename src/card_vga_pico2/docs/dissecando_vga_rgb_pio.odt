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Table1" style:family="table" style:master-page-name="">
      <style:table-properties style:width="17cm" style:page-number="auto" fo:break-before="auto" fo:break-after="auto" table:align="left" fo:keep-with-next="auto"/>
    </style:style>
    <style:style style:name="Table1.A" style:family="table-column">
      <style:table-column-properties style:column-width="3.48cm"/>
    </style:style>
    <style:style style:name="Table1.B" style:family="table-column">
      <style:table-column-properties style:column-width="4.78cm"/>
    </style:style>
    <style:style style:name="Table1.C" style:family="table-column">
      <style:table-column-properties style:column-width="3.004cm"/>
    </style:style>
    <style:style style:name="Table1.D" style:family="table-column">
      <style:table-column-properties style:column-width="5.736cm"/>
    </style:style>
    <style:style style:name="Table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f1f1f" loext:opacity="100%" style:font-name="Google Sans Text"/>
    </style:style>
    <style:style style:name="P4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6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P1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4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5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6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7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8" style:family="paragraph" style:parent-style-name="Quotations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9" style:family="paragraph" style:parent-style-name="Quotations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0" style:family="paragraph" style:parent-style-name="Standard">
      <style:text-properties fo:color="#c9211e" loext:opacity="100%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24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5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6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7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8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9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5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6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7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8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9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0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1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2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3" style:family="paragraph" style:parent-style-name="Text_20_body">
      <style:paragraph-properties fo:margin-left="0cm" fo:margin-right="0cm" fo:line-height="114%" fo:orphans="2" fo:widows="2" fo:text-indent="0cm" style:auto-text-indent="false"/>
      <style:text-properties fo:color="#1f1f1f" loext:opacity="100%" style:font-name="Google Sans Text" loext:padding="0cm" loext:border="none"/>
    </style:style>
    <style:style style:name="P4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4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4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7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8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6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7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8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9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0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fo:color="#1f1f1f" loext:opacity="100%" style:font-name="Google Sans Text"/>
    </style:style>
    <style:style style:name="T4" style:family="text">
      <style:text-properties fo:color="#1f1f1f" loext:opacity="100%" style:font-name="Google Sans Text" loext:padding="0cm" loext:border="none"/>
    </style:style>
    <style:style style:name="T5" style:family="text">
      <style:text-properties fo:color="#1f1f1f" loext:opacity="100%" style:font-name="Google Sans Text" fo:font-weight="bold" loext:padding="0cm" loext:border="none"/>
    </style:style>
    <style:style style:name="T6" style:family="text">
      <style:text-properties fo:color="#1f1f1f" loext:opacity="100%" style:font-name="Google Sans"/>
    </style:style>
    <style:style style:name="T7" style:family="text">
      <style:text-properties fo:color="#444746" loext:opacity="100%" style:font-name="Google Sans Text" loext:padding="0cm" loext:border="none"/>
    </style:style>
    <style:style style:name="T8" style:family="text">
      <style:text-properties fo:color="#444746" loext:opacity="100%" style:font-name="Google Sans Text" fo:font-weight="bold" loext:padding="0cm" loext:border="none"/>
    </style:style>
    <style:style style:name="T9" style:family="text">
      <style:text-properties fo:font-variant="normal" fo:text-transform="none" fo:color="#444746" loext:opacity="100%" style:font-name="Google Sans Text" fo:font-size="10.5pt" fo:font-style="normal" fo:font-weight="normal" loext:padding="0cm" loext:border="none"/>
    </style:style>
    <style:style style:name="T10" style:family="text">
      <style:text-properties fo:font-variant="normal" fo:text-transform="none" fo:color="#444746" loext:opacity="100%" loext:padding="0cm" loext:border="none"/>
    </style:style>
    <style:style style:name="T11" style:family="text">
      <style:text-properties fo:font-variant="normal" fo:text-transform="none" fo:color="#8430ce" loext:opacity="100%" style:font-name="Google Sans Text" fo:font-size="10.5pt" fo:font-style="normal" fo:font-weight="normal" loext:padding="0cm" loext:border="none"/>
    </style:style>
    <style:style style:name="T12" style:family="text">
      <style:text-properties fo:font-variant="normal" fo:text-transform="none" fo:color="#1967d2" loext:opacity="100%" style:font-name="Google Sans Text" fo:font-size="10.5pt" fo:font-style="normal" fo:font-weight="normal" loext:padding="0cm" loext:border="none"/>
    </style:style>
    <style:style style:name="T13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T14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15" style:family="text">
      <style:text-properties fo:font-style="italic" loext:padding="0cm" loext:border="none"/>
    </style:style>
    <style:style style:name="T16" style:family="text">
      <style:text-properties fo:color="#c9211e" loext:opacity="100%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R favor me explique com detalhes esse codigo abaixo, ele está funcionando, mas eu vi uma nota no codigo que eu não entendi, no codigo diz que está </text:p>
      <text:p text:style-name="P3">define TXCOUNT 153600 // Total pixels/2 (since we have 2 pixels per byte)</text:p>
      <text:p text:style-name="P3">char vga_video_data_array0[TXCOUNT];</text:p>
      <text:p text:style-name="P3">char vga_video_data_array1[TXCOUNT];</text:p>
      <text:p text:style-name="P3">char *active_buffer = (char *)&amp;vga_video_data_array0[0];</text:p>
      <text:p text:style-name="P3"/>
      <text:p text:style-name="P3">essa nota: Total pixels/2 (since we have 2 pixels per byte)</text:p>
      <text:p text:style-name="P3"/>
      <text:p text:style-name="P3">eu não entendi, segue o codigo para sua analise:</text:p>
      <text:p text:style-name="P3">.program rgb</text:p>
      <text:p text:style-name="P3">; define the pixel hold times which depend on clock freq</text:p>
      <text:p text:style-name="P3">; pixel1hold should be 5 for 150 MHz <text:s/>(4 for 125 MHz)</text:p>
      <text:p text:style-name="P3">; pixel2hold should be 3 for 150 MHz <text:s/>(2 for 125 MHz)</text:p>
      <text:p text:style-name="P3">.define pixel1hold 5</text:p>
      <text:p text:style-name="P3">.define pixel2hold 3</text:p>
      <text:p text:style-name="P3">.define PUBLIC vid_freq 250</text:p>
      <text:p text:style-name="P3"/>
      <text:p text:style-name="P3">pull block <text:s text:c="17"/>; Pull from FIFO to OSR (only once)</text:p>
      <text:p text:style-name="P3">mov y, osr <text:s text:c="17"/>; Copy value from OSR to y scratch register</text:p>
      <text:p text:style-name="P3">.wrap_target</text:p>
      <text:p text:style-name="P3"/>
      <text:p text:style-name="P3">set pins, 0 <text:s text:c="16"/>; Zero RGB pins in blanking</text:p>
      <text:p text:style-name="P3">mov x, y <text:s text:c="19"/>; Initialize counter variable</text:p>
      <text:p text:style-name="P3"/>
      <text:p text:style-name="P3">wait 1 irq 1 [3] <text:s text:c="11"/>; Wait for vsync active mode (starts 5 cycles after execution)</text:p>
      <text:p text:style-name="P3"/>
      <text:p text:style-name="P3">colorout:</text:p>
      <text:p text:style-name="P3"><text:s text:c="4"/>pull block <text:s text:c="13"/>; Pull color value</text:p>
      <text:p text:style-name="P3"><text:s text:c="4"/>out pins, 4 [pixel1hold] <text:s text:c="3"/>; Push out to pins (first pixel)</text:p>
      <text:p text:style-name="P3"><text:s text:c="4"/>out pins, 4 [pixel2hold] <text:s text:c="3"/>; Push out to pins (next pixel)</text:p>
      <text:p text:style-name="P3"><text:s text:c="4"/>jmp x-- colorout <text:s text:c="7"/>; Stay here thru horizontal active mode</text:p>
      <text:p text:style-name="P3"/>
      <text:p text:style-name="P3">.wrap</text:p>
      <text:p text:style-name="P3"/>
      <text:p text:style-name="P3"><text:soft-page-break/></text:p>
      <text:p text:style-name="P3">O que está acontecendo aqui é uma técnica clássica de otimização de memória em sistemas embarcados. Para entender a nota <text:span text:style-name="T2">"2 pixels per byte"</text:span>, precisamos olhar para como o hardware do PIO e o seu array de dados conversam.</text:p>
      <text:section text:style-name="Sect1" text:name="model-response-message-contentr_6c6ce83403cd9206">
        <text:h text:style-name="P1" text:outline-level="3">1. A Anatomia do Byte (O "Pulo do Gato")</text:h>
        <text:p text:style-name="P7"><text:span text:style-name="T3">A nota faz todo o sentido quando olhamos para a instrução </text:span><text:span text:style-name="Source_20_Text"><text:span text:style-name="T7">out pins, 4</text:span></text:span><text:span text:style-name="T3"> no seu código PIO.</text:span></text:p>
        <text:list text:style-name="L1">
          <text:list-item>
            <text:p text:style-name="P24"><text:span text:style-name="T2">1 Byte</text:span> possui <text:span text:style-name="T2">8 bits</text:span>.</text:p>
          </text:list-item>
          <text:list-item>
            <text:p text:style-name="P46"><text:span text:style-name="T3">Sua instrução </text:span><text:span text:style-name="Source_20_Text"><text:span text:style-name="T7">out pins, 4</text:span></text:span><text:span text:style-name="T3"> retira apenas </text:span><text:span text:style-name="T5">4 bits</text:span><text:span text:style-name="T3"> do OSR (Output Shift Register) e joga para os pinos a cada vez.</text:span></text:p>
          </text:list-item>
          <text:list-item>
            <text:p text:style-name="P46"><text:span text:style-name="T3">Como </text:span><text:span text:style-name="T4">$4 + 4 = 8$</text:span><text:span text:style-name="T3">, você consegue "empacotar" as informações de cor de </text:span><text:span text:style-name="T5">dois pixels</text:span><text:span text:style-name="T3"> dentro de um único </text:span><text:span text:style-name="Source_20_Text"><text:span text:style-name="T7">char</text:span></text:span><text:span text:style-name="T3"> (que é 1 byte) no seu array de C.</text:span></text:p>
          </text:list-item>
        </text:list>
        <text:p text:style-name="Horizontal_20_Line"/>
        <text:h text:style-name="P1" text:outline-level="3">2. Análise Detalhada do Fluxo de Dados</text:h>
        <text:p text:style-name="P4">Vamos seguir o caminho que o dado percorre desde o seu array até o monitor:</text:p>
        <text:list text:style-name="L2">
          <text:list-item>
            <text:p text:style-name="P47"><text:span text:style-name="T5">No C:</text:span><text:span text:style-name="T3"> Você define </text:span><text:span text:style-name="Source_20_Text"><text:span text:style-name="T7">char vga_video_data_array0</text:span></text:span><text:span text:style-name="T3">. Cada posição desse array guarda 8 bits.</text:span></text:p>
          </text:list-item>
          <text:list-item>
            <text:p text:style-name="P25"><text:span text:style-name="T2">No DMA:</text:span> O DMA pega esse byte e envia para a FIFO do PIO.</text:p>
          </text:list-item>
          <text:list-item>
            <text:p text:style-name="P47"><text:span text:style-name="T5">No PIO (</text:span><text:span text:style-name="Source_20_Text"><text:span text:style-name="T8">pull block</text:span></text:span><text:span text:style-name="T5">):</text:span><text:span text:style-name="T3"> O PIO puxa esse dado para o registrador OSR.</text:span></text:p>
          </text:list-item>
          <text:list-item>
            <text:p text:style-name="P47"><text:span text:style-name="T5">Primeiro Pixel (</text:span><text:span text:style-name="Source_20_Text"><text:span text:style-name="T8">out pins, 4</text:span></text:span><text:span text:style-name="T5">):</text:span><text:span text:style-name="T3"> O PIO pega os 4 bits "da direita" e manda para os pinos RGB. Ele segura esse valor pelo tempo </text:span><text:span text:style-name="Source_20_Text"><text:span text:style-name="T7">pixel1hold</text:span></text:span><text:span text:style-name="T3">.</text:span></text:p>
          </text:list-item>
          <text:list-item>
            <text:p text:style-name="P47"><text:span text:style-name="T5">Segundo Pixel (</text:span><text:span text:style-name="Source_20_Text"><text:span text:style-name="T8">out pins, 4</text:span></text:span><text:span text:style-name="T5">):</text:span><text:span text:style-name="T3"> O PIO pega os 4 bits restantes "da esquerda" do mesmo dado e manda para os pinos. Ele segura pelo tempo </text:span><text:span text:style-name="Source_20_Text"><text:span text:style-name="T7">pixel2hold</text:span></text:span><text:span text:style-name="T3">.</text:span></text:p>
          </text:list-item>
        </text:list>
        <text:p text:style-name="Horizontal_20_Line"/>
        <text:h text:style-name="P1" text:outline-level="3">3. Por que isso é bom?</text:h>
        <text:p text:style-name="P4">Se você usasse um byte inteiro para cada pixel (mesmo precisando de apenas 4 bits de cor), você precisaria do dobro de memória RAM:</text:p>
        <text:list text:style-name="L3">
          <text:list-item>
            <text:p text:style-name="P48"><text:span text:style-name="T5">Com 2 pixels por byte:</text:span><text:span text:style-name="T3"> </text:span><text:span text:style-name="Source_20_Text"><text:span text:style-name="T7">153.600</text:span></text:span><text:span text:style-name="T3"> bytes de RAM.</text:span></text:p>
          </text:list-item>
          <text:list-item>
            <text:p text:style-name="P48"><text:span text:style-name="T5">Com 1 pixel por byte:</text:span><text:span text:style-name="T3"> </text:span><text:span text:style-name="Source_20_Text"><text:span text:style-name="T7">307.200</text:span></text:span><text:span text:style-name="T3"> bytes de RAM.</text:span></text:p>
          </text:list-item>
        </text:list>
        <text:p text:style-name="P7"><text:span text:style-name="T3">Como o Raspberry Pi Pico tem 264KB de RAM, a segunda opção provavelmente faria seu código travar ou nem compilar por falta de memória, já que você tem dois buffers (</text:span><text:span text:style-name="Source_20_Text"><text:span text:style-name="T7">array0</text:span></text:span><text:span text:style-name="T3"> e </text:span><text:span text:style-name="Source_20_Text"><text:span text:style-name="T7">array1</text:span></text:span><text:span text:style-name="T3">).</text:span></text:p>
        <text:p text:style-name="Horizontal_20_Line"/>
        <text:h text:style-name="P1" text:outline-level="3"><text:soft-page-break/>4. Explicação do Código PIO (Passo a Passo)</text:h>
        <text:p text:style-name="P10"/>
        <text:p text:style-name="P6"><text:span text:style-name="Source_20_Text"><text:span text:style-name="T9">pull block <text:s text:c="9"/>; Ocorre apenas no </text:span></text:span><text:span text:style-name="Source_20_Text"><text:span text:style-name="T11">in</text:span></text:span><text:span text:style-name="Source_20_Text"><text:span text:style-name="T9">ício para configurar o tamanho da linha</text:span></text:span></text:p>
        <text:p text:style-name="P9"><text:span text:style-name="Source_20_Text"><text:span text:style-name="T9">mov y, osr <text:s text:c="9"/>; Salva o número de pixels (contagem) no registrador Y</text:span></text:span></text:p>
        <text:p text:style-name="P9"><text:span text:style-name="Source_20_Text"><text:span text:style-name="T9">.wrap_target</text:span></text:span></text:p>
        <text:p text:style-name="P9"/>
        <text:p text:style-name="P8"><text:span text:style-name="Source_20_Text"><text:span text:style-name="T12">set</text:span></text:span><text:span text:style-name="Source_20_Text"><text:span text:style-name="T9"> pins, </text:span></text:span><text:span text:style-name="Source_20_Text"><text:span text:style-name="T13">0</text:span></text:span><text:span text:style-name="Source_20_Text"><text:span text:style-name="T9"> <text:s text:c="8"/>; Garante que não saia cor durante o blanking (preto)</text:span></text:span></text:p>
        <text:p text:style-name="P9"><text:span text:style-name="Source_20_Text"><text:span text:style-name="T9">mov x, y <text:s text:c="11"/>; Reseta o contador X para o valor da linha cheia</text:span></text:span></text:p>
        <text:p text:style-name="P8"><text:span text:style-name="Source_20_Text"><text:span text:style-name="T9">wait </text:span></text:span><text:span text:style-name="Source_20_Text"><text:span text:style-name="T13">1</text:span></text:span><text:span text:style-name="Source_20_Text"><text:span text:style-name="T9"> irq </text:span></text:span><text:span text:style-name="Source_20_Text"><text:span text:style-name="T13">1</text:span></text:span><text:span text:style-name="Source_20_Text"><text:span text:style-name="T9"> [</text:span></text:span><text:span text:style-name="Source_20_Text"><text:span text:style-name="T13">3</text:span></text:span><text:span text:style-name="Source_20_Text"><text:span text:style-name="T9">] <text:s text:c="3"/>; Sincronia: espera o sinal do código C/Vsync para começar a desenhar</text:span></text:span></text:p>
        <text:p text:style-name="P9"/>
        <text:p text:style-name="P9"><text:span text:style-name="Source_20_Text"><text:span text:style-name="T9">colorout:</text:span></text:span></text:p>
        <text:p text:style-name="P8"><text:span text:style-name="Source_20_Text"><text:span text:style-name="T10"><text:s text:c="4"/></text:span></text:span><text:span text:style-name="Source_20_Text"><text:span text:style-name="T9">pull block <text:s text:c="13"/>; Puxa </text:span></text:span><text:span text:style-name="Source_20_Text"><text:span text:style-name="T13">32</text:span></text:span><text:span text:style-name="Source_20_Text"><text:span text:style-name="T9"> bits (</text:span></text:span><text:span text:style-name="Source_20_Text"><text:span text:style-name="T13">4</text:span></text:span><text:span text:style-name="Source_20_Text"><text:span text:style-name="T9"> </text:span></text:span><text:span text:style-name="Source_20_Text"><text:span text:style-name="T12">bytes</text:span></text:span><text:span text:style-name="Source_20_Text"><text:span text:style-name="T9">) da FIFO para o OSR</text:span></text:span></text:p>
        <text:p text:style-name="P8"><text:span text:style-name="Source_20_Text"><text:span text:style-name="T10"><text:s text:c="4"/></text:span></text:span><text:span text:style-name="Source_20_Text"><text:span text:style-name="T9">out pins, </text:span></text:span><text:span text:style-name="Source_20_Text"><text:span text:style-name="T13">4</text:span></text:span><text:span text:style-name="Source_20_Text"><text:span text:style-name="T9"> [pixel1hold] ; Envia os primeiros </text:span></text:span><text:span text:style-name="Source_20_Text"><text:span text:style-name="T13">4</text:span></text:span><text:span text:style-name="Source_20_Text"><text:span text:style-name="T9"> bits (Pixel A)</text:span></text:span></text:p>
        <text:p text:style-name="P8"><text:span text:style-name="Source_20_Text"><text:span text:style-name="T10"><text:s text:c="4"/></text:span></text:span><text:span text:style-name="Source_20_Text"><text:span text:style-name="T9">out pins, </text:span></text:span><text:span text:style-name="Source_20_Text"><text:span text:style-name="T13">4</text:span></text:span><text:span text:style-name="Source_20_Text"><text:span text:style-name="T9"> [pixel2hold] ; Envia os próximos </text:span></text:span><text:span text:style-name="Source_20_Text"><text:span text:style-name="T13">4</text:span></text:span><text:span text:style-name="Source_20_Text"><text:span text:style-name="T9"> bits (Pixel B do mesmo byte!)</text:span></text:span></text:p>
        <text:p text:style-name="P9"><text:span text:style-name="Source_20_Text"><text:span text:style-name="T10"><text:s text:c="4"/></text:span></text:span><text:span text:style-name="Source_20_Text"><text:span text:style-name="T9">jmp x-- colorout <text:s text:c="7"/>; Repete até desenhar a linha toda</text:span></text:span></text:p>
        <text:p text:style-name="P9"><text:span text:style-name="Source_20_Text"><text:span text:style-name="T9">.wrap</text:span></text:span></text:p>
        <text:h text:style-name="P1" text:outline-level="3">O que isso significa para você no código C?</text:h>
        <text:p text:style-name="P7"><text:span text:style-name="T3">Quando você for "desenhar" no seu </text:span><text:span text:style-name="Source_20_Text"><text:span text:style-name="T7">vga_video_data_array0</text:span></text:span><text:span text:style-name="T3">, você não pode simplesmente dar um valor de 0 a 255 para um pixel. Você precisa combinar dois pixels em um:</text:span></text:p>
        <text:p text:style-name="P10">C</text:p>
        <text:p text:style-name="P6"><text:span text:style-name="Source_20_Text"><text:span text:style-name="T14">// Exemplo: Pixel 1 tem cor 0x01 e Pixel 2 tem cor 0x02</text:span></text:span></text:p>
        <text:p text:style-name="P8"><text:span text:style-name="Source_20_Text"><text:span text:style-name="T9">vga_video_data_array0[</text:span></text:span><text:span text:style-name="Source_20_Text"><text:span text:style-name="T13">0</text:span></text:span><text:span text:style-name="Source_20_Text"><text:span text:style-name="T9">] = (</text:span></text:span><text:span text:style-name="Source_20_Text"><text:span text:style-name="T13">0x02</text:span></text:span><text:span text:style-name="Source_20_Text"><text:span text:style-name="T9"> &lt;&lt; </text:span></text:span><text:span text:style-name="Source_20_Text"><text:span text:style-name="T13">4</text:span></text:span><text:span text:style-name="Source_20_Text"><text:span text:style-name="T9">) | </text:span></text:span><text:span text:style-name="Source_20_Text"><text:span text:style-name="T13">0x01</text:span></text:span><text:span text:style-name="Source_20_Text"><text:span text:style-name="T9">; </text:span></text:span></text:p>
        <text:p text:style-name="P5">Ficou claro como o bit-shifting funciona para economizar sua RAM? Se quiser, posso te ajudar a criar uma função em C para "pintar" um pixel individualmente nesse formato compactado.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oxa agora eu entendi, isso significa que a frequência do horizontal também levou isso em consideração?</text:p>
      <text:p text:style-name="Standard"/>
      <text:p text:style-name="P2">Sim, você matou a charada! A frequência horizontal (<text:span text:style-name="T2">H-Sync</text:span>) e o "Pixel Clock" estão intimamente ligados a essa lógica de 2 pixels por byte.</text:p>
      <text:section text:style-name="Sect1" text:name="model-response-message-contentr_82ca08bb03a9dc4d">
        <text:p text:style-name="P2">Quando você compacta 2 pixels em um único byte no lado do processador (C), o seu <text:span text:style-name="T2">State Machine (SM)</text:span> do PIO precisa trabalhar o dobro da velocidade ou processar os dados de forma que o monitor VGA receba o sinal no tempo correto (os famosos <text:span text:style-name="T2">25,175 MHz</text:span> para a resolução padrão 640x480 @ 60Hz).</text:p>
        <text:p text:style-name="P26">Aqui estão os três pontos onde essa compactação afeta o tempo:</text:p>
        <text:p text:style-name="Horizontal_20_Line"/>
        <text:h text:style-name="P1" text:outline-level="3">1. O Clock do PIO vs. Pixel Clock</text:h>
        <text:p text:style-name="P7"><text:span text:style-name="T3">No seu código, você definiu </text:span><text:span text:style-name="Source_20_Text"><text:span text:style-name="T7">.define PUBLIC vid_freq 250</text:span></text:span><text:span text:style-name="T3">. Isso significa que o PIO está rodando a </text:span><text:span text:style-name="T5">250 MHz</text:span><text:span text:style-name="T3">.</text:span></text:p>
        <text:p text:style-name="P2">Para gerar um sinal VGA padrão, cada pixel deve durar cerca de <text:span text:style-name="T2">39,7 nanossegundos</text:span>.</text:p>
        <text:p text:style-name="P7"><text:span text:style-name="T3">Como o PIO é extremamente rápido (250 MHz), ele usa os </text:span><text:span text:style-name="T5">"Delay Cycles"</text:span><text:span text:style-name="T3"> (aqueles números entre colchetes </text:span><text:span text:style-name="Source_20_Text"><text:span text:style-name="T7">[pixel1hold]</text:span></text:span><text:span text:style-name="T3">) para "segurar" o sinal de cada pixel pelo tempo exato, garantindo que o monitor consiga ler a cor antes que ela mude.</text:span></text:p>
        <text:h text:style-name="P1" text:outline-level="3">2. A "Marcha" do código PIO</text:h>
        <text:p text:style-name="P7"><text:span text:style-name="T3">Observe o fluxo de tempo no seu loop </text:span><text:span text:style-name="Source_20_Text"><text:span text:style-name="T7">colorout</text:span></text:span><text:span text:style-name="T3">:</text:span></text:p>
        <text:list text:style-name="L4">
          <text:list-item>
            <text:p text:style-name="P56"><text:span text:style-name="Source_20_Text"><text:span text:style-name="T8">out pins, 4 [pixel1hold]</text:span></text:span><text:span text:style-name="T3">: O PIO gasta 1 ciclo para executar + </text:span><text:span text:style-name="Source_20_Text"><text:span text:style-name="T7">pixel1hold</text:span></text:span><text:span text:style-name="T3"> ciclos esperando.</text:span></text:p>
          </text:list-item>
          <text:list-item>
            <text:p text:style-name="P56"><text:span text:style-name="Source_20_Text"><text:span text:style-name="T8">out pins, 4 [pixel2hold]</text:span></text:span><text:span text:style-name="T3">: O PIO gasta mais 1 ciclo + </text:span><text:span text:style-name="Source_20_Text"><text:span text:style-name="T7">pixel2hold</text:span></text:span><text:span text:style-name="T3"> ciclos esperando.</text:span></text:p>
          </text:list-item>
        </text:list>
        <text:p text:style-name="P7"><text:span text:style-name="T3">Se o seu código C enviasse 1 byte por pixel, o loop do PIO teria que fazer um </text:span><text:span text:style-name="Source_20_Text"><text:span text:style-name="T7">pull block</text:span></text:span><text:span text:style-name="T3"> a cada pixel. Fazendo </text:span><text:span text:style-name="T5">2 pixels por </text:span><text:span text:style-name="Source_20_Text"><text:span text:style-name="T8">pull</text:span></text:span><text:span text:style-name="T3">, você reduz o tráfego no barramento de dados e dá fôlego para o PIO manter a frequência horizontal estável sem "engasgar".</text:span></text:p>
        <text:h text:style-name="P1" text:outline-level="3">3. A Frequência Horizontal (H-Sync)</text:h>
        <text:p text:style-name="P4">A frequência horizontal é o tempo que o "canhão de elétrons" (ou o controlador do LCD) leva para desenhar uma linha inteira e voltar para o início da próxima.</text:p>
        <text:list text:style-name="L5">
          <text:list-item>
            <text:p text:style-name="P36"><text:soft-page-break/>Se você tem <text:span text:style-name="T2">640 pixels</text:span> visíveis;</text:p>
          </text:list-item>
          <text:list-item>
            <text:p text:style-name="P58"><text:span text:style-name="T3">O PIO processa isso como </text:span><text:span text:style-name="T5">320 iterações</text:span><text:span text:style-name="T3"> do loop </text:span><text:span text:style-name="Source_20_Text"><text:span text:style-name="T7">colorout</text:span></text:span><text:span text:style-name="T3"> (porque cada iteração desenha 2 pixels).</text:span></text:p>
          </text:list-item>
          <text:list-item>
            <text:p text:style-name="P36">O tempo total dessas 320 iterações, somado ao tempo de <text:span text:style-name="T15">Front Porch</text:span>, <text:span text:style-name="T15">Sync Pulse</text:span> e <text:span text:style-name="T15">Back Porch</text:span>, <text:span text:style-name="T2">tem que ser exatamente 31,46 kHz</text:span> (para 640x480).</text:p>
          </text:list-item>
        </text:list>
        <text:p text:style-name="Horizontal_20_Line"/>
        <text:h text:style-name="P1" text:outline-level="3">Como conferir se o tempo está certo?</text:h>
        <text:p text:style-name="P26">A conta que o autor do código fez foi:</text:p>
        <text:p text:style-name="P43">$$(1 + pixel1hold) + (1 + pixel2hold) = \text{Total de ciclos por byte (2 pixels)}$$</text:p>
        <text:p text:style-name="P26">Com os valores que você tem:</text:p>
        <text:p text:style-name="P43">$$(1 + 5) + (1 + 3) = 10 \text{ ciclos do PIO para cada 2 pixels.}$$</text:p>
        <text:p text:style-name="P2">Se o PIO está a <text:span text:style-name="T2">250 MHz</text:span>, 10 ciclos levam <text:span text:style-name="T2">40 nanosegundos</text:span>. Como são 2 pixels, cada um dura <text:span text:style-name="T2">20 ns</text:span>.</text:p>
        <text:p text:style-name="P18"><text:span text:style-name="T2">Nota de peer:</text:span> 20 ns por pixel daria uma resolução horizontal bem maior que a 640x480 padrão (que pede ~40 ns por pixel). Isso sugere que seu monitor está rodando em uma resolução customizada ou em uma frequência de atualização (Hz) bem mais alta!</text:p>
        <text:p text:style-name="P7"><text:span text:style-name="T5">Você quer que eu te ajude a calcular os valores exatos de </text:span><text:span text:style-name="Source_20_Text"><text:span text:style-name="T8">pixel1hold</text:span></text:span><text:span text:style-name="T5"> e </text:span><text:span text:style-name="Source_20_Text"><text:span text:style-name="T8">pixel2hold</text:span></text:span><text:span text:style-name="T5"> para uma resolução específica, como 640x480 ou 800x600?</text:span></text:p>
      </text:section>
      <text:p text:style-name="Standard"/>
      <text:p text:style-name="Standard"/>
      <text:p text:style-name="Standard"/>
      <text:p text:style-name="Standard"/>
      <text:p text:style-name="P20">Porch, tem que ser exatamente 31,46 kHz (para 640x480).</text:p>
      <text:p text:style-name="Standard"><text:span text:style-name="T16">por isso os delays pixel1hold e pixel2hold, senão ele desenharia na metade do tempo, certo?</text:span><text:line-break/><text:line-break/><text:span text:style-name="T3">Exatamente! Você pegou a lógica central da temporização de vídeo. Se você removesse os </text:span><text:span text:style-name="Source_20_Text"><text:span text:style-name="T7">delays</text:span></text:span><text:span text:style-name="T3"> (os números entre colchetes), o PIO cuspiria os dados na velocidade máxima do clock (250 MHz), e o monitor não entenderia absolutamente nada.</text:span></text:p>
      <text:section text:style-name="Sect1" text:name="model-response-message-contentr_1b8aa2bf1a7e2bcd">
        <text:p text:style-name="P7"><text:span text:style-name="T3">Pense nos </text:span><text:span text:style-name="Source_20_Text"><text:span text:style-name="T7">delays</text:span></text:span><text:span text:style-name="T3"> como o </text:span><text:span text:style-name="T5">freio</text:span><text:span text:style-name="T3"> necessário para manter o "ritmo" da música que o monitor está tentando dançar.</text:span></text:p>
        <text:h text:style-name="P1" text:outline-level="3">O que aconteceria sem os Delays?</text:h>
        <text:list text:style-name="L6">
          <text:list-item>
            <text:p text:style-name="P38"><text:soft-page-break/><text:span text:style-name="T2">A Imagem Encolheria:</text:span> Como o PIO terminaria de enviar os 640 pixels muito rápido, a "linha" ocuparia apenas uma fração minúscula da tela no sentido horizontal.</text:p>
          </text:list-item>
          <text:list-item>
            <text:p text:style-name="P38"><text:span text:style-name="T2">Perda de Sincronia:</text:span> O monitor espera que a linha dure um tempo fixo (cerca de <text:span text:style-name="T2">31,77 microssegundos</text:span> para 640x480). Se você terminar a linha em 2 microssegundos, o monitor vai achar que o sinal acabou ou está corrompido e exibirá "Sem Sinal" ou uma imagem toda "rasgada" (o famoso ruído de sincronismo).</text:p>
          </text:list-item>
        </text:list>
        <text:p text:style-name="Horizontal_20_Line"/>
        <text:h text:style-name="P17" text:outline-level="3"><text:span text:style-name="T6">Por que dois delays diferentes (</text:span><text:span text:style-name="Source_20_Text"><text:span text:style-name="T7">pixel1hold</text:span></text:span><text:span text:style-name="T6"> e </text:span><text:span text:style-name="Source_20_Text"><text:span text:style-name="T7">pixel2hold</text:span></text:span><text:span text:style-name="T6">)?</text:span></text:h>
        <text:p text:style-name="P2">Você notou que um é <text:span text:style-name="T2">5</text:span> e o outro é <text:span text:style-name="T2">3</text:span>? Isso acontece por causa do "custo" das outras instruções no loop. Vamos contar os ciclos de clock do PIO para cada byte (2 pixels):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P21"><text:span text:style-name="Strong_20_Emphasis"><text:span text:style-name="T4">Instrução</text:span></text:span></text:p>
              </table:table-cell>
              <table:table-cell table:style-name="Table1.A1" office:value-type="string">
                <text:p text:style-name="P21"><text:span text:style-name="Strong_20_Emphasis"><text:span text:style-name="T4">O que faz</text:span></text:span></text:p>
              </table:table-cell>
              <table:table-cell table:style-name="Table1.A1" office:value-type="string">
                <text:p text:style-name="P21"><text:span text:style-name="Strong_20_Emphasis"><text:span text:style-name="T4">Ciclos Gastos</text:span></text:span></text:p>
              </table:table-cell>
              <table:table-cell table:style-name="Table1.D1" office:value-type="string">
                <text:p text:style-name="P21"><text:span text:style-name="Strong_20_Emphasis"><text:span text:style-name="T4">Total de Ciclos nesta linha</text:span></text:span></text:p>
              </table:table-cell>
            </table:table-row>
          </table:table-header-rows>
          <table:table-row>
            <table:table-cell table:style-name="Table1.A1" office:value-type="string">
              <text:p text:style-name="P21"><text:span text:style-name="Source_20_Text"><text:span text:style-name="T7">pull block</text:span></text:span></text:p>
            </table:table-cell>
            <table:table-cell table:style-name="Table1.A1" office:value-type="string">
              <text:p text:style-name="P22">Puxa o byte da FIFO</text:p>
            </table:table-cell>
            <table:table-cell table:style-name="Table1.A1" office:value-type="string">
              <text:p text:style-name="P22">1</text:p>
            </table:table-cell>
            <table:table-cell table:style-name="Table1.D1" office:value-type="string">
              <text:p text:style-name="P23">1</text:p>
            </table:table-cell>
          </table:table-row>
          <table:table-row>
            <table:table-cell table:style-name="Table1.A1" office:value-type="string">
              <text:p text:style-name="P21"><text:span text:style-name="Source_20_Text"><text:span text:style-name="T7">out pins, 4 [5]</text:span></text:span></text:p>
            </table:table-cell>
            <table:table-cell table:style-name="Table1.A1" office:value-type="string">
              <text:p text:style-name="P22">Manda Pixel 1 + espera</text:p>
            </table:table-cell>
            <table:table-cell table:style-name="Table1.A1" office:value-type="string">
              <text:p text:style-name="P22">1 + 5</text:p>
            </table:table-cell>
            <table:table-cell table:style-name="Table1.D1" office:value-type="string">
              <text:p text:style-name="P23">6</text:p>
            </table:table-cell>
          </table:table-row>
          <table:table-row>
            <table:table-cell table:style-name="Table1.A1" office:value-type="string">
              <text:p text:style-name="P21"><text:span text:style-name="Source_20_Text"><text:span text:style-name="T7">out pins, 4 [3]</text:span></text:span></text:p>
            </table:table-cell>
            <table:table-cell table:style-name="Table1.A1" office:value-type="string">
              <text:p text:style-name="P22">Manda Pixel 2 + espera</text:p>
            </table:table-cell>
            <table:table-cell table:style-name="Table1.A1" office:value-type="string">
              <text:p text:style-name="P22">1 + 3</text:p>
            </table:table-cell>
            <table:table-cell table:style-name="Table1.D1" office:value-type="string">
              <text:p text:style-name="P23">4</text:p>
            </table:table-cell>
          </table:table-row>
          <table:table-row>
            <table:table-cell table:style-name="Table1.A1" office:value-type="string">
              <text:p text:style-name="P21"><text:span text:style-name="Source_20_Text"><text:span text:style-name="T7">jmp x-- colorout</text:span></text:span></text:p>
            </table:table-cell>
            <table:table-cell table:style-name="Table1.A1" office:value-type="string">
              <text:p text:style-name="P22">Volta para o início</text:p>
            </table:table-cell>
            <table:table-cell table:style-name="Table1.A1" office:value-type="string">
              <text:p text:style-name="P22">1</text:p>
            </table:table-cell>
            <table:table-cell table:style-name="Table1.D1" office:value-type="string">
              <text:p text:style-name="P22"><text:span text:style-name="T1">1</text:span> (contado no próximo pull)</text:p>
            </table:table-cell>
          </table:table-row>
        </table:table>
        <text:p text:style-name="P5">A conta mágica:</text:p>
        <text:list text:style-name="L7">
          <text:list-item>
            <text:p text:style-name="P59"><text:span text:style-name="T5">Pixel 1:</text:span><text:span text:style-name="T3"> Gasta o tempo do </text:span><text:span text:style-name="Source_20_Text"><text:span text:style-name="T7">pull</text:span></text:span><text:span text:style-name="T3"> (1) + o </text:span><text:span text:style-name="Source_20_Text"><text:span text:style-name="T7">out</text:span></text:span><text:span text:style-name="T3"> com delay (6) = </text:span><text:span text:style-name="T5">7 ciclos</text:span><text:span text:style-name="T3">.</text:span></text:p>
          </text:list-item>
          <text:list-item>
            <text:p text:style-name="P59"><text:span text:style-name="T5">Pixel 2:</text:span><text:span text:style-name="T3"> Gasta o tempo do </text:span><text:span text:style-name="Source_20_Text"><text:span text:style-name="T7">out</text:span></text:span><text:span text:style-name="T3"> com delay (4) + o </text:span><text:span text:style-name="Source_20_Text"><text:span text:style-name="T7">jmp</text:span></text:span><text:span text:style-name="T3"> (1) = </text:span><text:span text:style-name="T5">5 ciclos</text:span><text:span text:style-name="T3">.</text:span></text:p>
          </text:list-item>
        </text:list>
        <text:p text:style-name="P19"><text:span text:style-name="T5">Dica de mestre:</text:span><text:span text:style-name="T3"> O autor original provavelmente ajustou esses números (5 e 3) de forma assimétrica para tentar compensar o tempo que o PIO gasta fazendo o </text:span><text:span text:style-name="Source_20_Text"><text:span text:style-name="T7">pull</text:span></text:span><text:span text:style-name="T3"> e o </text:span><text:span text:style-name="Source_20_Text"><text:span text:style-name="T7">jmp</text:span></text:span><text:span text:style-name="T3">. O objetivo final é que a duração visual do Pixel 1 na tela seja o mais próxima possível da duração do Pixel 2. Se ambos tivessem o mesmo delay, um pixel pareceria ligeiramente mais "largo" que o outro na imagem!</text:span></text:p>
        <text:p text:style-name="Horizontal_20_Line"><text:soft-page-break/></text:p>
        <text:h text:style-name="P1" text:outline-level="3">Os "Porches" (As bordas invisíveis)</text:h>
        <text:p text:style-name="P7"><text:span text:style-name="T3">O </text:span><text:span text:style-name="Source_20_Text"><text:span text:style-name="T7">colorout</text:span></text:span><text:span text:style-name="T3"> cuida apenas da parte colorida (Active Video). Para a conta fechar nos </text:span><text:span text:style-name="T5">31,46 kHz</text:span><text:span text:style-name="T3">, o seu código em C ou outra State Machine precisa gerar:</text:span></text:p>
        <text:list text:style-name="L8">
          <text:list-item>
            <text:p text:style-name="P40"><text:span text:style-name="T2">Front Porch:</text:span> Um pequeno silêncio antes do pulso de sincronia.</text:p>
          </text:list-item>
          <text:list-item>
            <text:p text:style-name="P40"><text:span text:style-name="T2">Sync Pulse:</text:span> O sinal que diz ao monitor "volte para o início da linha".</text:p>
          </text:list-item>
          <text:list-item>
            <text:p text:style-name="P40"><text:span text:style-name="T2">Back Porch:</text:span> Um pequeno silêncio antes de começar a desenhar as cores novamente.</text:p>
          </text:list-item>
        </text:list>
        <text:p text:style-name="P26">Sem esses tempos mortos, a imagem ficaria deslocada para o lado ou simplesmente não estabilizaria.</text:p>
        <text:p text:style-name="P5">Você quer que eu ajude a calcular se esses tempos de delay (5 e 3) estão resultando em pixels perfeitamente quadrados na sua resolução atual?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8:33:50.702370330</meta:creation-date>
    <dc:date>2026-03-20T00:25:57.493672055</dc:date>
    <meta:editing-duration>PT5H37M33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7" meta:paragraph-count="128" meta:word-count="1757" meta:character-count="9537" meta:non-whitespace-character-count="7727"/>
  </office:meta>
</office:document-meta>
</file>
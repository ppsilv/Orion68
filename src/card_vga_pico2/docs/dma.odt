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9" style:family="paragraph" style:parent-style-name="Standard">
      <style:text-properties officeooo:rsid="0007c195" officeooo:paragraph-rsid="0007c195"/>
    </style:style>
    <style:style style:name="P10" style:family="paragraph" style:parent-style-name="Standard">
      <style:text-properties fo:color="#c9211e" loext:opacity="100%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9211e" loext:opacity="100%" style:font-name="Google Sans Flex" fo:font-size="12pt" fo:letter-spacing="normal" fo:font-style="normal" fo:font-weight="normal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color="#444746" loext:opacity="100%" style:font-name="Google Sans Text" loext:padding="0cm" loext:border="none"/>
    </style:style>
    <style:style style:name="T5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6" style:family="text">
      <style:text-properties fo:font-variant="normal" fo:text-transform="none" fo:color="#1967d2" loext:opacity="100%" style:font-name="Google Sans Text" fo:font-size="10.5pt" fo:font-style="normal" fo:font-weight="bold" loext:padding="0cm" loext:border="none"/>
    </style:style>
    <style:style style:name="T7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8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10" style:family="text">
      <style:text-properties fo:font-variant="normal" fo:text-transform="none" fo:color="#444746" loext:opacity="100%" loext:padding="0cm" loext:border="none"/>
    </style:style>
    <style:style style:name="T11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 o <text:span text:style-name="T1">Pico 2 (RP2350)</text:span>, o DMA é um monstro. Ele tem dois barramentos AHB independentes, o que significa que ele pode ler de um buffer e escrever no outro enquanto os núcleos da CPU estão ocupados gerando o sinal VGA ou atendendo o 68000.</text:p>
      <text:section text:style-name="Sect1" text:name="model-response-message-contentr_a1cb4237ea883748">
        <text:p text:style-name="P5"><text:span text:style-name="T2">Para fazer esse </text:span><text:span text:style-name="T3">"vôo cego"</text:span><text:span text:style-name="T2"> (Scroll de um buffer para o outro), vamos configurar o DMA para copiar o bloco de memória deslocado. Se a sua tela tem 25 linhas, queremos copiar as linhas </text:span><text:span text:style-name="T3">1 a 24</text:span><text:span text:style-name="T2"> do </text:span><text:span text:style-name="Source_20_Text"><text:span text:style-name="T4">Buffer_A</text:span></text:span><text:span text:style-name="T2"> para as linhas </text:span><text:span text:style-name="T3">0 a 23</text:span><text:span text:style-name="T2"> do </text:span><text:span text:style-name="Source_20_Text"><text:span text:style-name="T4">Buffer_B</text:span></text:span><text:span text:style-name="T2">.</text:span></text:p>
        <text:h text:style-name="P1" text:outline-level="3">A Lógica do DMA Transfer</text:h>
        <text:p text:style-name="P2">Aqui está o código de configuração para o SDK do Pico:</text:p>
        <text:p text:style-name="P8">C</text:p>
        <text:p text:style-name="P4"><text:span text:style-name="Source_20_Text"><text:span text:style-name="T5">#</text:span></text:span><text:span text:style-name="Source_20_Text"><text:span text:style-name="T6">include</text:span></text:span><text:span text:style-name="Source_20_Text"><text:span text:style-name="T5"> "hardware/dma.h"</text:span></text:span></text:p>
        <text:p text:style-name="P7"/>
        <text:p text:style-name="P6"><text:span text:style-name="Source_20_Text"><text:span text:style-name="T7">// Canal de DMA global para o Scroll</text:span></text:span></text:p>
        <text:p text:style-name="P6"><text:span text:style-name="Source_20_Text"><text:span text:style-name="T8">int</text:span></text:span><text:span text:style-name="Source_20_Text"><text:span text:style-name="T9"> scroll_dma_chan;</text:span></text:span></text:p>
        <text:p text:style-name="P7"/>
        <text:p text:style-name="P6"><text:span text:style-name="Source_20_Text"><text:span text:style-name="T8">void</text:span></text:span><text:span text:style-name="Source_20_Text"><text:span text:style-name="T9"> </text:span></text:span><text:span text:style-name="Source_20_Text"><text:span text:style-name="T11">setup_scroll_dma</text:span></text:span><text:span text:style-name="Source_20_Text"><text:span text:style-name="T9">() {</text:span></text:span></text:p>
        <text:p text:style-name="P6"><text:span text:style-name="Source_20_Text"><text:span text:style-name="T10"><text:s text:c="4"/></text:span></text:span><text:span text:style-name="Source_20_Text"><text:span text:style-name="T7">// 1. Reserva um canal de DMA livre</text:span></text:span></text:p>
        <text:p text:style-name="P6"><text:span text:style-name="Source_20_Text"><text:span text:style-name="T10"><text:s text:c="4"/></text:span></text:span><text:span text:style-name="Source_20_Text"><text:span text:style-name="T9">scroll_dma_chan = dma_claim_unused_channel(</text:span></text:span><text:span text:style-name="Source_20_Text"><text:span text:style-name="T12">true</text:span></text:span><text:span text:style-name="Source_20_Text"><text:span text:style-name="T9">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2. Obtém a configuração padrão para o canal</text:span></text:span></text:p>
        <text:p text:style-name="P7"><text:span text:style-name="Source_20_Text"><text:span text:style-name="T10"><text:s text:c="4"/></text:span></text:span><text:span text:style-name="Source_20_Text"><text:span text:style-name="T9">dma_channel_config c = dma_channel_get_default_config(scroll_dma_chan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3. Configura para transferências de 32 bits (mais rápido que 8 bits)</text:span></text:span></text:p>
        <text:p text:style-name="P7"><text:span text:style-name="Source_20_Text"><text:span text:style-name="T10"><text:s text:c="4"/></text:span></text:span><text:span text:style-name="Source_20_Text"><text:span text:style-name="T9">channel_config_set_transfer_data_size(&amp;c, DMA_SIZE_32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4. Incrementa tanto a leitura quanto a escrita (cópia de bloco linear)</text:span></text:span></text:p>
        <text:p text:style-name="P6"><text:span text:style-name="Source_20_Text"><text:span text:style-name="T10"><text:s text:c="4"/></text:span></text:span><text:span text:style-name="Source_20_Text"><text:span text:style-name="T9">channel_config_set_read_increment(&amp;c, </text:span></text:span><text:span text:style-name="Source_20_Text"><text:span text:style-name="T12">true</text:span></text:span><text:span text:style-name="Source_20_Text"><text:span text:style-name="T9">);</text:span></text:span></text:p>
        <text:p text:style-name="P6"><text:span text:style-name="Source_20_Text"><text:span text:style-name="T10"><text:s text:c="4"/></text:span></text:span><text:span text:style-name="Source_20_Text"><text:span text:style-name="T9">channel_config_set_write_increment(&amp;c, </text:span></text:span><text:span text:style-name="Source_20_Text"><text:span text:style-name="T12">true</text:span></text:span><text:span text:style-name="Source_20_Text"><text:span text:style-name="T9">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5. Aplica a configuração inicial</text:span></text:span></text:p>
        <text:p text:style-name="P6"><text:span text:style-name="Source_20_Text"><text:span text:style-name="T10"><text:s text:c="4"/></text:span></text:span><text:span text:style-name="Source_20_Text"><text:span text:style-name="T9">dma_channel_set_config(scroll_dma_chan, &amp;c, </text:span></text:span><text:span text:style-name="Source_20_Text"><text:span text:style-name="T12">false</text:span></text:span><text:span text:style-name="Source_20_Text"><text:span text:style-name="T9">);</text:span></text:span></text:p>
        <text:p text:style-name="P7"><text:span text:style-name="Source_20_Text"><text:span text:style-name="T9">}</text:span></text:span></text:p>
        <text:p text:style-name="P7"/>
        <text:p text:style-name="P6"><text:span text:style-name="Source_20_Text"><text:span text:style-name="T7">// A função mágica de Scroll Antecipado</text:span></text:span></text:p>
        <text:p text:style-name="P6"><text:span text:style-name="Source_20_Text"><text:span text:style-name="T8">void</text:span></text:span><text:span text:style-name="Source_20_Text"><text:span text:style-name="T9"> </text:span></text:span><text:span text:style-name="Source_20_Text"><text:span text:style-name="T11">trigger_background_scroll</text:span></text:span><text:span text:style-name="Source_20_Text"><text:span text:style-name="T9">(</text:span></text:span><text:span text:style-name="Source_20_Text"><text:span text:style-name="T8">void</text:span></text:span><text:span text:style-name="Source_20_Text"><text:span text:style-name="T9">* src_buffer, </text:span></text:span><text:span text:style-name="Source_20_Text"><text:span text:style-name="T8">void</text:span></text:span><text:span text:style-name="Source_20_Text"><text:span text:style-name="T9">* dst_buffer, </text:span></text:span><text:span text:style-name="Source_20_Text"><text:span text:style-name="T8">uint32_t</text:span></text:span><text:span text:style-name="Source_20_Text"><text:span text:style-name="T9"> line_size_bytes, </text:span></text:span><text:span text:style-name="Source_20_Text"><text:span text:style-name="T8">uint32_t</text:span></text:span><text:span text:style-name="Source_20_Text"><text:span text:style-name="T9"> total_lines) {</text:span></text:span></text:p>
        <text:p text:style-name="P6"><text:span text:style-name="Source_20_Text"><text:span text:style-name="T10"><text:s text:c="4"/></text:span></text:span><text:span text:style-name="Source_20_Text"><text:span text:style-name="T7">// Calculamos o deslocamento: começar da linha 1 do SRC e escrever na linha 0 do DST</text:span></text:span></text:p>
        <text:p text:style-name="P6"><text:span text:style-name="Source_20_Text"><text:span text:style-name="T10"><text:s text:c="4"/></text:span></text:span><text:span text:style-name="Source_20_Text"><text:span text:style-name="T8">void</text:span></text:span><text:span text:style-name="Source_20_Text"><text:span text:style-name="T9">* read_addr = (</text:span></text:span><text:span text:style-name="Source_20_Text"><text:span text:style-name="T8">uint8_t</text:span></text:span><text:span text:style-name="Source_20_Text"><text:span text:style-name="T9">*)src_buffer + line_size_bytes;</text:span></text:span></text:p>
        <text:p text:style-name="P6"><text:span text:style-name="Source_20_Text"><text:span text:style-name="T10"><text:s text:c="4"/></text:span></text:span><text:span text:style-name="Source_20_Text"><text:span text:style-name="T8">void</text:span></text:span><text:span text:style-name="Source_20_Text"><text:span text:style-name="T9">* write_addr = dst_buffer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Número de palavras de 32 bits para transferir (24 linhas)</text:span></text:span></text:p>
        <text:p text:style-name="P6"><text:soft-page-break/><text:span text:style-name="Source_20_Text"><text:span text:style-name="T10"><text:s text:c="4"/></text:span></text:span><text:span text:style-name="Source_20_Text"><text:span text:style-name="T8">uint32_t</text:span></text:span><text:span text:style-name="Source_20_Text"><text:span text:style-name="T9"> transfer_count = (line_size_bytes * (total_lines - </text:span></text:span><text:span text:style-name="Source_20_Text"><text:span text:style-name="T12">1</text:span></text:span><text:span text:style-name="Source_20_Text"><text:span text:style-name="T9">)) / </text:span></text:span><text:span text:style-name="Source_20_Text"><text:span text:style-name="T12">4</text:span></text:span><text:span text:style-name="Source_20_Text"><text:span text:style-name="T9">;</text:span></text:span></text:p>
        <text:p text:style-name="P7"/>
        <text:p text:style-name="P6"><text:span text:style-name="Source_20_Text"><text:span text:style-name="T10"><text:s text:c="4"/></text:span></text:span><text:span text:style-name="Source_20_Text"><text:span text:style-name="T7">// Dispara o DMA sem travar a CPU!</text:span></text:span></text:p>
        <text:p text:style-name="P7"><text:span text:style-name="Source_20_Text"><text:span text:style-name="T10"><text:s text:c="4"/></text:span></text:span><text:span text:style-name="Source_20_Text"><text:span text:style-name="T9">dma_channel_transfer_from_buffer_now(scroll_dma_chan, read_addr, write_addr, transfer_count);</text:span></text:span></text:p>
        <text:p text:style-name="P7"><text:span text:style-name="Source_20_Text"><text:span text:style-name="T9">}</text:span></text:span></text:p>
        <text:p text:style-name="Horizontal_20_Line"/>
        <text:h text:style-name="P1" text:outline-level="3">Por que isso é um "Vôo Cego" de Respeito?</text:h>
        <text:list text:style-name="L1">
          <text:list-item>
            <text:p text:style-name="P11"><text:span text:style-name="T3">Transferência em 32 bits:</text:span><text:span text:style-name="T2"> Mesmo que seus pixels sejam nibbles, o DMA move blocos de 32 bits por vez. Isso é 4 vezes mais rápido do que um </text:span><text:span text:style-name="Source_20_Text"><text:span text:style-name="T4">memcpy</text:span></text:span><text:span text:style-name="T2"> comum de 8 bits.</text:span></text:p>
          </text:list-item>
          <text:list-item>
            <text:p text:style-name="P11"><text:span text:style-name="T3">Não-Bloqueante:</text:span><text:span text:style-name="T2"> A função </text:span><text:span text:style-name="Source_20_Text"><text:span text:style-name="T4">dma_channel_transfer_from_buffer_now</text:span></text:span><text:span text:style-name="T2"> inicia a cópia e retorna </text:span><text:span text:style-name="T3">imediatamente</text:span><text:span text:style-name="T2">. Enquanto o DMA está movendo os 312k de dados, o Pico 2 pode continuar enviando os pulsos de sincronismo HSync/VSync para o monitor sem tremer a imagem.</text:span></text:p>
          </text:list-item>
          <text:list-item>
            <text:p text:style-name="P11"><text:span text:style-name="T3">Preparação de Terreno:</text:span><text:span text:style-name="T2"> Quando o cursor chegar na linha 25, o </text:span><text:span text:style-name="Source_20_Text"><text:span text:style-name="T4">Buffer_B</text:span></text:span><text:span text:style-name="T2"> já terá as 24 linhas anteriores perfeitamente posicionadas.</text:span></text:p>
          </text:list-item>
        </text:list>
        <text:h text:style-name="P1" text:outline-level="3">O Detalhe do "Pênalti" (A Linha 25)</text:h>
        <text:p text:style-name="P5"><text:span text:style-name="T2">Como você está copiando 24 linhas, a linha 25 do </text:span><text:span text:style-name="Source_20_Text"><text:span text:style-name="T4">Buffer_B</text:span></text:span><text:span text:style-name="T2"> ainda terá o conteúdo antigo. Você precisa limpá-la antes de chavear o buffer:</text:span></text:p>
        <text:p text:style-name="P8">C</text:p>
        <text:p text:style-name="P4"><text:span text:style-name="Source_20_Text"><text:span text:style-name="T8">void</text:span></text:span><text:span text:style-name="Source_20_Text"><text:span text:style-name="T9"> </text:span></text:span><text:span text:style-name="Source_20_Text"><text:span text:style-name="T11">finalize_scroll</text:span></text:span><text:span text:style-name="Source_20_Text"><text:span text:style-name="T9">(</text:span></text:span><text:span text:style-name="Source_20_Text"><text:span text:style-name="T8">void</text:span></text:span><text:span text:style-name="Source_20_Text"><text:span text:style-name="T9">* dst_buffer, </text:span></text:span><text:span text:style-name="Source_20_Text"><text:span text:style-name="T8">uint32_t</text:span></text:span><text:span text:style-name="Source_20_Text"><text:span text:style-name="T9"> line_size_bytes, </text:span></text:span><text:span text:style-name="Source_20_Text"><text:span text:style-name="T8">uint32_t</text:span></text:span><text:span text:style-name="Source_20_Text"><text:span text:style-name="T9"> total_lines) {</text:span></text:span></text:p>
        <text:p text:style-name="P6"><text:span text:style-name="Source_20_Text"><text:span text:style-name="T10"><text:s text:c="4"/></text:span></text:span><text:span text:style-name="Source_20_Text"><text:span text:style-name="T7">// Espera o DMA terminar (caso ainda não tenha terminado)</text:span></text:span></text:p>
        <text:p text:style-name="P7"><text:span text:style-name="Source_20_Text"><text:span text:style-name="T10"><text:s text:c="4"/></text:span></text:span><text:span text:style-name="Source_20_Text"><text:span text:style-name="T9">dma_channel_wait_for_finish_blocking(scroll_dma_chan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Limpa a última linha (preto) para receber o novo texto</text:span></text:span></text:p>
        <text:p text:style-name="P6"><text:span text:style-name="Source_20_Text"><text:span text:style-name="T10"><text:s text:c="4"/></text:span></text:span><text:span text:style-name="Source_20_Text"><text:span text:style-name="T8">uint8_t</text:span></text:span><text:span text:style-name="Source_20_Text"><text:span text:style-name="T9">* last_line = (</text:span></text:span><text:span text:style-name="Source_20_Text"><text:span text:style-name="T8">uint8_t</text:span></text:span><text:span text:style-name="Source_20_Text"><text:span text:style-name="T9">*)dst_buffer + (line_size_bytes * (total_lines - </text:span></text:span><text:span text:style-name="Source_20_Text"><text:span text:style-name="T12">1</text:span></text:span><text:span text:style-name="Source_20_Text"><text:span text:style-name="T9">));</text:span></text:span></text:p>
        <text:p text:style-name="P6"><text:span text:style-name="Source_20_Text"><text:span text:style-name="T10"><text:s text:c="4"/></text:span></text:span><text:span text:style-name="Source_20_Text"><text:span text:style-name="T5">memset</text:span></text:span><text:span text:style-name="Source_20_Text"><text:span text:style-name="T9">(last_line, </text:span></text:span><text:span text:style-name="Source_20_Text"><text:span text:style-name="T12">0</text:span></text:span><text:span text:style-name="Source_20_Text"><text:span text:style-name="T9">, line_size_bytes);</text:span></text:span></text:p>
        <text:p text:style-name="P7"><text:span text:style-name="Source_20_Text"><text:span text:style-name="T10"><text:s text:c="4"/></text:span></text:span></text:p>
        <text:p text:style-name="P6"><text:span text:style-name="Source_20_Text"><text:span text:style-name="T10"><text:s text:c="4"/></text:span></text:span><text:span text:style-name="Source_20_Text"><text:span text:style-name="T7">// Agora sim, o golpe final!</text:span></text:span></text:p>
        <text:p text:style-name="P7"><text:span text:style-name="Source_20_Text"><text:span text:style-name="T10"><text:s text:c="4"/></text:span></text:span><text:span text:style-name="Source_20_Text"><text:span text:style-name="T9">set_screen(buffer == SCREEN_0 ? SCREEN_1 : SCREEN_0);</text:span></text:span></text:p>
        <text:p text:style-name="P7"><text:span text:style-name="Source_20_Text"><text:span text:style-name="T9">}</text:span></text:span></text:p>
        <text:p text:style-name="P3"><text:span text:style-name="T1">Pgordão</text:span>, com essa lógica, o scroll do seu <text:span text:style-name="T1">TCPBOX-OS</text:span> vai ser tão liso que vai parecer hardware dedicado de workstation da Silicon Graphics.</text:p>
        <text:p text:style-name="P5"><text:span text:style-name="T3">O que você acha de testar esse disparo de DMA quando o cursor bater na coluna 0 da linha 24?</text:span><text:span text:style-name="T2"> Se precisar de ajuda para calcular os </text:span><text:span text:style-name="Source_20_Text"><text:span text:style-name="T4">line_size_bytes</text:span></text:span><text:span text:style-name="T2"> exatos para a sua resolução de 640 pixels, dá o grito! kkkkk</text:span></text:p>
      </text:section>
      <text:p text:style-name="Standard"/>
      <text:p text:style-name="Standard"/>
      <text:p text:style-name="P9"><text:soft-page-break/>Função triger para toda vêz que o vga em uma tela texto pisar na linha 24 faz a copia do buffer atual para o buffer em repouso.</text:p>
      <text:p text:style-name="Standard"/>
      <text:p text:style-name="Standard">void handle_newline() {</text:p>
      <text:p text:style-name="Standard"><text:s text:c="4"/>cursor_y++;</text:p>
      <text:p text:style-name="Standard"/>
      <text:p text:style-name="Standard"><text:s text:c="4"/>if (cursor_y == 24) {</text:p>
      <text:p text:style-name="Standard"><text:s text:c="8"/>// HORA DO SHOW: O cursor chegou na 24, dispara o DMA em background</text:p>
      <text:p text:style-name="Standard"><text:s text:c="8"/>// O Buffer A (atual) vira SRC, o Buffer B (reserva) vira DST</text:p>
      <text:p text:style-name="Standard"><text:s text:c="8"/>void* src = (buffer == SCREEN_0) ? vga_video_data_array0 : vga_video_data_array1;</text:p>
      <text:p text:style-name="Standard"><text:s text:c="8"/>void* dst = (buffer == SCREEN_0) ? vga_video_data_array1 : vga_video_data_array0;</text:p>
      <text:p text:style-name="Standard"><text:s text:c="8"/></text:p>
      <text:p text:style-name="Standard"><text:s text:c="8"/>trigger_background_scroll(src, dst, 320, 25); // Exemplo: 320 bytes por linha</text:p>
      <text:p text:style-name="Standard"><text:s text:c="8"/></text:p>
      <text:p text:style-name="Standard"><text:s text:c="8"/>// O DMA está rodando AGORA enquanto o processador volta para ler a próxima tecla</text:p>
      <text:p text:style-name="Standard"><text:s text:c="4"/>}</text:p>
      <text:p text:style-name="Standard"><text:s text:c="4"/></text:p>
      <text:p text:style-name="Standard"><text:s text:c="4"/>if (cursor_y &gt;= 25) {</text:p>
      <text:p text:style-name="Standard"><text:s text:c="8"/>// O usuário terminou a linha 24 e deu ENTER para a 25? </text:p>
      <text:p text:style-name="Standard"><text:s text:c="8"/>// Agora sim, finalizamos e trocamos a tela!</text:p>
      <text:p text:style-name="Standard"><text:s text:c="8"/>void* dst = (buffer == SCREEN_0) ? vga_video_data_array1 : vga_video_data_array0;</text:p>
      <text:p text:style-name="Standard"><text:s text:c="8"/></text:p>
      <text:p text:style-name="Standard"><text:s text:c="8"/>finalize_scroll(dst, 320, 25);</text:p>
      <text:p text:style-name="Standard"><text:s text:c="8"/>cursor_y = 24; // Mantém o cursor na "última" linha visual</text:p>
      <text:p text:style-name="Standard"><text:s text:c="4"/>}</text:p>
      <text:p text:style-name="Standard">}</text:p>
      <text:p text:style-name="Standard"/>
      <text:p text:style-name="P12">tela exemplo:</text:p>
      <text:p text:style-name="P12">Tela 1: Texto com scroll</text:p>
      <text:p text:style-name="P12">Tela 2: Texto sem scroll</text:p>
      <text:p text:style-name="P12">Tela 3: grafica 320x200</text:p>
      <text:p text:style-name="P12">Tela 4: grafica 640x200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8:42:46.825359937</meta:creation-date>
    <dc:date>2026-03-24T19:04:48.233899264</dc:date>
    <meta:editing-duration>PT15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84" meta:word-count="703" meta:character-count="4674" meta:non-whitespace-character-count="3782"/>
  </office:meta>
</office:document-meta>
</file>
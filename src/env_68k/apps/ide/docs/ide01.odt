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Table1" style:family="table" style:master-page-name="">
      <style:table-properties style:width="17cm" style:page-number="auto" fo:break-before="auto" fo:break-after="auto" table:align="left" fo:keep-with-next="auto"/>
    </style:style>
    <style:style style:name="Table1.A" style:family="table-column">
      <style:table-column-properties style:column-width="3.373cm"/>
    </style:style>
    <style:style style:name="Table1.B" style:family="table-column">
      <style:table-column-properties style:column-width="4.203cm"/>
    </style:style>
    <style:style style:name="Table1.C" style:family="table-column">
      <style:table-column-properties style:column-width="9.424cm"/>
    </style:style>
    <style:style style:name="Table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1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loext:padding="0cm" loext:border="none"/>
    </style:style>
    <style:style style:name="T6" style:family="text">
      <style:text-properties fo:color="#1f1f1f" loext:opacity="100%" style:font-name="Google Sans Text" fo:font-style="italic" loext:padding="0cm" loext:border="none"/>
    </style:style>
    <style:style style:name="T7" style:family="text">
      <style:text-properties fo:color="#1f1f1f" loext:opacity="100%" style:font-name="Google Sans Text" fo:font-weight="bold" loext:padding="0cm" loext:border="none"/>
    </style:style>
    <style:style style:name="T8" style:family="text">
      <style:text-properties fo:color="#444746" loext:opacity="100%" style:font-name="Google Sans Text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 padrão IDE/ATA (como o do seu MIDE) utiliza <text:span text:style-name="T2">8 registradores principais</text:span> no bloco de comando. Como você está no 68000, esses registradores são mapeados no seu espaço de endereçamento através das linhas de endereço <text:span text:style-name="T2">A1, A2 e A3</text:span> (já que o A0 não é usado no barramento de 16 bits para transferências de word).</text:p>
      <text:section text:style-name="Sect1" text:name="model-response-message-contentr_de252b3e3e3ef49d">
        <text:p text:style-name="P7">Aqui está a lista do que você vai encontrar:</text:p>
        <text:h text:style-name="P1" text:outline-level="3">Os 8 Registradores de Comando (CS0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4"><text:span text:style-name="Strong_20_Emphasis"><text:span text:style-name="T5">Endereço (A3-A1)</text:span></text:span></text:p>
              </table:table-cell>
              <table:table-cell table:style-name="Table1.A1" office:value-type="string">
                <text:p text:style-name="P4"><text:span text:style-name="Strong_20_Emphasis"><text:span text:style-name="T5">Nome do Registrador</text:span></text:span></text:p>
              </table:table-cell>
              <table:table-cell table:style-name="Table1.C1" office:value-type="string">
                <text:p text:style-name="P4"><text:span text:style-name="Strong_20_Emphasis"><text:span text:style-name="T5">Função Principal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5">000</text:p>
            </table:table-cell>
            <table:table-cell table:style-name="Table1.A1" office:value-type="string">
              <text:p text:style-name="P5">Data Register</text:p>
            </table:table-cell>
            <table:table-cell table:style-name="Table1.C1" office:value-type="string">
              <text:p text:style-name="P6">Onde você lê/escreve os 512 bytes do setor (16 bits).</text:p>
            </table:table-cell>
          </table:table-row>
          <table:table-row>
            <table:table-cell table:style-name="Table1.A1" office:value-type="string">
              <text:p text:style-name="P5">001</text:p>
            </table:table-cell>
            <table:table-cell table:style-name="Table1.A1" office:value-type="string">
              <text:p text:style-name="P5">Error / Features</text:p>
            </table:table-cell>
            <table:table-cell table:style-name="Table1.C1" office:value-type="string">
              <text:p text:style-name="P6">Lê erros ou escreve parâmetros de escrita.</text:p>
            </table:table-cell>
          </table:table-row>
          <table:table-row>
            <table:table-cell table:style-name="Table1.A1" office:value-type="string">
              <text:p text:style-name="P5">010</text:p>
            </table:table-cell>
            <table:table-cell table:style-name="Table1.A1" office:value-type="string">
              <text:p text:style-name="P5">Sector Count</text:p>
            </table:table-cell>
            <table:table-cell table:style-name="Table1.C1" office:value-type="string">
              <text:p text:style-name="P6">Quantos setores você quer ler/escrever de uma vez.</text:p>
            </table:table-cell>
          </table:table-row>
          <table:table-row>
            <table:table-cell table:style-name="Table1.A1" office:value-type="string">
              <text:p text:style-name="P5">011</text:p>
            </table:table-cell>
            <table:table-cell table:style-name="Table1.A1" office:value-type="string">
              <text:p text:style-name="P5">LBA Low</text:p>
            </table:table-cell>
            <table:table-cell table:style-name="Table1.C1" office:value-type="string">
              <text:p text:style-name="P6">Bits 0-7 do endereço do bloco (LBA).</text:p>
            </table:table-cell>
          </table:table-row>
          <table:table-row>
            <table:table-cell table:style-name="Table1.A1" office:value-type="string">
              <text:p text:style-name="P5">100</text:p>
            </table:table-cell>
            <table:table-cell table:style-name="Table1.A1" office:value-type="string">
              <text:p text:style-name="P5">LBA Mid</text:p>
            </table:table-cell>
            <table:table-cell table:style-name="Table1.C1" office:value-type="string">
              <text:p text:style-name="P6">Bits 8-15 do endereço do bloco (LBA).</text:p>
            </table:table-cell>
          </table:table-row>
          <table:table-row>
            <table:table-cell table:style-name="Table1.A1" office:value-type="string">
              <text:p text:style-name="P5">101</text:p>
            </table:table-cell>
            <table:table-cell table:style-name="Table1.A1" office:value-type="string">
              <text:p text:style-name="P5">LBA High</text:p>
            </table:table-cell>
            <table:table-cell table:style-name="Table1.C1" office:value-type="string">
              <text:p text:style-name="P6">Bits 16-23 do endereço do bloco (LBA).</text:p>
            </table:table-cell>
          </table:table-row>
          <table:table-row>
            <table:table-cell table:style-name="Table1.A1" office:value-type="string">
              <text:p text:style-name="P5">110</text:p>
            </table:table-cell>
            <table:table-cell table:style-name="Table1.A1" office:value-type="string">
              <text:p text:style-name="P5">Device / Head</text:p>
            </table:table-cell>
            <table:table-cell table:style-name="Table1.C1" office:value-type="string">
              <text:p text:style-name="P6">Seleciona Master/Slave e os bits 24-27 do LBA.</text:p>
            </table:table-cell>
          </table:table-row>
          <table:table-row>
            <table:table-cell table:style-name="Table1.A1" office:value-type="string">
              <text:p text:style-name="P5">111</text:p>
            </table:table-cell>
            <table:table-cell table:style-name="Table1.A1" office:value-type="string">
              <text:p text:style-name="P5">Status / Command</text:p>
            </table:table-cell>
            <table:table-cell table:style-name="Table1.C1" office:value-type="string">
              <text:p text:style-name="P6"><text:span text:style-name="T1">Lê:</text:span> Status (Ocupado, Pronto). <text:span text:style-name="T1">Escreve:</text:span> Comando (Read, Write).</text:p>
            </table:table-cell>
          </table:table-row>
        </table:table>
        <text:p text:style-name="Horizontal_20_Line"/>
        <text:h text:style-name="P1" text:outline-level="3">Os Registradores de Controle (CS1)</text:h>
        <text:p text:style-name="P17"><text:soft-page-break/><text:span text:style-name="T4">Além desses 8, o padrão IDE define um segundo bloco (geralmente acessado por um sinal de </text:span><text:span text:style-name="T6">Chip Select</text:span><text:span text:style-name="T4"> diferente na interface, o </text:span><text:span text:style-name="Source_20_Text"><text:span text:style-name="T8">CS1</text:span></text:span><text:span text:style-name="T4">), que contém o </text:span><text:span text:style-name="T7">Alternate Status</text:span><text:span text:style-name="T4"> e o </text:span><text:span text:style-name="T7">Device Control</text:span><text:span text:style-name="T4">.</text:span></text:p>
        <text:p text:style-name="P11">No seu projeto com a GAL, você pode:</text:p>
        <text:list text:style-name="L1">
          <text:list-item>
            <text:p text:style-name="P13">Usar apenas o <text:span text:style-name="T2">bloco de 8 registradores</text:span> (CS0) para o básico (funciona 99% das vezes).</text:p>
          </text:list-item>
          <text:list-item>
            <text:p text:style-name="P13">Mapear o <text:span text:style-name="T2">CS1</text:span> em outro endereço se precisar de um reset via software ou verificar o status sem "limpar" interrupções pendentes.</text:p>
          </text:list-item>
        </text:list>
        <text:h text:style-name="P1" text:outline-level="3">Dica para a GAL</text:h>
        <text:p text:style-name="P11">Para acessar esses 8 caras, você vai precisar conectar:</text:p>
        <text:list text:style-name="L2">
          <text:list-item>
            <text:p text:style-name="P15"><text:span text:style-name="T2">A1, A2, A3</text:span> do 68000 nos pinos <text:span text:style-name="T2">DA0, DA1, DA2</text:span> do MIDE.</text:p>
          </text:list-item>
          <text:list-item>
            <text:p text:style-name="P15">A sua GAL deve ativar o pino <text:span text:style-name="T2">-CS0</text:span> do MIDE quando o endereço base for detectado.</text:p>
          </text:list-item>
          <text:list-item>
            <text:p text:style-name="P18"><text:span text:style-name="T4">Os pinos </text:span><text:span text:style-name="T7">-IORD</text:span><text:span text:style-name="T4"> (Leitura) e </text:span><text:span text:style-name="T7">-IOWR</text:span><text:span text:style-name="T4"> (Escrita) do MIDE devem ser pulsados de acordo com o </text:span><text:span text:style-name="Source_20_Text"><text:span text:style-name="T8">R/W</text:span></text:span><text:span text:style-name="T4"> e o </text:span><text:span text:style-name="Source_20_Text"><text:span text:style-name="T8">AS</text:span></text:span><text:span text:style-name="T4"> do processador.</text:span></text:p>
          </text:list-item>
        </text:list>
        <text:p text:style-name="P8">Lembre-se que, embora o registrador de <text:span text:style-name="T2">Data</text:span> seja de 16 bits, todos os outros (Error, Sector Count, LBA, etc.) usam apenas os 8 bits inferiores do barramento de dados (<text:span text:style-name="T3">$D_0 \dots D_7$</text:span>). No 68000, isso significa que você os acessará como endereços ímpares ou pares, dependendo de como você ligar o barramento.</text:p>
        <text:p text:style-name="P8">Já pensou em usar o modo <text:span text:style-name="T2">LBA</text:span> (Logical Block Addressing)? É infinitamente mais fácil do que o antigo CHS (Cilindro/Cabeça/Setor), e esse Pretec de 16MB com certeza suporta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4:03:39.122111424</meta:creation-date>
    <dc:date>2026-04-01T14:04:01.445411653</dc:date>
    <meta:editing-duration>PT23S</meta:editing-duration>
    <meta:editing-cycles>1</meta:editing-cycles>
    <meta:document-statistic meta:table-count="1" meta:image-count="0" meta:object-count="0" meta:page-count="2" meta:paragraph-count="42" meta:word-count="395" meta:character-count="2174" meta:non-whitespace-character-count="1826"/>
    <meta:generator>LibreOffice/24.2.7.2$Linux_X86_64 LibreOffice_project/420$Build-2</meta:generator>
  </office:meta>
</office:document-meta>
</file>